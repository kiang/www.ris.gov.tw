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5 年 3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5997" calcext:value-type="float">
            <text:p><text:s text:c="3"/>105,997</text:p>
          </table:table-cell>
          <table:table-cell table:style-name="ce25" office:value-type="float" office:value="5078" calcext:value-type="float">
            <text:p><text:s text:c="3"/>5,078</text:p>
          </table:table-cell>
          <table:table-cell table:style-name="ce25" office:value-type="float" office:value="8879" calcext:value-type="float">
            <text:p><text:s text:c="3"/>8,879</text:p>
          </table:table-cell>
          <table:table-cell table:style-name="ce25" office:value-type="float" office:value="7815" calcext:value-type="float">
            <text:p><text:s text:c="3"/>7,815</text:p>
          </table:table-cell>
          <table:table-cell table:style-name="ce25" office:value-type="float" office:value="4180" calcext:value-type="float">
            <text:p><text:s text:c="3"/>4,180</text:p>
          </table:table-cell>
          <table:table-cell table:style-name="ce25" office:value-type="float" office:value="3711" calcext:value-type="float">
            <text:p><text:s text:c="3"/>3,711</text:p>
          </table:table-cell>
          <table:table-cell table:style-name="ce25" office:value-type="float" office:value="2181" calcext:value-type="float">
            <text:p><text:s text:c="3"/>2,181</text:p>
          </table:table-cell>
          <table:table-cell table:style-name="ce25" office:value-type="float" office:value="3564" calcext:value-type="float">
            <text:p><text:s text:c="3"/>3,564</text:p>
          </table:table-cell>
          <table:table-cell table:style-name="ce25" office:value-type="float" office:value="10593" calcext:value-type="float">
            <text:p><text:s text:c="3"/>10,593</text:p>
          </table:table-cell>
          <table:table-cell table:style-name="ce25" office:value-type="float" office:value="823" calcext:value-type="float">
            <text:p><text:s text:c="3"/>82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966" calcext:value-type="float">
            <text:p><text:s text:c="3"/>4,966</text:p>
          </table:table-cell>
          <table:table-cell table:style-name="ce25" office:value-type="float" office:value="52712" calcext:value-type="float">
            <text:p><text:s text:c="3"/>52,712</text:p>
          </table:table-cell>
          <table:table-cell table:style-name="ce25" office:value-type="float" office:value="1479" calcext:value-type="float">
            <text:p><text:s text:c="3"/>1,479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5" office:value-type="float" office:value="105893" calcext:value-type="float">
            <text:p><text:s text:c="3"/>105,893</text:p>
          </table:table-cell>
          <table:table-cell table:style-name="ce25" office:value-type="float" office:value="6350" calcext:value-type="float">
            <text:p><text:s text:c="3"/>6,350</text:p>
          </table:table-cell>
          <table:table-cell table:style-name="ce25" office:value-type="float" office:value="9230" calcext:value-type="float">
            <text:p><text:s text:c="3"/>9,230</text:p>
          </table:table-cell>
          <table:table-cell table:style-name="ce25" office:value-type="float" office:value="5126" calcext:value-type="float">
            <text:p><text:s text:c="3"/>5,126</text:p>
          </table:table-cell>
          <table:table-cell table:style-name="ce25" office:value-type="float" office:value="5846" calcext:value-type="float">
            <text:p><text:s text:c="3"/>5,846</text:p>
          </table:table-cell>
          <table:table-cell table:style-name="ce25" office:value-type="float" office:value="5273" calcext:value-type="float">
            <text:p><text:s text:c="3"/>5,273</text:p>
          </table:table-cell>
          <table:table-cell table:style-name="ce25" office:value-type="float" office:value="2677" calcext:value-type="float">
            <text:p><text:s text:c="3"/>2,677</text:p>
          </table:table-cell>
          <table:table-cell table:style-name="ce25" office:value-type="float" office:value="3549" calcext:value-type="float">
            <text:p><text:s text:c="3"/>3,549</text:p>
          </table:table-cell>
          <table:table-cell table:style-name="ce25" office:value-type="float" office:value="9671" calcext:value-type="float">
            <text:p><text:s text:c="3"/>9,671</text:p>
          </table:table-cell>
          <table:table-cell table:style-name="ce25" office:value-type="float" office:value="374" calcext:value-type="float">
            <text:p><text:s text:c="3"/>37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966" calcext:value-type="float">
            <text:p><text:s text:c="3"/>4,966</text:p>
          </table:table-cell>
          <table:table-cell table:style-name="ce25" office:value-type="float" office:value="52712" calcext:value-type="float">
            <text:p><text:s text:c="3"/>52,712</text:p>
          </table:table-cell>
          <table:table-cell table:style-name="ce25" office:value-type="float" office:value="43" calcext:value-type="float">
            <text:p><text:s text:c="3"/>43</text:p>
          </table:table-cell>
          <table:table-cell table:style-name="ce25" office:value-type="float" office:value="76" calcext:value-type="float">
            <text:p><text:s text:c="3"/>76</text:p>
          </table:table-cell>
          <table:table-cell table:style-name="ce29" office:value-type="float" office:value="104" calcext:value-type="float">
            <text:p><text:s text:c="3"/>10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8842" calcext:value-type="float">
            <text:p><text:s text:c="3"/>48,842</text:p>
          </table:table-cell>
          <table:table-cell table:style-name="ce25" office:value-type="float" office:value="2161" calcext:value-type="float">
            <text:p><text:s text:c="3"/>2,161</text:p>
          </table:table-cell>
          <table:table-cell table:style-name="ce25" office:value-type="float" office:value="4126" calcext:value-type="float">
            <text:p><text:s text:c="3"/>4,126</text:p>
          </table:table-cell>
          <table:table-cell table:style-name="ce25" office:value-type="float" office:value="3721" calcext:value-type="float">
            <text:p><text:s text:c="3"/>3,721</text:p>
          </table:table-cell>
          <table:table-cell table:style-name="ce25" office:value-type="float" office:value="1958" calcext:value-type="float">
            <text:p><text:s text:c="3"/>1,958</text:p>
          </table:table-cell>
          <table:table-cell table:style-name="ce25" office:value-type="float" office:value="1710" calcext:value-type="float">
            <text:p><text:s text:c="3"/>1,710</text:p>
          </table:table-cell>
          <table:table-cell table:style-name="ce25" office:value-type="float" office:value="1036" calcext:value-type="float">
            <text:p><text:s text:c="3"/>1,036</text:p>
          </table:table-cell>
          <table:table-cell table:style-name="ce25" office:value-type="float" office:value="1699" calcext:value-type="float">
            <text:p><text:s text:c="3"/>1,699</text:p>
          </table:table-cell>
          <table:table-cell table:style-name="ce25" office:value-type="float" office:value="4941" calcext:value-type="float">
            <text:p><text:s text:c="3"/>4,941</text:p>
          </table:table-cell>
          <table:table-cell table:style-name="ce25" office:value-type="float" office:value="413" calcext:value-type="float">
            <text:p><text:s text:c="3"/>41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301" calcext:value-type="float">
            <text:p><text:s text:c="3"/>2,301</text:p>
          </table:table-cell>
          <table:table-cell table:style-name="ce25" office:value-type="float" office:value="24280" calcext:value-type="float">
            <text:p><text:s text:c="3"/>24,280</text:p>
          </table:table-cell>
          <table:table-cell table:style-name="ce25" office:value-type="float" office:value="492" calcext:value-type="float">
            <text:p><text:s text:c="3"/>492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49032" calcext:value-type="float">
            <text:p><text:s text:c="3"/>49,032</text:p>
          </table:table-cell>
          <table:table-cell table:style-name="ce25" office:value-type="float" office:value="2808" calcext:value-type="float">
            <text:p><text:s text:c="3"/>2,808</text:p>
          </table:table-cell>
          <table:table-cell table:style-name="ce25" office:value-type="float" office:value="4326" calcext:value-type="float">
            <text:p><text:s text:c="3"/>4,326</text:p>
          </table:table-cell>
          <table:table-cell table:style-name="ce25" office:value-type="float" office:value="2282" calcext:value-type="float">
            <text:p><text:s text:c="3"/>2,282</text:p>
          </table:table-cell>
          <table:table-cell table:style-name="ce25" office:value-type="float" office:value="2785" calcext:value-type="float">
            <text:p><text:s text:c="3"/>2,785</text:p>
          </table:table-cell>
          <table:table-cell table:style-name="ce25" office:value-type="float" office:value="2415" calcext:value-type="float">
            <text:p><text:s text:c="3"/>2,415</text:p>
          </table:table-cell>
          <table:table-cell table:style-name="ce25" office:value-type="float" office:value="1246" calcext:value-type="float">
            <text:p><text:s text:c="3"/>1,246</text:p>
          </table:table-cell>
          <table:table-cell table:style-name="ce25" office:value-type="float" office:value="1683" calcext:value-type="float">
            <text:p><text:s text:c="3"/>1,683</text:p>
          </table:table-cell>
          <table:table-cell table:style-name="ce25" office:value-type="float" office:value="4636" calcext:value-type="float">
            <text:p><text:s text:c="3"/>4,636</text:p>
          </table:table-cell>
          <table:table-cell table:style-name="ce25" office:value-type="float" office:value="231" calcext:value-type="float">
            <text:p><text:s text:c="3"/>23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301" calcext:value-type="float">
            <text:p><text:s text:c="3"/>2,301</text:p>
          </table:table-cell>
          <table:table-cell table:style-name="ce25" office:value-type="float" office:value="24280" calcext:value-type="float">
            <text:p><text:s text:c="3"/>24,280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43" office:value-type="float" office:value="-190" calcext:value-type="float">
            <text:p>－19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7155" calcext:value-type="float">
            <text:p><text:s text:c="3"/>57,155</text:p>
          </table:table-cell>
          <table:table-cell table:style-name="ce25" office:value-type="float" office:value="2917" calcext:value-type="float">
            <text:p><text:s text:c="3"/>2,917</text:p>
          </table:table-cell>
          <table:table-cell table:style-name="ce25" office:value-type="float" office:value="4753" calcext:value-type="float">
            <text:p><text:s text:c="3"/>4,753</text:p>
          </table:table-cell>
          <table:table-cell table:style-name="ce25" office:value-type="float" office:value="4094" calcext:value-type="float">
            <text:p><text:s text:c="3"/>4,094</text:p>
          </table:table-cell>
          <table:table-cell table:style-name="ce25" office:value-type="float" office:value="2222" calcext:value-type="float">
            <text:p><text:s text:c="3"/>2,222</text:p>
          </table:table-cell>
          <table:table-cell table:style-name="ce25" office:value-type="float" office:value="2001" calcext:value-type="float">
            <text:p><text:s text:c="3"/>2,001</text:p>
          </table:table-cell>
          <table:table-cell table:style-name="ce25" office:value-type="float" office:value="1145" calcext:value-type="float">
            <text:p><text:s text:c="3"/>1,145</text:p>
          </table:table-cell>
          <table:table-cell table:style-name="ce25" office:value-type="float" office:value="1865" calcext:value-type="float">
            <text:p><text:s text:c="3"/>1,865</text:p>
          </table:table-cell>
          <table:table-cell table:style-name="ce25" office:value-type="float" office:value="5652" calcext:value-type="float">
            <text:p><text:s text:c="3"/>5,652</text:p>
          </table:table-cell>
          <table:table-cell table:style-name="ce25" office:value-type="float" office:value="410" calcext:value-type="float">
            <text:p><text:s text:c="3"/>41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665" calcext:value-type="float">
            <text:p><text:s text:c="3"/>2,665</text:p>
          </table:table-cell>
          <table:table-cell table:style-name="ce25" office:value-type="float" office:value="28432" calcext:value-type="float">
            <text:p><text:s text:c="3"/>28,432</text:p>
          </table:table-cell>
          <table:table-cell table:style-name="ce25" office:value-type="float" office:value="987" calcext:value-type="float">
            <text:p><text:s text:c="3"/>987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56861" calcext:value-type="float">
            <text:p><text:s text:c="3"/>56,861</text:p>
          </table:table-cell>
          <table:table-cell table:style-name="ce25" office:value-type="float" office:value="3542" calcext:value-type="float">
            <text:p><text:s text:c="3"/>3,542</text:p>
          </table:table-cell>
          <table:table-cell table:style-name="ce25" office:value-type="float" office:value="4904" calcext:value-type="float">
            <text:p><text:s text:c="3"/>4,904</text:p>
          </table:table-cell>
          <table:table-cell table:style-name="ce25" office:value-type="float" office:value="2844" calcext:value-type="float">
            <text:p><text:s text:c="3"/>2,844</text:p>
          </table:table-cell>
          <table:table-cell table:style-name="ce25" office:value-type="float" office:value="3061" calcext:value-type="float">
            <text:p><text:s text:c="3"/>3,061</text:p>
          </table:table-cell>
          <table:table-cell table:style-name="ce25" office:value-type="float" office:value="2858" calcext:value-type="float">
            <text:p><text:s text:c="3"/>2,858</text:p>
          </table:table-cell>
          <table:table-cell table:style-name="ce25" office:value-type="float" office:value="1431" calcext:value-type="float">
            <text:p><text:s text:c="3"/>1,431</text:p>
          </table:table-cell>
          <table:table-cell table:style-name="ce25" office:value-type="float" office:value="1866" calcext:value-type="float">
            <text:p><text:s text:c="3"/>1,866</text:p>
          </table:table-cell>
          <table:table-cell table:style-name="ce25" office:value-type="float" office:value="5035" calcext:value-type="float">
            <text:p><text:s text:c="3"/>5,035</text:p>
          </table:table-cell>
          <table:table-cell table:style-name="ce25" office:value-type="float" office:value="143" calcext:value-type="float">
            <text:p><text:s text:c="3"/>14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665" calcext:value-type="float">
            <text:p><text:s text:c="3"/>2,665</text:p>
          </table:table-cell>
          <table:table-cell table:style-name="ce25" office:value-type="float" office:value="28432" calcext:value-type="float">
            <text:p><text:s text:c="3"/>28,432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55" calcext:value-type="float">
            <text:p><text:s text:c="3"/>5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7501" calcext:value-type="float">
            <text:p>17,501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51" calcext:value-type="float">
            <text:p>4,651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230" calcext:value-type="float">
            <text:p>2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59" calcext:value-type="float">
            <text:p>6,759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931" calcext:value-type="float">
            <text:p>16,931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83" calcext:value-type="float">
            <text:p>2,983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324" calcext:value-type="float">
            <text:p>2,324</text:p>
          </table:table-cell>
          <table:table-cell table:style-name="ce26" office:value-type="float" office:value="85" calcext:value-type="float">
            <text:p>8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59" calcext:value-type="float">
            <text:p>6,75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45" office:value-type="float" office:value="570" calcext:value-type="float">
            <text:p>570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005" calcext:value-type="float">
            <text:p>8,005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78" calcext:value-type="float">
            <text:p>2,178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947" calcext:value-type="float">
            <text:p>947</text:p>
          </table:table-cell>
          <table:table-cell table:style-name="ce27" office:value-type="float" office:value="118" calcext:value-type="float">
            <text:p>1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64" calcext:value-type="float">
            <text:p>3,064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68" calcext:value-type="float">
            <text:p>7,768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64" calcext:value-type="float">
            <text:p>3,064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46" office:value-type="float" office:value="237" calcext:value-type="float">
            <text:p>23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496" calcext:value-type="float">
            <text:p>9,496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163" calcext:value-type="float">
            <text:p>9,163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46" office:value-type="float" office:value="333" calcext:value-type="float">
            <text:p>33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233" calcext:value-type="float">
            <text:p>11,233</text:p>
          </table:table-cell>
          <table:table-cell table:style-name="ce26" office:value-type="float" office:value="1305" calcext:value-type="float">
            <text:p>1,305</text:p>
          </table:table-cell>
          <table:table-cell table:style-name="ce26" office:value-type="float" office:value="2983" calcext:value-type="float">
            <text:p>2,9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25" calcext:value-type="float">
            <text:p>4,525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952" calcext:value-type="float">
            <text:p>13,952</text:p>
          </table:table-cell>
          <table:table-cell table:style-name="ce26" office:value-type="float" office:value="1587" calcext:value-type="float">
            <text:p>1,587</text:p>
          </table:table-cell>
          <table:table-cell table:style-name="ce26" office:value-type="float" office:value="4651" calcext:value-type="float">
            <text:p>4,6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25" calcext:value-type="float">
            <text:p>4,52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45" office:value-type="float" office:value="-2719" calcext:value-type="float">
            <text:p><text:s/>－2,719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00" calcext:value-type="float">
            <text:p>5,000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495" calcext:value-type="float">
            <text:p>6,495</text:p>
          </table:table-cell>
          <table:table-cell table:style-name="ce27" office:value-type="float" office:value="687" calcext:value-type="float">
            <text:p>687</text:p>
          </table:table-cell>
          <table:table-cell table:style-name="ce27" office:value-type="float" office:value="2178" calcext:value-type="float">
            <text:p>2,1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495" calcext:value-type="float">
            <text:p><text:s/>－1,49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457" calcext:value-type="float">
            <text:p>7,457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46" office:value-type="float" office:value="-1224" calcext:value-type="float">
            <text:p><text:s/>－1,22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600" calcext:value-type="float">
            <text:p>12,600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707" calcext:value-type="float">
            <text:p>1,707</text:p>
          </table:table-cell>
          <table:table-cell table:style-name="ce26" office:value-type="float" office:value="129" calcext:value-type="float">
            <text:p>1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33" calcext:value-type="float">
            <text:p>6,133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866" calcext:value-type="float">
            <text:p>10,866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448" calcext:value-type="float">
            <text:p>1,448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33" calcext:value-type="float">
            <text:p>6,13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style-name="ce45" office:value-type="float" office:value="1734" calcext:value-type="float">
            <text:p>1,734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930" calcext:value-type="float">
            <text:p>5,930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83" calcext:value-type="float">
            <text:p>2,883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74" calcext:value-type="float">
            <text:p>5,074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83" calcext:value-type="float">
            <text:p>2,88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856" calcext:value-type="float">
            <text:p>85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46" office:value-type="float" office:value="878" calcext:value-type="float">
            <text:p>878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4323" calcext:value-type="float">
            <text:p>14,32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3120" calcext:value-type="float">
            <text:p>3,120</text:p>
          </table:table-cell>
          <table:table-cell table:style-name="ce26" office:value-type="float" office:value="83" calcext:value-type="float">
            <text:p>8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08" calcext:value-type="float">
            <text:p>8,408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2771" calcext:value-type="float">
            <text:p>12,77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08" calcext:value-type="float">
            <text:p>8,40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1552" calcext:value-type="float">
            <text:p>1,552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524" calcext:value-type="float">
            <text:p>6,524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415" calcext:value-type="float">
            <text:p>1,415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39" calcext:value-type="float">
            <text:p>3,839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845" calcext:value-type="float">
            <text:p>5,845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39" calcext:value-type="float">
            <text:p>3,83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679" calcext:value-type="float">
            <text:p>67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873" calcext:value-type="float">
            <text:p>87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567" calcext:value-type="float">
            <text:p>8,567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76" calcext:value-type="float">
            <text:p>5,576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174" calcext:value-type="float">
            <text:p>8,174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76" calcext:value-type="float">
            <text:p>5,57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45" office:value-type="float" office:value="393" calcext:value-type="float">
            <text:p>393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70" calcext:value-type="float">
            <text:p>3,97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94" calcext:value-type="float">
            <text:p>2,59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25" calcext:value-type="float">
            <text:p>3,825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94" calcext:value-type="float">
            <text:p>2,5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145" calcext:value-type="float">
            <text:p>14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82" calcext:value-type="float">
            <text:p>2,98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82" calcext:value-type="float">
            <text:p>2,98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46" office:value-type="float" office:value="248" calcext:value-type="float">
            <text:p>248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879" calcext:value-type="float">
            <text:p>12,879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16" calcext:value-type="float">
            <text:p>1,716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632" calcext:value-type="float">
            <text:p>8,632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50" calcext:value-type="float">
            <text:p>12,950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38" calcext:value-type="float">
            <text:p>1,538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632" calcext:value-type="float">
            <text:p>8,63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-71" calcext:value-type="float">
            <text:p><text:s/>－71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868" calcext:value-type="float">
            <text:p>5,868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906" calcext:value-type="float">
            <text:p>3,90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19" calcext:value-type="float">
            <text:p>5,919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906" calcext:value-type="float">
            <text:p>3,9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51" calcext:value-type="float">
            <text:p><text:s/>－5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31" calcext:value-type="float">
            <text:p>7,031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20" calcext:value-type="float">
            <text:p><text:s/>－20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8168" calcext:value-type="float">
            <text:p><text:s text:c="3"/>28,168</text:p>
          </table:table-cell>
          <table:table-cell table:style-name="ce29" office:value-type="float" office:value="857" calcext:value-type="float">
            <text:p><text:s text:c="3"/>857</text:p>
          </table:table-cell>
          <table:table-cell table:style-name="ce29" office:value-type="float" office:value="2324" calcext:value-type="float">
            <text:p><text:s text:c="3"/>2,324</text:p>
          </table:table-cell>
          <table:table-cell table:style-name="ce29" office:value-type="float" office:value="1320" calcext:value-type="float">
            <text:p><text:s text:c="3"/>1,320</text:p>
          </table:table-cell>
          <table:table-cell table:style-name="ce29" office:value-type="float" office:value="1448" calcext:value-type="float">
            <text:p><text:s text:c="3"/>1,448</text:p>
          </table:table-cell>
          <table:table-cell table:style-name="ce29" office:value-type="float" office:value="2160" calcext:value-type="float">
            <text:p><text:s text:c="3"/>2,160</text:p>
          </table:table-cell>
          <table:table-cell table:style-name="ce29" office:value-type="float" office:value="694" calcext:value-type="float">
            <text:p><text:s text:c="3"/>694</text:p>
          </table:table-cell>
          <table:table-cell table:style-name="ce29" office:value-type="float" office:value="1538" calcext:value-type="float">
            <text:p><text:s text:c="3"/>1,53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87" calcext:value-type="float">
            <text:p><text:s text:c="3"/>18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965" calcext:value-type="float">
            <text:p><text:s text:c="3"/>4,965</text:p>
          </table:table-cell>
          <table:table-cell table:style-name="ce29" office:value-type="float" office:value="12361" calcext:value-type="float">
            <text:p><text:s text:c="3"/>12,361</text:p>
          </table:table-cell>
          <table:table-cell table:style-name="ce29" office:value-type="float" office:value="309" calcext:value-type="float">
            <text:p><text:s text:c="3"/>309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9085" calcext:value-type="float">
            <text:p><text:s text:c="3"/>29,085</text:p>
          </table:table-cell>
          <table:table-cell table:style-name="ce29" office:value-type="float" office:value="1143" calcext:value-type="float">
            <text:p><text:s text:c="3"/>1,143</text:p>
          </table:table-cell>
          <table:table-cell table:style-name="ce29" office:value-type="float" office:value="2019" calcext:value-type="float">
            <text:p><text:s text:c="3"/>2,019</text:p>
          </table:table-cell>
          <table:table-cell table:style-name="ce29" office:value-type="float" office:value="985" calcext:value-type="float">
            <text:p><text:s text:c="3"/>985</text:p>
          </table:table-cell>
          <table:table-cell table:style-name="ce29" office:value-type="float" office:value="1707" calcext:value-type="float">
            <text:p><text:s text:c="3"/>1,707</text:p>
          </table:table-cell>
          <table:table-cell table:style-name="ce29" office:value-type="float" office:value="3120" calcext:value-type="float">
            <text:p><text:s text:c="3"/>3,120</text:p>
          </table:table-cell>
          <table:table-cell table:style-name="ce29" office:value-type="float" office:value="959" calcext:value-type="float">
            <text:p><text:s text:c="3"/>959</text:p>
          </table:table-cell>
          <table:table-cell table:style-name="ce29" office:value-type="float" office:value="1716" calcext:value-type="float">
            <text:p><text:s text:c="3"/>1,71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7" calcext:value-type="float">
            <text:p><text:s text:c="3"/>8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965" calcext:value-type="float">
            <text:p><text:s text:c="3"/>4,965</text:p>
          </table:table-cell>
          <table:table-cell table:style-name="ce29" office:value-type="float" office:value="12361" calcext:value-type="float">
            <text:p><text:s text:c="3"/>12,361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16" calcext:value-type="float">
            <text:p>16</text:p>
          </table:table-cell>
          <table:table-cell table:style-name="ce45" office:value-type="float" office:value="-917" calcext:value-type="float">
            <text:p><text:s/>－917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3137" calcext:value-type="float">
            <text:p><text:s text:c="3"/>13,137</text:p>
          </table:table-cell>
          <table:table-cell table:style-name="ce30" office:value-type="float" office:value="358" calcext:value-type="float">
            <text:p><text:s text:c="3"/>358</text:p>
          </table:table-cell>
          <table:table-cell table:style-name="ce30" office:value-type="float" office:value="1082" calcext:value-type="float">
            <text:p><text:s text:c="3"/>1,082</text:p>
          </table:table-cell>
          <table:table-cell table:style-name="ce30" office:value-type="float" office:value="659" calcext:value-type="float">
            <text:p><text:s text:c="3"/>659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010" calcext:value-type="float">
            <text:p><text:s text:c="3"/>1,010</text:p>
          </table:table-cell>
          <table:table-cell table:style-name="ce30" office:value-type="float" office:value="329" calcext:value-type="float">
            <text:p><text:s text:c="3"/>329</text:p>
          </table:table-cell>
          <table:table-cell table:style-name="ce30" office:value-type="float" office:value="754" calcext:value-type="float">
            <text:p><text:s text:c="3"/>75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05" calcext:value-type="float">
            <text:p><text:s text:c="3"/>10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300" calcext:value-type="float">
            <text:p><text:s text:c="3"/>2,300</text:p>
          </table:table-cell>
          <table:table-cell table:style-name="ce30" office:value-type="float" office:value="5752" calcext:value-type="float">
            <text:p><text:s text:c="3"/>5,752</text:p>
          </table:table-cell>
          <table:table-cell table:style-name="ce30" office:value-type="float" office:value="89" calcext:value-type="float">
            <text:p><text:s text:c="3"/>89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13516" calcext:value-type="float">
            <text:p><text:s text:c="3"/>13,516</text:p>
          </table:table-cell>
          <table:table-cell table:style-name="ce30" office:value-type="float" office:value="517" calcext:value-type="float">
            <text:p><text:s text:c="3"/>517</text:p>
          </table:table-cell>
          <table:table-cell table:style-name="ce30" office:value-type="float" office:value="947" calcext:value-type="float">
            <text:p><text:s text:c="3"/>947</text:p>
          </table:table-cell>
          <table:table-cell table:style-name="ce30" office:value-type="float" office:value="457" calcext:value-type="float">
            <text:p><text:s text:c="3"/>457</text:p>
          </table:table-cell>
          <table:table-cell table:style-name="ce30" office:value-type="float" office:value="803" calcext:value-type="float">
            <text:p><text:s text:c="3"/>803</text:p>
          </table:table-cell>
          <table:table-cell table:style-name="ce30" office:value-type="float" office:value="1415" calcext:value-type="float">
            <text:p><text:s text:c="3"/>1,415</text:p>
          </table:table-cell>
          <table:table-cell table:style-name="ce30" office:value-type="float" office:value="460" calcext:value-type="float">
            <text:p><text:s text:c="3"/>460</text:p>
          </table:table-cell>
          <table:table-cell table:style-name="ce30" office:value-type="float" office:value="807" calcext:value-type="float">
            <text:p><text:s text:c="3"/>80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2" calcext:value-type="float">
            <text:p><text:s text:c="3"/>5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300" calcext:value-type="float">
            <text:p><text:s text:c="3"/>2,300</text:p>
          </table:table-cell>
          <table:table-cell table:style-name="ce30" office:value-type="float" office:value="5752" calcext:value-type="float">
            <text:p><text:s text:c="3"/>5,752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379" calcext:value-type="float">
            <text:p><text:s/>－37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5031" calcext:value-type="float">
            <text:p><text:s text:c="3"/>15,031</text:p>
          </table:table-cell>
          <table:table-cell table:style-name="ce31" office:value-type="float" office:value="499" calcext:value-type="float">
            <text:p><text:s text:c="3"/>499</text:p>
          </table:table-cell>
          <table:table-cell table:style-name="ce31" office:value-type="float" office:value="1242" calcext:value-type="float">
            <text:p><text:s text:c="3"/>1,242</text:p>
          </table:table-cell>
          <table:table-cell table:style-name="ce31" office:value-type="float" office:value="661" calcext:value-type="float">
            <text:p><text:s text:c="3"/>661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31" office:value-type="float" office:value="1150" calcext:value-type="float">
            <text:p><text:s text:c="3"/>1,150</text:p>
          </table:table-cell>
          <table:table-cell table:style-name="ce31" office:value-type="float" office:value="365" calcext:value-type="float">
            <text:p><text:s text:c="3"/>365</text:p>
          </table:table-cell>
          <table:table-cell table:style-name="ce31" office:value-type="float" office:value="784" calcext:value-type="float">
            <text:p><text:s text:c="3"/>78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82" calcext:value-type="float">
            <text:p><text:s text:c="3"/>8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665" calcext:value-type="float">
            <text:p><text:s text:c="3"/>2,665</text:p>
          </table:table-cell>
          <table:table-cell table:style-name="ce31" office:value-type="float" office:value="6609" calcext:value-type="float">
            <text:p><text:s text:c="3"/>6,609</text:p>
          </table:table-cell>
          <table:table-cell table:style-name="ce31" office:value-type="float" office:value="220" calcext:value-type="float">
            <text:p><text:s text:c="3"/>22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5569" calcext:value-type="float">
            <text:p><text:s text:c="3"/>15,569</text:p>
          </table:table-cell>
          <table:table-cell table:style-name="ce31" office:value-type="float" office:value="626" calcext:value-type="float">
            <text:p><text:s text:c="3"/>626</text:p>
          </table:table-cell>
          <table:table-cell table:style-name="ce31" office:value-type="float" office:value="1072" calcext:value-type="float">
            <text:p><text:s text:c="3"/>1,072</text:p>
          </table:table-cell>
          <table:table-cell table:style-name="ce31" office:value-type="float" office:value="528" calcext:value-type="float">
            <text:p><text:s text:c="3"/>528</text:p>
          </table:table-cell>
          <table:table-cell table:style-name="ce31" office:value-type="float" office:value="904" calcext:value-type="float">
            <text:p><text:s text:c="3"/>904</text:p>
          </table:table-cell>
          <table:table-cell table:style-name="ce31" office:value-type="float" office:value="1705" calcext:value-type="float">
            <text:p><text:s text:c="3"/>1,705</text:p>
          </table:table-cell>
          <table:table-cell table:style-name="ce31" office:value-type="float" office:value="499" calcext:value-type="float">
            <text:p><text:s text:c="3"/>499</text:p>
          </table:table-cell>
          <table:table-cell table:style-name="ce31" office:value-type="float" office:value="909" calcext:value-type="float">
            <text:p><text:s text:c="3"/>90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665" calcext:value-type="float">
            <text:p><text:s text:c="3"/>2,665</text:p>
          </table:table-cell>
          <table:table-cell table:style-name="ce31" office:value-type="float" office:value="6609" calcext:value-type="float">
            <text:p><text:s text:c="3"/>6,609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28" office:value-type="float" office:value="13" calcext:value-type="float">
            <text:p>13</text:p>
          </table:table-cell>
          <table:table-cell table:style-name="ce46" office:value-type="float" office:value="-538" calcext:value-type="float">
            <text:p><text:s/>－53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59" calcext:value-type="float">
            <text:p>2,55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19" calcext:value-type="float">
            <text:p>21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88" calcext:value-type="float">
            <text:p>6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0" calcext:value-type="float">
            <text:p>10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19" calcext:value-type="float">
            <text:p>11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42" calcext:value-type="float">
            <text:p>2,54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2" calcext:value-type="float">
            <text:p>2,24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300" calcext:value-type="float">
            <text:p>30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353" calcext:value-type="float">
            <text:p>35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206" calcext:value-type="float">
            <text:p>20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366" calcext:value-type="float">
            <text:p>36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3" calcext:value-type="float">
            <text:p>1,20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94" calcext:value-type="float">
            <text:p>9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00" calcext:value-type="float">
            <text:p>10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69" calcext:value-type="float">
            <text:p>6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31" calcext:value-type="float">
            <text:p>3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777" calcext:value-type="float">
            <text:p>3,77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249" calcext:value-type="float">
            <text:p>2,24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24" calcext:value-type="float">
            <text:p>4,82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2249" calcext:value-type="float">
            <text:p>2,2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047" calcext:value-type="float">
            <text:p><text:s/>－1,04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44" calcext:value-type="float">
            <text:p>244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508" calcext:value-type="float">
            <text:p><text:s/>－50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59" calcext:value-type="float">
            <text:p>2,05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1201" calcext:value-type="float">
            <text:p>1,20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39" calcext:value-type="float">
            <text:p><text:s/>－53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772" calcext:value-type="float">
            <text:p>7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7" calcext:value-type="float">
            <text:p>23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67" calcext:value-type="float">
            <text:p>3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0" calcext:value-type="float">
            <text:p>13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405" calcext:value-type="float">
            <text:p>4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7" calcext:value-type="float">
            <text:p>10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54" calcext:value-type="float">
            <text:p>2,35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07" calcext:value-type="float">
            <text:p>2,70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127" calcext:value-type="float">
            <text:p>1,12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-353" calcext:value-type="float">
            <text:p><text:s/>－353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524" calcext:value-type="float">
            <text:p>5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0" calcext:value-type="float">
            <text:p><text:s/>－20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603" calcext:value-type="float">
            <text:p>60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9" office:value-type="float" office:value="-153" calcext:value-type="float">
            <text:p><text:s/>－153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10" calcext:value-type="float">
            <text:p><text:s/>－21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23" calcext:value-type="float">
            <text:p>2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56" calcext:value-type="float">
            <text:p><text:s/>－15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588" calcext:value-type="float">
            <text:p>1,58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588" calcext:value-type="float">
            <text:p>1,5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82" calcext:value-type="float">
            <text:p><text:s/>－28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42" calcext:value-type="float">
            <text:p>7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3" calcext:value-type="float">
            <text:p><text:s/>－16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8" calcext:value-type="float">
            <text:p>1,75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19" calcext:value-type="float">
            <text:p><text:s/>－11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93" calcext:value-type="float">
            <text:p>2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0" calcext:value-type="float">
            <text:p>5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50" calcext:value-type="float">
            <text:p>1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43" calcext:value-type="float">
            <text:p>1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802" calcext:value-type="float">
            <text:p>80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0" calcext:value-type="float">
            <text:p><text:s/>－10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65" calcext:value-type="float">
            <text:p>3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37" calcext:value-type="float">
            <text:p>4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5" calcext:value-type="float">
            <text:p><text:s/>－6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0" calcext:value-type="float">
            <text:p>1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3" calcext:value-type="float">
            <text:p><text:s/>－6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91" calcext:value-type="float">
            <text:p>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99" calcext:value-type="float">
            <text:p>9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45" calcext:value-type="float">
            <text:p>34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74" calcext:value-type="float">
            <text:p>7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0" calcext:value-type="float">
            <text:p><text:s/>－1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66" calcext:value-type="float">
            <text:p>3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0" calcext:value-type="float">
            <text:p>1,13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2" calcext:value-type="float">
            <text:p>1,15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9" calcext:value-type="float">
            <text:p>1,18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08" calcext:value-type="float">
            <text:p>3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3" calcext:value-type="float">
            <text:p>14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4" calcext:value-type="float">
            <text:p>544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7" calcext:value-type="float">
            <text:p>3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80" calcext:value-type="float">
            <text:p>18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6" calcext:value-type="float">
            <text:p>10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87" calcext:value-type="float">
            <text:p>1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438" calcext:value-type="float">
            <text:p><text:s/>－438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05" calcext:value-type="float">
            <text:p>10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62" calcext:value-type="float">
            <text:p>1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82" calcext:value-type="float">
            <text:p><text:s/>－18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256" calcext:value-type="float">
            <text:p><text:s/>－25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57" calcext:value-type="float">
            <text:p>1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37" calcext:value-type="float">
            <text:p><text:s/>－43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0" calcext:value-type="float">
            <text:p>1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7" calcext:value-type="float">
            <text:p><text:s/>－19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240" calcext:value-type="float">
            <text:p><text:s/>－24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" calcext:value-type="float">
            <text:p><text:s/>－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