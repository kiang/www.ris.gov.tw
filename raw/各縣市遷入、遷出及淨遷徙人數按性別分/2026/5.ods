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82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503cm"/>
    </style:style>
    <style:style style:name="co4" style:family="table-column">
      <style:table-column-properties fo:break-before="auto" style:column-width="2.1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1.909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1.536cm"/>
    </style:style>
    <style:style style:name="co12" style:family="table-column">
      <style:table-column-properties fo:break-before="auto" style:column-width="2.085cm"/>
    </style:style>
    <style:style style:name="co13" style:family="table-column">
      <style:table-column-properties fo:break-before="auto" style:column-width="1.711cm"/>
    </style:style>
    <style:style style:name="co14" style:family="table-column">
      <style:table-column-properties fo:break-before="auto" style:column-width="2.217cm"/>
    </style:style>
    <style:style style:name="co15" style:family="table-column">
      <style:table-column-properties fo:break-before="auto" style:column-width="1.953cm"/>
    </style:style>
    <style:style style:name="co16" style:family="table-column">
      <style:table-column-properties fo:break-before="auto" style:column-width="1.602cm"/>
    </style:style>
    <style:style style:name="co17" style:family="table-column">
      <style:table-column-properties fo:break-before="auto" style:column-width="1.558cm"/>
    </style:style>
    <style:style style:name="co18" style:family="table-column">
      <style:table-column-properties fo:break-before="auto" style:column-width="2.415cm"/>
    </style:style>
    <style:style style:name="co19" style:family="table-column">
      <style:table-column-properties fo:break-before="auto" style:column-width="3.358cm"/>
    </style:style>
    <style:style style:name="co20" style:family="table-column">
      <style:table-column-properties fo:break-before="auto" style:column-width="3.381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1" style:font-name-complex="Times New Roman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16127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1635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5 年 5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1635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224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224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224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224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69412" calcext:value-type="float">
            <text:p><text:s text:c="3"/>69,412</text:p>
          </table:table-cell>
          <table:table-cell table:style-name="ce25" office:value-type="float" office:value="2568" calcext:value-type="float">
            <text:p><text:s text:c="3"/>2,568</text:p>
          </table:table-cell>
          <table:table-cell table:style-name="ce25" office:value-type="float" office:value="6159" calcext:value-type="float">
            <text:p><text:s text:c="3"/>6,159</text:p>
          </table:table-cell>
          <table:table-cell table:style-name="ce25" office:value-type="float" office:value="4792" calcext:value-type="float">
            <text:p><text:s text:c="3"/>4,792</text:p>
          </table:table-cell>
          <table:table-cell table:style-name="ce25" office:value-type="float" office:value="3424" calcext:value-type="float">
            <text:p><text:s text:c="3"/>3,424</text:p>
          </table:table-cell>
          <table:table-cell table:style-name="ce25" office:value-type="float" office:value="2605" calcext:value-type="float">
            <text:p><text:s text:c="3"/>2,605</text:p>
          </table:table-cell>
          <table:table-cell table:style-name="ce25" office:value-type="float" office:value="1516" calcext:value-type="float">
            <text:p><text:s text:c="3"/>1,516</text:p>
          </table:table-cell>
          <table:table-cell table:style-name="ce25" office:value-type="float" office:value="2384" calcext:value-type="float">
            <text:p><text:s text:c="3"/>2,384</text:p>
          </table:table-cell>
          <table:table-cell table:style-name="ce25" office:value-type="float" office:value="6331" calcext:value-type="float">
            <text:p><text:s text:c="3"/>6,331</text:p>
          </table:table-cell>
          <table:table-cell table:style-name="ce25" office:value-type="float" office:value="486" calcext:value-type="float">
            <text:p><text:s text:c="3"/>486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581" calcext:value-type="float">
            <text:p><text:s text:c="3"/>3,581</text:p>
          </table:table-cell>
          <table:table-cell table:style-name="ce25" office:value-type="float" office:value="34523" calcext:value-type="float">
            <text:p><text:s text:c="3"/>34,523</text:p>
          </table:table-cell>
          <table:table-cell table:style-name="ce25" office:value-type="float" office:value="1029" calcext:value-type="float">
            <text:p><text:s text:c="3"/>1,029</text:p>
          </table:table-cell>
          <table:table-cell table:style-name="ce25" office:value-type="float" office:value="14" calcext:value-type="float">
            <text:p><text:s text:c="3"/>14</text:p>
          </table:table-cell>
          <table:table-cell table:style-name="ce25" office:value-type="float" office:value="70989" calcext:value-type="float">
            <text:p><text:s text:c="3"/>70,989</text:p>
          </table:table-cell>
          <table:table-cell table:style-name="ce25" office:value-type="float" office:value="5089" calcext:value-type="float">
            <text:p><text:s text:c="3"/>5,089</text:p>
          </table:table-cell>
          <table:table-cell table:style-name="ce25" office:value-type="float" office:value="5916" calcext:value-type="float">
            <text:p><text:s text:c="3"/>5,916</text:p>
          </table:table-cell>
          <table:table-cell table:style-name="ce25" office:value-type="float" office:value="4164" calcext:value-type="float">
            <text:p><text:s text:c="3"/>4,164</text:p>
          </table:table-cell>
          <table:table-cell table:style-name="ce25" office:value-type="float" office:value="3402" calcext:value-type="float">
            <text:p><text:s text:c="3"/>3,402</text:p>
          </table:table-cell>
          <table:table-cell table:style-name="ce25" office:value-type="float" office:value="2926" calcext:value-type="float">
            <text:p><text:s text:c="3"/>2,926</text:p>
          </table:table-cell>
          <table:table-cell table:style-name="ce25" office:value-type="float" office:value="1542" calcext:value-type="float">
            <text:p><text:s text:c="3"/>1,542</text:p>
          </table:table-cell>
          <table:table-cell table:style-name="ce25" office:value-type="float" office:value="2092" calcext:value-type="float">
            <text:p><text:s text:c="3"/>2,092</text:p>
          </table:table-cell>
          <table:table-cell table:style-name="ce25" office:value-type="float" office:value="7346" calcext:value-type="float">
            <text:p><text:s text:c="3"/>7,346</text:p>
          </table:table-cell>
          <table:table-cell table:style-name="ce25" office:value-type="float" office:value="309" calcext:value-type="float">
            <text:p><text:s text:c="3"/>309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581" calcext:value-type="float">
            <text:p><text:s text:c="3"/>3,581</text:p>
          </table:table-cell>
          <table:table-cell table:style-name="ce25" office:value-type="float" office:value="34523" calcext:value-type="float">
            <text:p><text:s text:c="3"/>34,523</text:p>
          </table:table-cell>
          <table:table-cell table:style-name="ce25" office:value-type="float" office:value="69" calcext:value-type="float">
            <text:p><text:s text:c="3"/>69</text:p>
          </table:table-cell>
          <table:table-cell table:style-name="ce25" office:value-type="float" office:value="30" calcext:value-type="float">
            <text:p><text:s text:c="3"/>30</text:p>
          </table:table-cell>
          <table:table-cell table:style-name="ce29" office:value-type="float" office:value="-1577" calcext:value-type="float">
            <text:p>－1,577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1829" calcext:value-type="float">
            <text:p><text:s text:c="3"/>31,829</text:p>
          </table:table-cell>
          <table:table-cell table:style-name="ce25" office:value-type="float" office:value="1166" calcext:value-type="float">
            <text:p><text:s text:c="3"/>1,166</text:p>
          </table:table-cell>
          <table:table-cell table:style-name="ce25" office:value-type="float" office:value="2877" calcext:value-type="float">
            <text:p><text:s text:c="3"/>2,877</text:p>
          </table:table-cell>
          <table:table-cell table:style-name="ce25" office:value-type="float" office:value="2185" calcext:value-type="float">
            <text:p><text:s text:c="3"/>2,185</text:p>
          </table:table-cell>
          <table:table-cell table:style-name="ce25" office:value-type="float" office:value="1563" calcext:value-type="float">
            <text:p><text:s text:c="3"/>1,563</text:p>
          </table:table-cell>
          <table:table-cell table:style-name="ce25" office:value-type="float" office:value="1162" calcext:value-type="float">
            <text:p><text:s text:c="3"/>1,162</text:p>
          </table:table-cell>
          <table:table-cell table:style-name="ce25" office:value-type="float" office:value="695" calcext:value-type="float">
            <text:p><text:s text:c="3"/>695</text:p>
          </table:table-cell>
          <table:table-cell table:style-name="ce25" office:value-type="float" office:value="1090" calcext:value-type="float">
            <text:p><text:s text:c="3"/>1,090</text:p>
          </table:table-cell>
          <table:table-cell table:style-name="ce25" office:value-type="float" office:value="2997" calcext:value-type="float">
            <text:p><text:s text:c="3"/>2,997</text:p>
          </table:table-cell>
          <table:table-cell table:style-name="ce25" office:value-type="float" office:value="272" calcext:value-type="float">
            <text:p><text:s text:c="3"/>272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610" calcext:value-type="float">
            <text:p><text:s text:c="3"/>1,610</text:p>
          </table:table-cell>
          <table:table-cell table:style-name="ce25" office:value-type="float" office:value="15825" calcext:value-type="float">
            <text:p><text:s text:c="3"/>15,825</text:p>
          </table:table-cell>
          <table:table-cell table:style-name="ce25" office:value-type="float" office:value="384" calcext:value-type="float">
            <text:p><text:s text:c="3"/>384</text:p>
          </table:table-cell>
          <table:table-cell table:style-name="ce25" office:value-type="float" office:value="3" calcext:value-type="float">
            <text:p><text:s text:c="3"/>3</text:p>
          </table:table-cell>
          <table:table-cell table:style-name="ce25" office:value-type="float" office:value="32527" calcext:value-type="float">
            <text:p><text:s text:c="3"/>32,527</text:p>
          </table:table-cell>
          <table:table-cell table:style-name="ce25" office:value-type="float" office:value="2210" calcext:value-type="float">
            <text:p><text:s text:c="3"/>2,210</text:p>
          </table:table-cell>
          <table:table-cell table:style-name="ce25" office:value-type="float" office:value="2719" calcext:value-type="float">
            <text:p><text:s text:c="3"/>2,719</text:p>
          </table:table-cell>
          <table:table-cell table:style-name="ce25" office:value-type="float" office:value="1907" calcext:value-type="float">
            <text:p><text:s text:c="3"/>1,907</text:p>
          </table:table-cell>
          <table:table-cell table:style-name="ce25" office:value-type="float" office:value="1574" calcext:value-type="float">
            <text:p><text:s text:c="3"/>1,574</text:p>
          </table:table-cell>
          <table:table-cell table:style-name="ce25" office:value-type="float" office:value="1358" calcext:value-type="float">
            <text:p><text:s text:c="3"/>1,358</text:p>
          </table:table-cell>
          <table:table-cell table:style-name="ce25" office:value-type="float" office:value="729" calcext:value-type="float">
            <text:p><text:s text:c="3"/>729</text:p>
          </table:table-cell>
          <table:table-cell table:style-name="ce25" office:value-type="float" office:value="964" calcext:value-type="float">
            <text:p><text:s text:c="3"/>964</text:p>
          </table:table-cell>
          <table:table-cell table:style-name="ce25" office:value-type="float" office:value="3416" calcext:value-type="float">
            <text:p><text:s text:c="3"/>3,416</text:p>
          </table:table-cell>
          <table:table-cell table:style-name="ce25" office:value-type="float" office:value="174" calcext:value-type="float">
            <text:p><text:s text:c="3"/>174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610" calcext:value-type="float">
            <text:p><text:s text:c="3"/>1,610</text:p>
          </table:table-cell>
          <table:table-cell table:style-name="ce25" office:value-type="float" office:value="15825" calcext:value-type="float">
            <text:p><text:s text:c="3"/>15,825</text:p>
          </table:table-cell>
          <table:table-cell table:style-name="ce25" office:value-type="float" office:value="32" calcext:value-type="float">
            <text:p><text:s text:c="3"/>32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43" office:value-type="float" office:value="-698" calcext:value-type="float">
            <text:p>－698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37583" calcext:value-type="float">
            <text:p><text:s text:c="3"/>37,583</text:p>
          </table:table-cell>
          <table:table-cell table:style-name="ce25" office:value-type="float" office:value="1402" calcext:value-type="float">
            <text:p><text:s text:c="3"/>1,402</text:p>
          </table:table-cell>
          <table:table-cell table:style-name="ce25" office:value-type="float" office:value="3282" calcext:value-type="float">
            <text:p><text:s text:c="3"/>3,282</text:p>
          </table:table-cell>
          <table:table-cell table:style-name="ce25" office:value-type="float" office:value="2607" calcext:value-type="float">
            <text:p><text:s text:c="3"/>2,607</text:p>
          </table:table-cell>
          <table:table-cell table:style-name="ce25" office:value-type="float" office:value="1861" calcext:value-type="float">
            <text:p><text:s text:c="3"/>1,861</text:p>
          </table:table-cell>
          <table:table-cell table:style-name="ce25" office:value-type="float" office:value="1443" calcext:value-type="float">
            <text:p><text:s text:c="3"/>1,443</text:p>
          </table:table-cell>
          <table:table-cell table:style-name="ce25" office:value-type="float" office:value="821" calcext:value-type="float">
            <text:p><text:s text:c="3"/>821</text:p>
          </table:table-cell>
          <table:table-cell table:style-name="ce25" office:value-type="float" office:value="1294" calcext:value-type="float">
            <text:p><text:s text:c="3"/>1,294</text:p>
          </table:table-cell>
          <table:table-cell table:style-name="ce25" office:value-type="float" office:value="3334" calcext:value-type="float">
            <text:p><text:s text:c="3"/>3,334</text:p>
          </table:table-cell>
          <table:table-cell table:style-name="ce25" office:value-type="float" office:value="214" calcext:value-type="float">
            <text:p><text:s text:c="3"/>214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971" calcext:value-type="float">
            <text:p><text:s text:c="3"/>1,971</text:p>
          </table:table-cell>
          <table:table-cell table:style-name="ce25" office:value-type="float" office:value="18698" calcext:value-type="float">
            <text:p><text:s text:c="3"/>18,698</text:p>
          </table:table-cell>
          <table:table-cell table:style-name="ce25" office:value-type="float" office:value="645" calcext:value-type="float">
            <text:p><text:s text:c="3"/>645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25" office:value-type="float" office:value="38462" calcext:value-type="float">
            <text:p><text:s text:c="3"/>38,462</text:p>
          </table:table-cell>
          <table:table-cell table:style-name="ce25" office:value-type="float" office:value="2879" calcext:value-type="float">
            <text:p><text:s text:c="3"/>2,879</text:p>
          </table:table-cell>
          <table:table-cell table:style-name="ce25" office:value-type="float" office:value="3197" calcext:value-type="float">
            <text:p><text:s text:c="3"/>3,197</text:p>
          </table:table-cell>
          <table:table-cell table:style-name="ce25" office:value-type="float" office:value="2257" calcext:value-type="float">
            <text:p><text:s text:c="3"/>2,257</text:p>
          </table:table-cell>
          <table:table-cell table:style-name="ce25" office:value-type="float" office:value="1828" calcext:value-type="float">
            <text:p><text:s text:c="3"/>1,828</text:p>
          </table:table-cell>
          <table:table-cell table:style-name="ce25" office:value-type="float" office:value="1568" calcext:value-type="float">
            <text:p><text:s text:c="3"/>1,568</text:p>
          </table:table-cell>
          <table:table-cell table:style-name="ce25" office:value-type="float" office:value="813" calcext:value-type="float">
            <text:p><text:s text:c="3"/>813</text:p>
          </table:table-cell>
          <table:table-cell table:style-name="ce25" office:value-type="float" office:value="1128" calcext:value-type="float">
            <text:p><text:s text:c="3"/>1,128</text:p>
          </table:table-cell>
          <table:table-cell table:style-name="ce25" office:value-type="float" office:value="3930" calcext:value-type="float">
            <text:p><text:s text:c="3"/>3,930</text:p>
          </table:table-cell>
          <table:table-cell table:style-name="ce25" office:value-type="float" office:value="135" calcext:value-type="float">
            <text:p><text:s text:c="3"/>135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971" calcext:value-type="float">
            <text:p><text:s text:c="3"/>1,971</text:p>
          </table:table-cell>
          <table:table-cell table:style-name="ce25" office:value-type="float" office:value="18698" calcext:value-type="float">
            <text:p><text:s text:c="3"/>18,698</text:p>
          </table:table-cell>
          <table:table-cell table:style-name="ce25" office:value-type="float" office:value="37" calcext:value-type="float">
            <text:p><text:s text:c="3"/>37</text:p>
          </table:table-cell>
          <table:table-cell table:style-name="ce25" office:value-type="float" office:value="21" calcext:value-type="float">
            <text:p><text:s text:c="3"/>21</text:p>
          </table:table-cell>
          <table:table-cell table:style-name="ce44" office:value-type="float" office:value="-879" calcext:value-type="float">
            <text:p>－879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1281" calcext:value-type="float">
            <text:p>11,281</text:p>
          </table:table-cell>
          <table:table-cell table:style-name="ce26" office:value-type="float" office:value="555" calcext:value-type="float">
            <text:p>55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911" calcext:value-type="float">
            <text:p>2,911</text:p>
          </table:table-cell>
          <table:table-cell table:style-name="ce26" office:value-type="float" office:value="934" calcext:value-type="float">
            <text:p>934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1286" calcext:value-type="float">
            <text:p>1,286</text:p>
          </table:table-cell>
          <table:table-cell table:style-name="ce26" office:value-type="float" office:value="114" calcext:value-type="float">
            <text:p>11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564" calcext:value-type="float">
            <text:p>4,564</text:p>
          </table:table-cell>
          <table:table-cell table:style-name="ce26" office:value-type="float" office:value="243" calcext:value-type="float">
            <text:p>243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1869" calcext:value-type="float">
            <text:p>11,869</text:p>
          </table:table-cell>
          <table:table-cell table:style-name="ce26" office:value-type="float" office:value="1120" calcext:value-type="float">
            <text:p>1,12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429" calcext:value-type="float">
            <text:p>2,429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338" calcext:value-type="float">
            <text:p>338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1627" calcext:value-type="float">
            <text:p>1,627</text:p>
          </table:table-cell>
          <table:table-cell table:style-name="ce26" office:value-type="float" office:value="63" calcext:value-type="float">
            <text:p>6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564" calcext:value-type="float">
            <text:p>4,564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8" calcext:value-type="float">
            <text:p>8</text:p>
          </table:table-cell>
          <table:table-cell table:style-name="ce45" office:value-type="float" office:value="-588" calcext:value-type="float">
            <text:p><text:s/>－588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161" calcext:value-type="float">
            <text:p>5,161</text:p>
          </table:table-cell>
          <table:table-cell table:style-name="ce27" office:value-type="float" office:value="252" calcext:value-type="float">
            <text:p>25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30" calcext:value-type="float">
            <text:p>1,330</text:p>
          </table:table-cell>
          <table:table-cell table:style-name="ce27" office:value-type="float" office:value="413" calcext:value-type="float">
            <text:p>413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621" calcext:value-type="float">
            <text:p>621</text:p>
          </table:table-cell>
          <table:table-cell table:style-name="ce27" office:value-type="float" office:value="63" calcext:value-type="float">
            <text:p>6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91" calcext:value-type="float">
            <text:p>2,091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443" calcext:value-type="float">
            <text:p>5,443</text:p>
          </table:table-cell>
          <table:table-cell table:style-name="ce27" office:value-type="float" office:value="467" calcext:value-type="float">
            <text:p>46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23" calcext:value-type="float">
            <text:p>1,123</text:p>
          </table:table-cell>
          <table:table-cell table:style-name="ce27" office:value-type="float" office:value="598" calcext:value-type="float">
            <text:p>598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782" calcext:value-type="float">
            <text:p>782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91" calcext:value-type="float">
            <text:p>2,091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282" calcext:value-type="float">
            <text:p><text:s/>－282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120" calcext:value-type="float">
            <text:p>6,120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81" calcext:value-type="float">
            <text:p>1,581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51" calcext:value-type="float">
            <text:p>5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73" calcext:value-type="float">
            <text:p>2,473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426" calcext:value-type="float">
            <text:p>6,426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06" calcext:value-type="float">
            <text:p>1,306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73" calcext:value-type="float">
            <text:p>2,47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6" calcext:value-type="float">
            <text:p>6</text:p>
          </table:table-cell>
          <table:table-cell table:style-name="ce46" office:value-type="float" office:value="-306" calcext:value-type="float">
            <text:p><text:s/>－306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406" calcext:value-type="float">
            <text:p>8,406</text:p>
          </table:table-cell>
          <table:table-cell table:style-name="ce26" office:value-type="float" office:value="715" calcext:value-type="float">
            <text:p>715</text:p>
          </table:table-cell>
          <table:table-cell table:style-name="ce26" office:value-type="float" office:value="2429" calcext:value-type="float">
            <text:p>2,42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56" calcext:value-type="float">
            <text:p>356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792" calcext:value-type="float">
            <text:p>792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319" calcext:value-type="float">
            <text:p>3,319</text:p>
          </table:table-cell>
          <table:table-cell table:style-name="ce26" office:value-type="float" office:value="206" calcext:value-type="float">
            <text:p>20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9483" calcext:value-type="float">
            <text:p>9,483</text:p>
          </table:table-cell>
          <table:table-cell table:style-name="ce26" office:value-type="float" office:value="1348" calcext:value-type="float">
            <text:p>1,348</text:p>
          </table:table-cell>
          <table:table-cell table:style-name="ce26" office:value-type="float" office:value="2911" calcext:value-type="float">
            <text:p>2,91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13" calcext:value-type="float">
            <text:p>513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839" calcext:value-type="float">
            <text:p>839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319" calcext:value-type="float">
            <text:p>3,319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-1077" calcext:value-type="float">
            <text:p><text:s/>－1,077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838" calcext:value-type="float">
            <text:p>3,838</text:p>
          </table:table-cell>
          <table:table-cell table:style-name="ce27" office:value-type="float" office:value="301" calcext:value-type="float">
            <text:p>301</text:p>
          </table:table-cell>
          <table:table-cell table:style-name="ce27" office:value-type="float" office:value="1123" calcext:value-type="float">
            <text:p>1,12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354" calcext:value-type="float">
            <text:p>354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37" calcext:value-type="float">
            <text:p>1,537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300" calcext:value-type="float">
            <text:p>4,300</text:p>
          </table:table-cell>
          <table:table-cell table:style-name="ce27" office:value-type="float" office:value="562" calcext:value-type="float">
            <text:p>562</text:p>
          </table:table-cell>
          <table:table-cell table:style-name="ce27" office:value-type="float" office:value="1330" calcext:value-type="float">
            <text:p>1,33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386" calcext:value-type="float">
            <text:p>386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37" calcext:value-type="float">
            <text:p>1,53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462" calcext:value-type="float">
            <text:p><text:s/>－462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568" calcext:value-type="float">
            <text:p>4,568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1306" calcext:value-type="float">
            <text:p>1,30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82" calcext:value-type="float">
            <text:p>1,782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183" calcext:value-type="float">
            <text:p>5,183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1581" calcext:value-type="float">
            <text:p>1,58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82" calcext:value-type="float">
            <text:p>1,78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-615" calcext:value-type="float">
            <text:p><text:s/>－615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7095" calcext:value-type="float">
            <text:p>7,095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513" calcext:value-type="float">
            <text:p>51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3" calcext:value-type="float">
            <text:p>213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199" calcext:value-type="float">
            <text:p>199</text:p>
          </table:table-cell>
          <table:table-cell table:style-name="ce26" office:value-type="float" office:value="964" calcext:value-type="float">
            <text:p>964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326" calcext:value-type="float">
            <text:p>3,326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210" calcext:value-type="float">
            <text:p>7,210</text:p>
          </table:table-cell>
          <table:table-cell table:style-name="ce26" office:value-type="float" office:value="455" calcext:value-type="float">
            <text:p>455</text:p>
          </table:table-cell>
          <table:table-cell table:style-name="ce26" office:value-type="float" office:value="934" calcext:value-type="float">
            <text:p>934</text:p>
          </table:table-cell>
          <table:table-cell table:style-name="ce26" office:value-type="float" office:value="356" calcext:value-type="float">
            <text:p>35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21" calcext:value-type="float">
            <text:p>221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624" calcext:value-type="float">
            <text:p>1,624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326" calcext:value-type="float">
            <text:p>3,32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-115" calcext:value-type="float">
            <text:p><text:s/>－115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221" calcext:value-type="float">
            <text:p>3,221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598" calcext:value-type="float">
            <text:p>598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489" calcext:value-type="float">
            <text:p>489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91" calcext:value-type="float">
            <text:p>1,491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265" calcext:value-type="float">
            <text:p>3,265</text:p>
          </table:table-cell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413" calcext:value-type="float">
            <text:p>413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734" calcext:value-type="float">
            <text:p>734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91" calcext:value-type="float">
            <text:p>1,49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44" calcext:value-type="float">
            <text:p><text:s/>－44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874" calcext:value-type="float">
            <text:p>3,874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35" calcext:value-type="float">
            <text:p>1,83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945" calcext:value-type="float">
            <text:p>3,945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35" calcext:value-type="float">
            <text:p>1,83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-71" calcext:value-type="float">
            <text:p><text:s/>－71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8901" calcext:value-type="float">
            <text:p>8,901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float" office:value="338" calcext:value-type="float">
            <text:p>338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221" calcext:value-type="float">
            <text:p>22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1689" calcext:value-type="float">
            <text:p>1,689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578" calcext:value-type="float">
            <text:p>5,578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8774" calcext:value-type="float">
            <text:p>8,774</text:p>
          </table:table-cell>
          <table:table-cell table:style-name="ce26" office:value-type="float" office:value="579" calcext:value-type="float">
            <text:p>579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213" calcext:value-type="float">
            <text:p>21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1534" calcext:value-type="float">
            <text:p>1,534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578" calcext:value-type="float">
            <text:p>5,578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7" calcext:value-type="float">
            <text:p>7</text:p>
          </table:table-cell>
          <table:table-cell table:style-name="ce45" office:value-type="float" office:value="127" calcext:value-type="float">
            <text:p>127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084" calcext:value-type="float">
            <text:p>4,084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769" calcext:value-type="float">
            <text:p>769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55" calcext:value-type="float">
            <text:p>2,55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976" calcext:value-type="float">
            <text:p>3,976</text:p>
          </table:table-cell>
          <table:table-cell table:style-name="ce27" office:value-type="float" office:value="254" calcext:value-type="float">
            <text:p>254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698" calcext:value-type="float">
            <text:p>698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55" calcext:value-type="float">
            <text:p>2,55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108" calcext:value-type="float">
            <text:p>108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817" calcext:value-type="float">
            <text:p>4,817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920" calcext:value-type="float">
            <text:p>920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23" calcext:value-type="float">
            <text:p>3,023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798" calcext:value-type="float">
            <text:p>4,798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23" calcext:value-type="float">
            <text:p>3,02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46" office:value-type="float" office:value="19" calcext:value-type="float">
            <text:p>19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4850" calcext:value-type="float">
            <text:p>4,850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53" calcext:value-type="float">
            <text:p>453</text:p>
          </table:table-cell>
          <table:table-cell table:style-name="ce26" office:value-type="float" office:value="551" calcext:value-type="float">
            <text:p>551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135" calcext:value-type="float">
            <text:p>3,135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871" calcext:value-type="float">
            <text:p>4,871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98" calcext:value-type="float">
            <text:p>398</text:p>
          </table:table-cell>
          <table:table-cell table:style-name="ce26" office:value-type="float" office:value="531" calcext:value-type="float">
            <text:p>531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135" calcext:value-type="float">
            <text:p>3,13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21" calcext:value-type="float">
            <text:p><text:s/>－21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219" calcext:value-type="float">
            <text:p>2,219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254" calcext:value-type="float">
            <text:p>254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28" calcext:value-type="float">
            <text:p>1,428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227" calcext:value-type="float">
            <text:p>2,227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28" calcext:value-type="float">
            <text:p>1,428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-8" calcext:value-type="float">
            <text:p><text:s/>－8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2631" calcext:value-type="float">
            <text:p>2,63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07" calcext:value-type="float">
            <text:p>1,70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644" calcext:value-type="float">
            <text:p>2,644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07" calcext:value-type="float">
            <text:p>1,70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-13" calcext:value-type="float">
            <text:p><text:s/>－13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7914" calcext:value-type="float">
            <text:p>7,914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398" calcext:value-type="float">
            <text:p>39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61" calcext:value-type="float">
            <text:p>961</text:p>
          </table:table-cell>
          <table:table-cell table:style-name="ce26" office:value-type="float" office:value="68" calcext:value-type="float">
            <text:p>6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491" calcext:value-type="float">
            <text:p>5,491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8406" calcext:value-type="float">
            <text:p>8,406</text:p>
          </table:table-cell>
          <table:table-cell table:style-name="ce26" office:value-type="float" office:value="524" calcext:value-type="float">
            <text:p>524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199" calcext:value-type="float">
            <text:p>199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453" calcext:value-type="float">
            <text:p>45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60" calcext:value-type="float">
            <text:p>1,060</text:p>
          </table:table-cell>
          <table:table-cell table:style-name="ce26" office:value-type="float" office:value="49" calcext:value-type="float">
            <text:p>4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491" calcext:value-type="float">
            <text:p>5,491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-492" calcext:value-type="float">
            <text:p><text:s/>－492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682" calcext:value-type="float">
            <text:p>3,682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55" calcext:value-type="float">
            <text:p>455</text:p>
          </table:table-cell>
          <table:table-cell table:style-name="ce27" office:value-type="float" office:value="38" calcext:value-type="float">
            <text:p>3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62" calcext:value-type="float">
            <text:p>2,562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880" calcext:value-type="float">
            <text:p>3,880</text:p>
          </table:table-cell>
          <table:table-cell table:style-name="ce27" office:value-type="float" office:value="228" calcext:value-type="float">
            <text:p>228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97" calcext:value-type="float">
            <text:p>497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62" calcext:value-type="float">
            <text:p>2,56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198" calcext:value-type="float">
            <text:p><text:s/>－198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4232" calcext:value-type="float">
            <text:p>4,232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29" calcext:value-type="float">
            <text:p>2,929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526" calcext:value-type="float">
            <text:p>4,526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29" calcext:value-type="float">
            <text:p>2,92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-294" calcext:value-type="float">
            <text:p><text:s/>－294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0440" calcext:value-type="float">
            <text:p><text:s text:c="3"/>20,440</text:p>
          </table:table-cell>
          <table:table-cell table:style-name="ce29" office:value-type="float" office:value="406" calcext:value-type="float">
            <text:p><text:s text:c="3"/>406</text:p>
          </table:table-cell>
          <table:table-cell table:style-name="ce29" office:value-type="float" office:value="1627" calcext:value-type="float">
            <text:p><text:s text:c="3"/>1,627</text:p>
          </table:table-cell>
          <table:table-cell table:style-name="ce29" office:value-type="float" office:value="839" calcext:value-type="float">
            <text:p><text:s text:c="3"/>839</text:p>
          </table:table-cell>
          <table:table-cell table:style-name="ce29" office:value-type="float" office:value="1624" calcext:value-type="float">
            <text:p><text:s text:c="3"/>1,624</text:p>
          </table:table-cell>
          <table:table-cell table:style-name="ce29" office:value-type="float" office:value="1534" calcext:value-type="float">
            <text:p><text:s text:c="3"/>1,534</text:p>
          </table:table-cell>
          <table:table-cell table:style-name="ce29" office:value-type="float" office:value="531" calcext:value-type="float">
            <text:p><text:s text:c="3"/>531</text:p>
          </table:table-cell>
          <table:table-cell table:style-name="ce29" office:value-type="float" office:value="1060" calcext:value-type="float">
            <text:p><text:s text:c="3"/>1,060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31" calcext:value-type="float">
            <text:p><text:s text:c="3"/>131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578" calcext:value-type="float">
            <text:p><text:s text:c="3"/>3,578</text:p>
          </table:table-cell>
          <table:table-cell table:style-name="ce29" office:value-type="float" office:value="8905" calcext:value-type="float">
            <text:p><text:s text:c="3"/>8,905</text:p>
          </table:table-cell>
          <table:table-cell table:style-name="ce29" office:value-type="float" office:value="202" calcext:value-type="float">
            <text:p><text:s text:c="3"/>202</text:p>
          </table:table-cell>
          <table:table-cell table:style-name="ce29" office:value-type="float" office:value="3" calcext:value-type="float">
            <text:p><text:s text:c="3"/>3</text:p>
          </table:table-cell>
          <table:table-cell table:style-name="ce29" office:value-type="float" office:value="19676" calcext:value-type="float">
            <text:p><text:s text:c="3"/>19,676</text:p>
          </table:table-cell>
          <table:table-cell table:style-name="ce29" office:value-type="float" office:value="843" calcext:value-type="float">
            <text:p><text:s text:c="3"/>843</text:p>
          </table:table-cell>
          <table:table-cell table:style-name="ce29" office:value-type="float" office:value="1286" calcext:value-type="float">
            <text:p><text:s text:c="3"/>1,286</text:p>
          </table:table-cell>
          <table:table-cell table:style-name="ce29" office:value-type="float" office:value="792" calcext:value-type="float">
            <text:p><text:s text:c="3"/>792</text:p>
          </table:table-cell>
          <table:table-cell table:style-name="ce29" office:value-type="float" office:value="964" calcext:value-type="float">
            <text:p><text:s text:c="3"/>964</text:p>
          </table:table-cell>
          <table:table-cell table:style-name="ce29" office:value-type="float" office:value="1689" calcext:value-type="float">
            <text:p><text:s text:c="3"/>1,689</text:p>
          </table:table-cell>
          <table:table-cell table:style-name="ce29" office:value-type="float" office:value="551" calcext:value-type="float">
            <text:p><text:s text:c="3"/>551</text:p>
          </table:table-cell>
          <table:table-cell table:style-name="ce29" office:value-type="float" office:value="961" calcext:value-type="float">
            <text:p><text:s text:c="3"/>961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88" calcext:value-type="float">
            <text:p><text:s text:c="3"/>88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578" calcext:value-type="float">
            <text:p><text:s text:c="3"/>3,578</text:p>
          </table:table-cell>
          <table:table-cell table:style-name="ce29" office:value-type="float" office:value="8905" calcext:value-type="float">
            <text:p><text:s text:c="3"/>8,905</text:p>
          </table:table-cell>
          <table:table-cell table:style-name="ce29" office:value-type="float" office:value="12" calcext:value-type="float">
            <text:p><text:s text:c="3"/>12</text:p>
          </table:table-cell>
          <table:table-cell table:style-name="ce26" office:value-type="float" office:value="7" calcext:value-type="float">
            <text:p>7</text:p>
          </table:table-cell>
          <table:table-cell table:style-name="ce45" office:value-type="float" office:value="764" calcext:value-type="float">
            <text:p>764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9328" calcext:value-type="float">
            <text:p><text:s text:c="3"/>9,328</text:p>
          </table:table-cell>
          <table:table-cell table:style-name="ce30" office:value-type="float" office:value="203" calcext:value-type="float">
            <text:p><text:s text:c="3"/>203</text:p>
          </table:table-cell>
          <table:table-cell table:style-name="ce30" office:value-type="float" office:value="782" calcext:value-type="float">
            <text:p><text:s text:c="3"/>782</text:p>
          </table:table-cell>
          <table:table-cell table:style-name="ce30" office:value-type="float" office:value="386" calcext:value-type="float">
            <text:p><text:s text:c="3"/>386</text:p>
          </table:table-cell>
          <table:table-cell table:style-name="ce30" office:value-type="float" office:value="734" calcext:value-type="float">
            <text:p><text:s text:c="3"/>734</text:p>
          </table:table-cell>
          <table:table-cell table:style-name="ce30" office:value-type="float" office:value="698" calcext:value-type="float">
            <text:p><text:s text:c="3"/>698</text:p>
          </table:table-cell>
          <table:table-cell table:style-name="ce30" office:value-type="float" office:value="240" calcext:value-type="float">
            <text:p><text:s text:c="3"/>240</text:p>
          </table:table-cell>
          <table:table-cell table:style-name="ce30" office:value-type="float" office:value="497" calcext:value-type="float">
            <text:p><text:s text:c="3"/>49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79" calcext:value-type="float">
            <text:p><text:s text:c="3"/>7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607" calcext:value-type="float">
            <text:p><text:s text:c="3"/>1,607</text:p>
          </table:table-cell>
          <table:table-cell table:style-name="ce30" office:value-type="float" office:value="4047" calcext:value-type="float">
            <text:p><text:s text:c="3"/>4,047</text:p>
          </table:table-cell>
          <table:table-cell table:style-name="ce30" office:value-type="float" office:value="55" calcext:value-type="float">
            <text:p><text:s text:c="3"/>55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9044" calcext:value-type="float">
            <text:p><text:s text:c="3"/>9,044</text:p>
          </table:table-cell>
          <table:table-cell table:style-name="ce30" office:value-type="float" office:value="384" calcext:value-type="float">
            <text:p><text:s text:c="3"/>384</text:p>
          </table:table-cell>
          <table:table-cell table:style-name="ce30" office:value-type="float" office:value="621" calcext:value-type="float">
            <text:p><text:s text:c="3"/>621</text:p>
          </table:table-cell>
          <table:table-cell table:style-name="ce30" office:value-type="float" office:value="354" calcext:value-type="float">
            <text:p><text:s text:c="3"/>354</text:p>
          </table:table-cell>
          <table:table-cell table:style-name="ce30" office:value-type="float" office:value="489" calcext:value-type="float">
            <text:p><text:s text:c="3"/>489</text:p>
          </table:table-cell>
          <table:table-cell table:style-name="ce30" office:value-type="float" office:value="769" calcext:value-type="float">
            <text:p><text:s text:c="3"/>769</text:p>
          </table:table-cell>
          <table:table-cell table:style-name="ce30" office:value-type="float" office:value="254" calcext:value-type="float">
            <text:p><text:s text:c="3"/>254</text:p>
          </table:table-cell>
          <table:table-cell table:style-name="ce30" office:value-type="float" office:value="455" calcext:value-type="float">
            <text:p><text:s text:c="3"/>455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5" calcext:value-type="float">
            <text:p><text:s text:c="3"/>55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607" calcext:value-type="float">
            <text:p><text:s text:c="3"/>1,607</text:p>
          </table:table-cell>
          <table:table-cell table:style-name="ce30" office:value-type="float" office:value="4047" calcext:value-type="float">
            <text:p><text:s text:c="3"/>4,047</text:p>
          </table:table-cell>
          <table:table-cell table:style-name="ce30" office:value-type="float" office:value="7" calcext:value-type="float">
            <text:p><text:s text:c="3"/>7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284" calcext:value-type="float">
            <text:p>284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1112" calcext:value-type="float">
            <text:p><text:s text:c="3"/>11,112</text:p>
          </table:table-cell>
          <table:table-cell table:style-name="ce31" office:value-type="float" office:value="203" calcext:value-type="float">
            <text:p><text:s text:c="3"/>203</text:p>
          </table:table-cell>
          <table:table-cell table:style-name="ce31" office:value-type="float" office:value="845" calcext:value-type="float">
            <text:p><text:s text:c="3"/>845</text:p>
          </table:table-cell>
          <table:table-cell table:style-name="ce31" office:value-type="float" office:value="453" calcext:value-type="float">
            <text:p><text:s text:c="3"/>453</text:p>
          </table:table-cell>
          <table:table-cell table:style-name="ce31" office:value-type="float" office:value="890" calcext:value-type="float">
            <text:p><text:s text:c="3"/>890</text:p>
          </table:table-cell>
          <table:table-cell table:style-name="ce31" office:value-type="float" office:value="836" calcext:value-type="float">
            <text:p><text:s text:c="3"/>836</text:p>
          </table:table-cell>
          <table:table-cell table:style-name="ce31" office:value-type="float" office:value="291" calcext:value-type="float">
            <text:p><text:s text:c="3"/>291</text:p>
          </table:table-cell>
          <table:table-cell table:style-name="ce31" office:value-type="float" office:value="563" calcext:value-type="float">
            <text:p><text:s text:c="3"/>56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52" calcext:value-type="float">
            <text:p><text:s text:c="3"/>52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971" calcext:value-type="float">
            <text:p><text:s text:c="3"/>1,971</text:p>
          </table:table-cell>
          <table:table-cell table:style-name="ce31" office:value-type="float" office:value="4858" calcext:value-type="float">
            <text:p><text:s text:c="3"/>4,858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0632" calcext:value-type="float">
            <text:p><text:s text:c="3"/>10,632</text:p>
          </table:table-cell>
          <table:table-cell table:style-name="ce31" office:value-type="float" office:value="459" calcext:value-type="float">
            <text:p><text:s text:c="3"/>459</text:p>
          </table:table-cell>
          <table:table-cell table:style-name="ce31" office:value-type="float" office:value="665" calcext:value-type="float">
            <text:p><text:s text:c="3"/>665</text:p>
          </table:table-cell>
          <table:table-cell table:style-name="ce31" office:value-type="float" office:value="438" calcext:value-type="float">
            <text:p><text:s text:c="3"/>438</text:p>
          </table:table-cell>
          <table:table-cell table:style-name="ce31" office:value-type="float" office:value="475" calcext:value-type="float">
            <text:p><text:s text:c="3"/>475</text:p>
          </table:table-cell>
          <table:table-cell table:style-name="ce31" office:value-type="float" office:value="920" calcext:value-type="float">
            <text:p><text:s text:c="3"/>920</text:p>
          </table:table-cell>
          <table:table-cell table:style-name="ce31" office:value-type="float" office:value="297" calcext:value-type="float">
            <text:p><text:s text:c="3"/>297</text:p>
          </table:table-cell>
          <table:table-cell table:style-name="ce31" office:value-type="float" office:value="506" calcext:value-type="float">
            <text:p><text:s text:c="3"/>506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971" calcext:value-type="float">
            <text:p><text:s text:c="3"/>1,971</text:p>
          </table:table-cell>
          <table:table-cell table:style-name="ce31" office:value-type="float" office:value="4858" calcext:value-type="float">
            <text:p><text:s text:c="3"/>4,858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28" office:value-type="float" office:value="5" calcext:value-type="float">
            <text:p>5</text:p>
          </table:table-cell>
          <table:table-cell table:style-name="ce46" office:value-type="float" office:value="480" calcext:value-type="float">
            <text:p>480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75" calcext:value-type="float">
            <text:p>1,67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963" calcext:value-type="float">
            <text:p>96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19" calcext:value-type="float">
            <text:p>1,619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963" calcext:value-type="float">
            <text:p>96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56" calcext:value-type="float">
            <text:p>56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42" calcext:value-type="float">
            <text:p>44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52" calcext:value-type="float">
            <text:p>52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75" calcext:value-type="float">
            <text:p>87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521" calcext:value-type="float">
            <text:p>52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71" calcext:value-type="float">
            <text:p>87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21" calcext:value-type="float">
            <text:p>52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4" calcext:value-type="float">
            <text:p>4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118" calcext:value-type="float">
            <text:p>3,118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817" calcext:value-type="float">
            <text:p>817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93" calcext:value-type="float">
            <text:p>593</text:p>
          </table:table-cell>
          <table:table-cell table:style-name="ce32" office:value-type="float" office:value="1024" calcext:value-type="float">
            <text:p>1,02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74" calcext:value-type="float">
            <text:p>1,97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5" calcext:value-type="float">
            <text:p>415</text:p>
          </table:table-cell>
          <table:table-cell table:style-name="ce32" office:value-type="float" office:value="1024" calcext:value-type="float">
            <text:p>1,02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1144" calcext:value-type="float">
            <text:p>1,144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412" calcext:value-type="float">
            <text:p>1,41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542" calcext:value-type="float">
            <text:p>542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706" calcext:value-type="float">
            <text:p>1,70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61" calcext:value-type="float">
            <text:p>461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564" calcext:value-type="float">
            <text:p>56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104" calcext:value-type="float">
            <text:p>1,104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564" calcext:value-type="float">
            <text:p>56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48" office:value-type="float" office:value="602" calcext:value-type="float">
            <text:p>602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04" calcext:value-type="float">
            <text:p>1,20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53" calcext:value-type="float">
            <text:p>1,15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51" calcext:value-type="float">
            <text:p>51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49" calcext:value-type="float">
            <text:p>54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7" calcext:value-type="float">
            <text:p>52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67" calcext:value-type="float">
            <text:p>67</text:p>
          </table:table-cell>
          <table:table-cell table:number-columns-repeated="2"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22" calcext:value-type="float">
            <text:p>22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55" calcext:value-type="float">
            <text:p>65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26" calcext:value-type="float">
            <text:p>62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239" calcext:value-type="float">
            <text:p>23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9" calcext:value-type="float">
            <text:p>29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181" calcext:value-type="float">
            <text:p>2,181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1165" calcext:value-type="float">
            <text:p>1,16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24" calcext:value-type="float">
            <text:p>2,724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566" calcext:value-type="float">
            <text:p>566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1165" calcext:value-type="float">
            <text:p>1,16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543" calcext:value-type="float">
            <text:p><text:s/>－543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525" calcext:value-type="float">
            <text:p>52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525" calcext:value-type="float">
            <text:p>52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82" calcext:value-type="float">
            <text:p><text:s/>－282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19" calcext:value-type="float">
            <text:p>1,21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640" calcext:value-type="float">
            <text:p>64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80" calcext:value-type="float">
            <text:p>1,48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640" calcext:value-type="float">
            <text:p>64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261" calcext:value-type="float">
            <text:p><text:s/>－261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96" calcext:value-type="float">
            <text:p>1,49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584" calcext:value-type="float">
            <text:p>58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28" calcext:value-type="float">
            <text:p>1,328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584" calcext:value-type="float">
            <text:p>58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168" calcext:value-type="float">
            <text:p>168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3" calcext:value-type="float">
            <text:p>633</text:p>
          </table:table-cell>
          <table:table-cell table:number-columns-repeated="2" table:style-name="ce33" office:value-type="float" office:value="31" calcext:value-type="float">
            <text:p>31</text:p>
          </table:table-cell>
          <table:table-cell table:number-columns-repeated="2" table:style-name="ce33" office:value-type="float" office:value="16" calcext:value-type="float">
            <text:p>16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55" calcext:value-type="float">
            <text:p>55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08" calcext:value-type="float">
            <text:p>80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79" calcext:value-type="float">
            <text:p>179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95" calcext:value-type="float">
            <text:p>695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310" calcext:value-type="float">
            <text:p>31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13" calcext:value-type="float">
            <text:p>113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51" calcext:value-type="float">
            <text:p>1,751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797" calcext:value-type="float">
            <text:p>79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02" calcext:value-type="float">
            <text:p>1,80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797" calcext:value-type="float">
            <text:p>79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51" calcext:value-type="float">
            <text:p><text:s/>－51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50" calcext:value-type="float">
            <text:p><text:s/>－50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67" calcext:value-type="float">
            <text:p>96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450" calcext:value-type="float">
            <text:p>45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968" calcext:value-type="float">
            <text:p>96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450" calcext:value-type="float">
            <text:p>45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49" office:value-type="float" office:value="-1" calcext:value-type="float">
            <text:p><text:s/>－1</text:p>
          </table:table-cell>
          <table:table-cell table:style-name="ce51" table:number-columns-repeated="1635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63" calcext:value-type="float">
            <text:p>1,16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356" calcext:value-type="float">
            <text:p>35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13" calcext:value-type="float">
            <text:p>1,21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3" calcext:value-type="float">
            <text:p>473</text:p>
          </table:table-cell>
          <table:table-cell table:style-name="ce32" office:value-type="float" office:value="356" calcext:value-type="float">
            <text:p>35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50" calcext:value-type="float">
            <text:p><text:s/>－50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0" calcext:value-type="float">
            <text:p>54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58" calcext:value-type="float">
            <text:p>15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" calcext:value-type="float">
            <text:p><text:s/>－1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198" calcext:value-type="float">
            <text:p>19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9" calcext:value-type="float">
            <text:p><text:s/>－49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278" calcext:value-type="float">
            <text:p>2,27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239" calcext:value-type="float">
            <text:p>1,23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25" calcext:value-type="float">
            <text:p>2,325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423" calcext:value-type="float">
            <text:p>4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1239" calcext:value-type="float">
            <text:p>1,239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47" office:value-type="float" office:value="-47" calcext:value-type="float">
            <text:p><text:s/>－47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54" calcext:value-type="float">
            <text:p>1,05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73" calcext:value-type="float">
            <text:p>1,07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19" calcext:value-type="float">
            <text:p><text:s/>－19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24" calcext:value-type="float">
            <text:p>1,22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671" calcext:value-type="float">
            <text:p>67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52" calcext:value-type="float">
            <text:p>1,252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671" calcext:value-type="float">
            <text:p>67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28" calcext:value-type="float">
            <text:p><text:s/>－28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03" calcext:value-type="float">
            <text:p>70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52" calcext:value-type="float">
            <text:p>65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51" calcext:value-type="float">
            <text:p>51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26" calcext:value-type="float">
            <text:p>12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7" calcext:value-type="float">
            <text:p>17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73" calcext:value-type="float">
            <text:p>37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34" calcext:value-type="float">
            <text:p>34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74" calcext:value-type="float">
            <text:p>1,07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623" calcext:value-type="float">
            <text:p>62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88" calcext:value-type="float">
            <text:p>1,088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623" calcext:value-type="float">
            <text:p>62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4" calcext:value-type="float">
            <text:p><text:s/>－14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296" calcext:value-type="float">
            <text:p>29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296" calcext:value-type="float">
            <text:p>29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" calcext:value-type="float">
            <text:p><text:s/>－7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74" calcext:value-type="float">
            <text:p>57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81" calcext:value-type="float">
            <text:p>58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327" calcext:value-type="float">
            <text:p>32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7" calcext:value-type="float">
            <text:p><text:s/>－7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03" calcext:value-type="float">
            <text:p>40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9" calcext:value-type="float">
            <text:p>10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09" calcext:value-type="float">
            <text:p>10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2" calcext:value-type="float">
            <text:p>42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3" calcext:value-type="float">
            <text:p>23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56" calcext:value-type="float">
            <text:p>5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56" calcext:value-type="float">
            <text:p>5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9" calcext:value-type="float">
            <text:p>19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10" calcext:value-type="float">
            <text:p>1,21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591" calcext:value-type="float">
            <text:p>59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80" calcext:value-type="float">
            <text:p>1,280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591" calcext:value-type="float">
            <text:p>59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70" calcext:value-type="float">
            <text:p><text:s/>－70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25" calcext:value-type="float">
            <text:p>52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40" calcext:value-type="float">
            <text:p><text:s/>－40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85" calcext:value-type="float">
            <text:p>68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15" calcext:value-type="float">
            <text:p>71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30" calcext:value-type="float">
            <text:p><text:s/>－30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28" calcext:value-type="float">
            <text:p>1,32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503" calcext:value-type="float">
            <text:p>50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25" calcext:value-type="float">
            <text:p>1,32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503" calcext:value-type="float">
            <text:p>50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221" calcext:value-type="float">
            <text:p>22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8" office:value-type="float" office:value="-8" calcext:value-type="float">
            <text:p><text:s/>－8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34" calcext:value-type="float">
            <text:p>73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82" calcext:value-type="float">
            <text:p>28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23" calcext:value-type="float">
            <text:p>723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282" calcext:value-type="float">
            <text:p>28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1" calcext:value-type="float">
            <text:p>11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56" calcext:value-type="float">
            <text:p>85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32" calcext:value-type="float">
            <text:p>83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238" calcext:value-type="float">
            <text:p>23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4" calcext:value-type="float">
            <text:p>24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15" calcext:value-type="float">
            <text:p>11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0" calcext:value-type="float">
            <text:p><text:s/>－20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77" calcext:value-type="float">
            <text:p>47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33" calcext:value-type="float">
            <text:p>43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23" calcext:value-type="float">
            <text:p>12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44" calcext:value-type="float">
            <text:p>44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525" calcext:value-type="float">
            <text:p>52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88" calcext:value-type="float">
            <text:p>8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131" calcext:value-type="float">
            <text:p>13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05" calcext:value-type="float">
            <text:p>20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-175" calcext:value-type="float">
            <text:p><text:s/>－175</text:p>
          </table:table-cell>
          <table:table-cell table:style-name="ce51" table:number-columns-repeated="1635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96" calcext:value-type="float">
            <text:p>29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92" calcext:value-type="float">
            <text:p>39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3" calcext:value-type="float">
            <text:p>63</text:p>
          </table:table-cell>
          <table:table-cell table:number-columns-repeated="2" table:style-name="ce27" office:value-type="float" office:value="26" calcext:value-type="float">
            <text:p>26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79" calcext:value-type="float">
            <text:p>7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14" calcext:value-type="float">
            <text:p>11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96" calcext:value-type="float">
            <text:p><text:s/>－96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91" calcext:value-type="float">
            <text:p>9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79" calcext:value-type="float">
            <text:p><text:s/>－79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63" calcext:value-type="float">
            <text:p>6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03" calcext:value-type="float">
            <text:p>60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5" calcext:value-type="float">
            <text:p>10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82" calcext:value-type="float">
            <text:p>18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97" calcext:value-type="float">
            <text:p><text:s/>－197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61" calcext:value-type="float">
            <text:p>6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5" calcext:value-type="float">
            <text:p>9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04" calcext:value-type="float">
            <text:p><text:s/>－104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4" calcext:value-type="float">
            <text:p>4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87" calcext:value-type="float">
            <text:p>8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93" calcext:value-type="float">
            <text:p><text:s/>－93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2" table:style-name="ce32" office:value-type="float" office:value="11" calcext:value-type="float">
            <text:p>11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2" calcext:value-type="float">
            <text:p>22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8" calcext:value-type="float">
            <text:p>8</text:p>
          </table:table-cell>
          <table:table-cell table:style-name="ce51" table:number-columns-repeated="1635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4" calcext:value-type="float">
            <text:p>14</text:p>
          </table:table-cell>
          <table:table-cell table:style-name="ce51" table:number-columns-repeated="1635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224"/>
        </table:table-row>
        <table:table-row table:style-name="ro6" table:number-rows-repeated="4">
          <table:table-cell table:number-columns-repeated="257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11-遷徙'.$A$1" table:cell-range-address="$'11-遷徙'.$1:.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1P1" style:volatile="true">
      <number:text> －</number:text>
      <number:fill-character> </number:fill-character>
      <number:number number:decimal-places="0" number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24.2.7.2$Linux_X86_64 LibreOffice_project/420$Build-2</meta:generator>
  </office:meta>
</office:document-meta>
</file>