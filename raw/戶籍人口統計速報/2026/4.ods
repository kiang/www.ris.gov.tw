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4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2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8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4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6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7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8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1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23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4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2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6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3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4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5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7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9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97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8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9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3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7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8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9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0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1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2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3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7.1pt" style:use-optimal-row-height="false" fo:break-before="page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table:tab-color="#FFFFFF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14">
            <text:p>民 國 115 年 4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15">
            <text:p>民 國 115 年 4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293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401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401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401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404">
            <text:p><text:span text:style-name="T6">結</text:span><text:span text:style-name="T15"><text:s text:c="7"/></text:span><text:span text:style-name="T6">婚　</text:span><text:span text:style-name="T15"><text:s/>(</text:span><text:span text:style-name="T6">對</text:span><text:span text:style-name="T15"><text:s text:c="3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6" table:number-rows-spanned="1" table:style-name="ce404">
            <text:p><text:span text:style-name="T6">離</text:span><text:span text:style-name="T15"><text:s text:c="5"/></text:span><text:span text:style-name="T6">婚</text:span><text:span text:style-name="T15"><text:s text:c="2"/>/<text:s text:c="2"/></text:span><text:span text:style-name="T6">終</text:span><text:span text:style-name="T15"><text:s text:c="4"/></text:span><text:span text:style-name="T6">止</text:span><text:span text:style-name="T15"><text:s text:c="2"/>(</text:span><text:span text:style-name="T6">對</text:span><text:span text:style-name="T15"><text:s text:c="2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1" table:number-rows-spanned="4" table:style-name="ce402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402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400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00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401">
            <text:p><text:span text:style-name="T6">計</text:span></text:p>
          </table:table-cell>
          <table:table-cell office:value-type="string" table:number-columns-spanned="1" table:number-rows-spanned="3" table:style-name="ce401">
            <text:p><text:span text:style-name="T6">男</text:span></text:p>
          </table:table-cell>
          <table:table-cell office:value-type="string" table:number-columns-spanned="1" table:number-rows-spanned="3" table:style-name="ce401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401">
            <text:p><text:span text:style-name="T6">計</text:span></text:p>
          </table:table-cell>
          <table:table-cell office:value-type="string" table:number-columns-spanned="1" table:number-rows-spanned="3" table:style-name="ce401">
            <text:p><text:span text:style-name="T6">男</text:span></text:p>
          </table:table-cell>
          <table:table-cell office:value-type="string" table:number-columns-spanned="1" table:number-rows-spanned="3" table:style-name="ce401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401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02">
            <text:p><text:span text:style-name="T6">不同性別</text:span></text:p>
          </table:table-cell>
          <table:table-cell office:value-type="string" table:number-columns-spanned="3" table:number-rows-spanned="1" table:style-name="ce401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401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02">
            <text:p><text:span text:style-name="T6">不同性別</text:span></text:p>
          </table:table-cell>
          <table:table-cell office:value-type="string" table:number-columns-spanned="3" table:number-rows-spanned="1" table:style-name="ce401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401">
            <text:p><text:span text:style-name="T6">計</text:span></text:p>
          </table:table-cell>
          <table:table-cell office:value-type="string" table:number-columns-spanned="1" table:number-rows-spanned="2" table:style-name="ce401">
            <text:p><text:span text:style-name="T6">男</text:span></text:p>
          </table:table-cell>
          <table:table-cell office:value-type="string" table:number-columns-spanned="1" table:number-rows-spanned="2" table:style-name="ce403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401">
            <text:p><text:span text:style-name="T6">計</text:span></text:p>
          </table:table-cell>
          <table:table-cell office:value-type="string" table:number-columns-spanned="1" table:number-rows-spanned="2" table:style-name="ce401">
            <text:p><text:span text:style-name="T6">男</text:span></text:p>
          </table:table-cell>
          <table:table-cell office:value-type="string" table:number-columns-spanned="1" table:number-rows-spanned="2" table:style-name="ce403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295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5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5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5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10<text:span text:style-name="T7">年</text:span></text:p>
          </table:table-cell>
          <table:covered-table-cell/>
          <table:table-cell office:value-type="float" office:value="9006580" table:style-name="ce119">
            <text:p>9,006,580</text:p>
          </table:table-cell>
          <table:table-cell office:value-type="float" office:value="23375314" table:style-name="ce119">
            <text:p>23,375,314</text:p>
          </table:table-cell>
          <table:table-cell office:value-type="float" office:value="11578696" table:style-name="ce119">
            <text:p>11,578,696</text:p>
          </table:table-cell>
          <table:table-cell office:value-type="float" office:value="11796618" table:style-name="ce119">
            <text:p>11,796,618</text:p>
          </table:table-cell>
          <table:table-cell office:value-type="float" office:value="153820" table:style-name="ce119">
            <text:p>153,820</text:p>
          </table:table-cell>
          <table:table-cell office:value-type="float" office:value="79513" table:style-name="ce119">
            <text:p>79,513</text:p>
          </table:table-cell>
          <table:table-cell office:value-type="float" office:value="74307" table:style-name="ce119">
            <text:p>74,307</text:p>
          </table:table-cell>
          <table:table-cell office:value-type="float" office:value="6.5543803283368716" table:style-name="ce120">
            <text:p>6.55</text:p>
          </table:table-cell>
          <table:table-cell office:value-type="float" office:value="183732" table:style-name="ce119">
            <text:p>183,732</text:p>
          </table:table-cell>
          <table:table-cell office:value-type="float" office:value="106877" table:style-name="ce119">
            <text:p>106,877</text:p>
          </table:table-cell>
          <table:table-cell office:value-type="float" office:value="76855" table:style-name="ce119">
            <text:p>76,855</text:p>
          </table:table-cell>
          <table:table-cell office:value-type="float" office:value="7.8289520640098162" table:style-name="ce120">
            <text:p>7.83</text:p>
          </table:table-cell>
          <table:table-cell office:value-type="float" office:value="-29912" table:style-name="ce119">
            <text:p>–29,912</text:p>
          </table:table-cell>
          <table:table-cell office:value-type="float" office:value="-1.2745717356729458" table:style-name="ce121">
            <text:p>–1.27</text:p>
          </table:table-cell>
          <table:table-cell office:value-type="float" office:value="114606" table:style-name="ce119">
            <text:p>114,606</text:p>
          </table:table-cell>
          <table:table-cell office:value-type="float" office:value="112750" table:style-name="ce119">
            <text:p>112,750</text:p>
          </table:table-cell>
          <table:table-cell office:value-type="float" office:value="1856" table:style-name="ce119">
            <text:p>1,856</text:p>
          </table:table-cell>
          <table:table-cell office:value-type="float" office:value="535" table:style-name="ce119">
            <text:p>535</text:p>
          </table:table-cell>
          <table:table-cell office:value-type="float" office:value="1321" table:style-name="ce119">
            <text:p>1,321</text:p>
          </table:table-cell>
          <table:table-cell office:value-type="float" office:value="4.8834437128421246" table:style-name="ce120">
            <text:p>4.88</text:p>
          </table:table-cell>
          <table:table-cell office:value-type="float" office:value="47887" table:style-name="ce119">
            <text:p>47,887</text:p>
          </table:table-cell>
          <table:table-cell office:value-type="float" office:value="47379" table:style-name="ce119">
            <text:p>47,379</text:p>
          </table:table-cell>
          <table:table-cell office:value-type="float" office:value="508" table:style-name="ce119">
            <text:p>508</text:p>
          </table:table-cell>
          <table:table-cell office:value-type="float" office:value="126" table:style-name="ce119">
            <text:p>126</text:p>
          </table:table-cell>
          <table:table-cell office:value-type="float" office:value="382" table:style-name="ce119">
            <text:p>382</text:p>
          </table:table-cell>
          <table:table-cell office:value-type="float" office:value="2.040499354980287" table:style-name="ce120">
            <text:p>2.04</text:p>
          </table:table-cell>
          <table:table-cell office:value-type="float" office:value="920703" table:style-name="ce119">
            <text:p>920,703</text:p>
          </table:table-cell>
          <table:table-cell office:value-type="float" office:value="1076713" table:style-name="ce119">
            <text:p>1,076,713</text:p>
          </table:table-cell>
          <table:table-cell office:value-type="float" office:value="580758" table:style-name="ce119">
            <text:p>580,758</text:p>
          </table:table-cell>
          <table:table-cell table:number-columns-repeated="16353" table:style-name="ce122"/>
        </table:table-row>
        <table:table-row table:style-name="ro3">
          <table:table-cell office:value-type="string" table:number-columns-spanned="2" table:number-rows-spanned="1" table:style-name="ce327">
            <text:p>111年</text:p>
          </table:table-cell>
          <table:covered-table-cell/>
          <table:table-cell office:value-type="float" office:value="9089450" table:style-name="ce126">
            <text:p><text:s text:c="3"/>9,089,450</text:p>
          </table:table-cell>
          <table:table-cell office:value-type="float" office:value="23264640" table:style-name="ce126">
            <text:p><text:s text:c="3"/>23,264,640</text:p>
          </table:table-cell>
          <table:table-cell office:value-type="float" office:value="11499136" table:style-name="ce126">
            <text:p><text:s text:c="3"/>11,499,136</text:p>
          </table:table-cell>
          <table:table-cell office:value-type="float" office:value="11765504" table:style-name="ce126">
            <text:p><text:s text:c="3"/>11,765,504</text:p>
          </table:table-cell>
          <table:table-cell office:value-type="float" office:value="138986" table:style-name="ce126">
            <text:p><text:s text:c="3"/>138,986</text:p>
          </table:table-cell>
          <table:table-cell office:value-type="float" office:value="72097" table:style-name="ce126">
            <text:p><text:s text:c="3"/>72,097</text:p>
          </table:table-cell>
          <table:table-cell office:value-type="float" office:value="66889" table:style-name="ce126">
            <text:p><text:s text:c="3"/>66,889</text:p>
          </table:table-cell>
          <table:table-cell office:value-type="float" office:value="5.9599544201951797" table:style-name="ce127">
            <text:p>5.96</text:p>
          </table:table-cell>
          <table:table-cell office:value-type="float" office:value="207230" table:style-name="ce126">
            <text:p><text:s text:c="3"/>207,230</text:p>
          </table:table-cell>
          <table:table-cell office:value-type="float" office:value="119920" table:style-name="ce126">
            <text:p><text:s text:c="3"/>119,920</text:p>
          </table:table-cell>
          <table:table-cell office:value-type="float" office:value="87310" table:style-name="ce126">
            <text:p><text:s text:c="3"/>87,310</text:p>
          </table:table-cell>
          <table:table-cell office:value-type="float" office:value="8.8863724007961107" table:style-name="ce127">
            <text:p>8.89</text:p>
          </table:table-cell>
          <table:table-cell office:value-type="float" office:value="-68244" table:style-name="ce126">
            <text:p>－ <text:s/>68,244</text:p>
          </table:table-cell>
          <table:table-cell office:value-type="float" office:value="-2.9264179806009198" table:style-name="ce128">
            <text:p>－ <text:s/>2.93</text:p>
          </table:table-cell>
          <table:table-cell office:value-type="float" office:value="124997" table:style-name="ce126">
            <text:p><text:s text:c="3"/>124,997</text:p>
          </table:table-cell>
          <table:table-cell office:value-type="float" office:value="122520" table:style-name="ce126">
            <text:p><text:s text:c="3"/>122,520</text:p>
          </table:table-cell>
          <table:table-cell office:value-type="float" office:value="2477" table:style-name="ce126">
            <text:p><text:s text:c="3"/>2,477</text:p>
          </table:table-cell>
          <table:table-cell office:value-type="float" office:value="685" table:style-name="ce126">
            <text:p><text:s text:c="3"/>685</text:p>
          </table:table-cell>
          <table:table-cell office:value-type="float" office:value="1792" table:style-name="ce126">
            <text:p><text:s text:c="3"/>1,792</text:p>
          </table:table-cell>
          <table:table-cell office:value-type="float" office:value="5.3600824734947201" table:style-name="ce127">
            <text:p>5.36</text:p>
          </table:table-cell>
          <table:table-cell office:value-type="float" office:value="50609" table:style-name="ce126">
            <text:p><text:s text:c="3"/>50,609</text:p>
          </table:table-cell>
          <table:table-cell office:value-type="float" office:value="49997" table:style-name="ce126">
            <text:p><text:s text:c="3"/>49,997</text:p>
          </table:table-cell>
          <table:table-cell office:value-type="float" office:value="612" table:style-name="ce126">
            <text:p><text:s text:c="3"/>612</text:p>
          </table:table-cell>
          <table:table-cell office:value-type="float" office:value="158" table:style-name="ce126">
            <text:p><text:s text:c="3"/>158</text:p>
          </table:table-cell>
          <table:table-cell office:value-type="float" office:value="454" table:style-name="ce126">
            <text:p><text:s text:c="3"/>454</text:p>
          </table:table-cell>
          <table:table-cell office:value-type="float" office:value="2.1701993959942598" table:style-name="ce127">
            <text:p>2.17</text:p>
          </table:table-cell>
          <table:table-cell office:value-type="float" office:value="1086712" table:style-name="ce126">
            <text:p><text:s text:c="3"/>1,086,712</text:p>
          </table:table-cell>
          <table:table-cell office:value-type="float" office:value="1129142" table:style-name="ce126">
            <text:p><text:s text:c="3"/>1,129,142</text:p>
          </table:table-cell>
          <table:table-cell office:value-type="float" office:value="584125" table:style-name="ce126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8">
            <text:p>112年</text:p>
          </table:table-cell>
          <table:covered-table-cell/>
          <table:table-cell office:value-type="float" office:value="9240823" table:style-name="ce129">
            <text:p><text:s text:c="3"/>9,240,823</text:p>
          </table:table-cell>
          <table:table-cell office:value-type="float" office:value="23420442" table:style-name="ce129">
            <text:p><text:s text:c="3"/>23,420,442</text:p>
          </table:table-cell>
          <table:table-cell office:value-type="float" office:value="11553267" table:style-name="ce129">
            <text:p><text:s text:c="3"/>11,553,267</text:p>
          </table:table-cell>
          <table:table-cell office:value-type="float" office:value="11867175" table:style-name="ce129">
            <text:p><text:s text:c="3"/>11,867,175</text:p>
          </table:table-cell>
          <table:table-cell office:value-type="float" office:value="135571" table:style-name="ce129">
            <text:p><text:s text:c="3"/>135,571</text:p>
          </table:table-cell>
          <table:table-cell office:value-type="float" office:value="70227" table:style-name="ce129">
            <text:p><text:s text:c="3"/>70,227</text:p>
          </table:table-cell>
          <table:table-cell office:value-type="float" office:value="65344" table:style-name="ce129">
            <text:p><text:s text:c="3"/>65,344</text:p>
          </table:table-cell>
          <table:table-cell office:value-type="float" office:value="5.8078938364079598" table:style-name="ce130">
            <text:p>5.81</text:p>
          </table:table-cell>
          <table:table-cell office:value-type="float" office:value="205368" table:style-name="ce129">
            <text:p><text:s text:c="3"/>205,368</text:p>
          </table:table-cell>
          <table:table-cell office:value-type="float" office:value="118854" table:style-name="ce129">
            <text:p><text:s text:c="3"/>118,854</text:p>
          </table:table-cell>
          <table:table-cell office:value-type="float" office:value="86514" table:style-name="ce129">
            <text:p><text:s text:c="3"/>86,514</text:p>
          </table:table-cell>
          <table:table-cell office:value-type="float" office:value="8.7980138923178899" table:style-name="ce130">
            <text:p>8.80</text:p>
          </table:table-cell>
          <table:table-cell office:value-type="float" office:value="-69797" table:style-name="ce129">
            <text:p>－ <text:s/>69,797</text:p>
          </table:table-cell>
          <table:table-cell office:value-type="float" office:value="-2.9901200559099399" table:style-name="ce131">
            <text:p>－ <text:s/>2.99</text:p>
          </table:table-cell>
          <table:table-cell office:value-type="float" office:value="125192" table:style-name="ce129">
            <text:p><text:s text:c="3"/>125,192</text:p>
          </table:table-cell>
          <table:table-cell office:value-type="float" office:value="121993" table:style-name="ce129">
            <text:p><text:s text:c="3"/>121,993</text:p>
          </table:table-cell>
          <table:table-cell office:value-type="float" office:value="3199" table:style-name="ce129">
            <text:p><text:s text:c="3"/>3,199</text:p>
          </table:table-cell>
          <table:table-cell office:value-type="float" office:value="1052" table:style-name="ce129">
            <text:p><text:s text:c="3"/>1,052</text:p>
          </table:table-cell>
          <table:table-cell office:value-type="float" office:value="2147" table:style-name="ce129">
            <text:p><text:s text:c="3"/>2,147</text:p>
          </table:table-cell>
          <table:table-cell office:value-type="float" office:value="5.3632550115259496" table:style-name="ce130">
            <text:p>5.36</text:p>
          </table:table-cell>
          <table:table-cell office:value-type="float" office:value="53085" table:style-name="ce129">
            <text:p><text:s text:c="3"/>53,085</text:p>
          </table:table-cell>
          <table:table-cell office:value-type="float" office:value="52304" table:style-name="ce129">
            <text:p><text:s text:c="3"/>52,304</text:p>
          </table:table-cell>
          <table:table-cell office:value-type="float" office:value="781" table:style-name="ce129">
            <text:p><text:s text:c="3"/>781</text:p>
          </table:table-cell>
          <table:table-cell office:value-type="float" office:value="204" table:style-name="ce129">
            <text:p><text:s text:c="3"/>204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2.27417400702006" table:style-name="ce130">
            <text:p>2.27</text:p>
          </table:table-cell>
          <table:table-cell office:value-type="float" office:value="1126548" table:style-name="ce129">
            <text:p><text:s text:c="3"/>1,126,548</text:p>
          </table:table-cell>
          <table:table-cell office:value-type="float" office:value="900949" table:style-name="ce129">
            <text:p><text:s text:c="3"/>900,949</text:p>
          </table:table-cell>
          <table:table-cell office:value-type="float" office:value="589038" table:style-name="ce129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9">
            <text:p>113年</text:p>
          </table:table-cell>
          <table:covered-table-cell/>
          <table:table-cell office:value-type="float" office:value="9487480" table:style-name="ce132">
            <text:p><text:s text:c="3"/>9,487,480</text:p>
          </table:table-cell>
          <table:table-cell office:value-type="float" office:value="23400220" table:style-name="ce132">
            <text:p><text:s text:c="3"/>23,400,220</text:p>
          </table:table-cell>
          <table:table-cell office:value-type="float" office:value="11526193" table:style-name="ce132">
            <text:p><text:s text:c="3"/>11,526,193</text:p>
          </table:table-cell>
          <table:table-cell office:value-type="float" office:value="11874027" table:style-name="ce132">
            <text:p><text:s text:c="3"/>11,874,027</text:p>
          </table:table-cell>
          <table:table-cell office:value-type="float" office:value="134856" table:style-name="ce132">
            <text:p><text:s text:c="3"/>134,856</text:p>
          </table:table-cell>
          <table:table-cell office:value-type="float" office:value="69947" table:style-name="ce132">
            <text:p><text:s text:c="3"/>69,947</text:p>
          </table:table-cell>
          <table:table-cell office:value-type="float" office:value="64909" table:style-name="ce132">
            <text:p><text:s text:c="3"/>64,909</text:p>
          </table:table-cell>
          <table:table-cell office:value-type="float" office:value="5.7605336720783704" table:style-name="ce133">
            <text:p>5.76</text:p>
          </table:table-cell>
          <table:table-cell office:value-type="float" office:value="202107" table:style-name="ce132">
            <text:p><text:s text:c="3"/>202,107</text:p>
          </table:table-cell>
          <table:table-cell office:value-type="float" office:value="116572" table:style-name="ce132">
            <text:p><text:s text:c="3"/>116,572</text:p>
          </table:table-cell>
          <table:table-cell office:value-type="float" office:value="85535" table:style-name="ce132">
            <text:p><text:s text:c="3"/>85,535</text:p>
          </table:table-cell>
          <table:table-cell office:value-type="float" office:value="8.6332397435986703" table:style-name="ce133">
            <text:p>8.63</text:p>
          </table:table-cell>
          <table:table-cell office:value-type="float" office:value="-67251" table:style-name="ce132">
            <text:p>－ <text:s/>67,251</text:p>
          </table:table-cell>
          <table:table-cell office:value-type="float" office:value="-2.8727060715202999" table:style-name="ce134">
            <text:p>－ <text:s/>2.87</text:p>
          </table:table-cell>
          <table:table-cell office:value-type="float" office:value="123061" table:style-name="ce132">
            <text:p><text:s text:c="3"/>123,061</text:p>
          </table:table-cell>
          <table:table-cell office:value-type="float" office:value="119856" table:style-name="ce132">
            <text:p><text:s text:c="3"/>119,856</text:p>
          </table:table-cell>
          <table:table-cell office:value-type="float" office:value="3205" table:style-name="ce132">
            <text:p><text:s text:c="3"/>3,205</text:p>
          </table:table-cell>
          <table:table-cell office:value-type="float" office:value="1024" table:style-name="ce132">
            <text:p><text:s text:c="3"/>1,024</text:p>
          </table:table-cell>
          <table:table-cell office:value-type="float" office:value="2181" table:style-name="ce132">
            <text:p><text:s text:c="3"/>2,181</text:p>
          </table:table-cell>
          <table:table-cell office:value-type="float" office:value="5.25669628507175" table:style-name="ce133">
            <text:p>5.26</text:p>
          </table:table-cell>
          <table:table-cell office:value-type="float" office:value="53469" table:style-name="ce132">
            <text:p><text:s text:c="3"/>53,469</text:p>
          </table:table-cell>
          <table:table-cell office:value-type="float" office:value="52543" table:style-name="ce132">
            <text:p><text:s text:c="3"/>52,543</text:p>
          </table:table-cell>
          <table:table-cell office:value-type="float" office:value="926" table:style-name="ce132">
            <text:p><text:s text:c="3"/>926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687" table:style-name="ce132">
            <text:p><text:s text:c="3"/>687</text:p>
          </table:table-cell>
          <table:table-cell office:value-type="float" office:value="2.2839916274571301" table:style-name="ce133">
            <text:p>2.28</text:p>
          </table:table-cell>
          <table:table-cell office:value-type="float" office:value="1047924" table:style-name="ce132">
            <text:p><text:s text:c="3"/>1,047,924</text:p>
          </table:table-cell>
          <table:table-cell office:value-type="float" office:value="1000895" table:style-name="ce132">
            <text:p><text:s text:c="3"/>1,000,895</text:p>
          </table:table-cell>
          <table:table-cell office:value-type="float" office:value="611674" table:style-name="ce132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0">
            <text:p>114年</text:p>
          </table:table-cell>
          <table:covered-table-cell/>
          <table:table-cell office:value-type="float" office:value="9851532" table:style-name="ce135">
            <text:p><text:s text:c="3"/>9,851,532</text:p>
          </table:table-cell>
          <table:table-cell office:value-type="float" office:value="23299132" table:style-name="ce135">
            <text:p><text:s text:c="3"/>23,299,132</text:p>
          </table:table-cell>
          <table:table-cell office:value-type="float" office:value="11462401" table:style-name="ce135">
            <text:p><text:s text:c="3"/>11,462,401</text:p>
          </table:table-cell>
          <table:table-cell office:value-type="float" office:value="11836731" table:style-name="ce135">
            <text:p><text:s text:c="3"/>11,836,731</text:p>
          </table:table-cell>
          <table:table-cell office:value-type="float" office:value="107812" table:style-name="ce135">
            <text:p><text:s text:c="3"/>107,812</text:p>
          </table:table-cell>
          <table:table-cell office:value-type="float" office:value="55797" table:style-name="ce135">
            <text:p><text:s text:c="3"/>55,797</text:p>
          </table:table-cell>
          <table:table-cell office:value-type="float" office:value="52015" table:style-name="ce135">
            <text:p><text:s text:c="3"/>52,015</text:p>
          </table:table-cell>
          <table:table-cell office:value-type="float" office:value="4.6172803425623501" table:style-name="ce136">
            <text:p>4.62</text:p>
          </table:table-cell>
          <table:table-cell office:value-type="float" office:value="200268" table:style-name="ce135">
            <text:p><text:s text:c="3"/>200,268</text:p>
          </table:table-cell>
          <table:table-cell office:value-type="float" office:value="115151" table:style-name="ce135">
            <text:p><text:s text:c="3"/>115,151</text:p>
          </table:table-cell>
          <table:table-cell office:value-type="float" office:value="85117" table:style-name="ce135">
            <text:p><text:s text:c="3"/>85,117</text:p>
          </table:table-cell>
          <table:table-cell office:value-type="float" office:value="8.5769070200374493" table:style-name="ce136">
            <text:p>8.58</text:p>
          </table:table-cell>
          <table:table-cell office:value-type="float" office:value="-92456" table:style-name="ce135">
            <text:p>－ <text:s/>92,456</text:p>
          </table:table-cell>
          <table:table-cell office:value-type="float" office:value="-3.9596266774751001" table:style-name="ce137">
            <text:p>－ <text:s/>3.96</text:p>
          </table:table-cell>
          <table:table-cell office:value-type="float" office:value="104376" table:style-name="ce135">
            <text:p><text:s text:c="3"/>104,376</text:p>
          </table:table-cell>
          <table:table-cell office:value-type="float" office:value="101071" table:style-name="ce135">
            <text:p><text:s text:c="3"/>101,071</text:p>
          </table:table-cell>
          <table:table-cell office:value-type="float" office:value="3305" table:style-name="ce135">
            <text:p><text:s text:c="3"/>3,305</text:p>
          </table:table-cell>
          <table:table-cell office:value-type="float" office:value="1043" table:style-name="ce135">
            <text:p><text:s text:c="3"/>1,043</text:p>
          </table:table-cell>
          <table:table-cell office:value-type="float" office:value="2262" table:style-name="ce135">
            <text:p><text:s text:c="3"/>2,262</text:p>
          </table:table-cell>
          <table:table-cell office:value-type="float" office:value="4.4701262664201398" table:style-name="ce136">
            <text:p>4.47</text:p>
          </table:table-cell>
          <table:table-cell office:value-type="float" office:value="52101" table:style-name="ce135">
            <text:p><text:s text:c="3"/>52,101</text:p>
          </table:table-cell>
          <table:table-cell office:value-type="float" office:value="51203" table:style-name="ce135">
            <text:p><text:s text:c="3"/>51,203</text:p>
          </table:table-cell>
          <table:table-cell office:value-type="float" office:value="898" table:style-name="ce135">
            <text:p><text:s text:c="3"/>898</text:p>
          </table:table-cell>
          <table:table-cell office:value-type="float" office:value="214" table:style-name="ce135">
            <text:p><text:s text:c="3"/>214</text:p>
          </table:table-cell>
          <table:table-cell office:value-type="float" office:value="684" table:style-name="ce135">
            <text:p><text:s text:c="3"/>684</text:p>
          </table:table-cell>
          <table:table-cell office:value-type="float" office:value="2.2313371714451198" table:style-name="ce136">
            <text:p>2.23</text:p>
          </table:table-cell>
          <table:table-cell office:value-type="float" office:value="1057397" table:style-name="ce135">
            <text:p><text:s text:c="3"/>1,057,397</text:p>
          </table:table-cell>
          <table:table-cell office:value-type="float" office:value="1066029" table:style-name="ce135">
            <text:p><text:s text:c="3"/>1,066,029</text:p>
          </table:table-cell>
          <table:table-cell office:value-type="float" office:value="629456" table:style-name="ce135">
            <text:p><text:s text:c="3"/>629,456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1">
            <text:p>1月</text:p>
          </table:table-cell>
          <table:covered-table-cell/>
          <table:table-cell office:value-type="float" office:value="9508590" table:style-name="ce138">
            <text:p><text:s text:c="3"/>9,508,590</text:p>
          </table:table-cell>
          <table:table-cell office:value-type="float" office:value="23396049" table:style-name="ce138">
            <text:p><text:s text:c="3"/>23,396,049</text:p>
          </table:table-cell>
          <table:table-cell office:value-type="float" office:value="11523083" table:style-name="ce138">
            <text:p><text:s text:c="3"/>11,523,083</text:p>
          </table:table-cell>
          <table:table-cell office:value-type="float" office:value="11872966" table:style-name="ce138">
            <text:p><text:s text:c="3"/>11,872,966</text:p>
          </table:table-cell>
          <table:table-cell office:value-type="float" office:value="9495" table:style-name="ce138">
            <text:p><text:s text:c="3"/>9,495</text:p>
          </table:table-cell>
          <table:table-cell office:value-type="float" office:value="4933" table:style-name="ce138">
            <text:p><text:s text:c="3"/>4,933</text:p>
          </table:table-cell>
          <table:table-cell office:value-type="float" office:value="4562" table:style-name="ce138">
            <text:p><text:s text:c="3"/>4,562</text:p>
          </table:table-cell>
          <table:table-cell office:value-type="float" office:value="4.7779863707482999" table:style-name="ce139">
            <text:p>4.78</text:p>
          </table:table-cell>
          <table:table-cell office:value-type="float" office:value="15018" table:style-name="ce138">
            <text:p><text:s text:c="3"/>15,018</text:p>
          </table:table-cell>
          <table:table-cell office:value-type="float" office:value="8644" table:style-name="ce138">
            <text:p><text:s text:c="3"/>8,644</text:p>
          </table:table-cell>
          <table:table-cell office:value-type="float" office:value="6374" table:style-name="ce138">
            <text:p><text:s text:c="3"/>6,374</text:p>
          </table:table-cell>
          <table:table-cell office:value-type="float" office:value="7.5572195172088401" table:style-name="ce139">
            <text:p>7.56</text:p>
          </table:table-cell>
          <table:table-cell office:value-type="float" office:value="-5523" table:style-name="ce138">
            <text:p>－ <text:s/>5,523</text:p>
          </table:table-cell>
          <table:table-cell office:value-type="float" office:value="-2.7792331464605402" table:style-name="ce140">
            <text:p>－ <text:s/>2.78</text:p>
          </table:table-cell>
          <table:table-cell office:value-type="float" office:value="9199" table:style-name="ce138">
            <text:p><text:s text:c="3"/>9,199</text:p>
          </table:table-cell>
          <table:table-cell office:value-type="float" office:value="8982" table:style-name="ce138">
            <text:p><text:s text:c="3"/>8,982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146" table:style-name="ce138">
            <text:p><text:s text:c="3"/>146</text:p>
          </table:table-cell>
          <table:table-cell office:value-type="float" office:value="4.6290359794116496" table:style-name="ce139">
            <text:p>4.63</text:p>
          </table:table-cell>
          <table:table-cell office:value-type="float" office:value="3375" table:style-name="ce138">
            <text:p><text:s text:c="3"/>3,375</text:p>
          </table:table-cell>
          <table:table-cell office:value-type="float" office:value="3312" table:style-name="ce138">
            <text:p><text:s text:c="3"/>3,312</text:p>
          </table:table-cell>
          <table:table-cell office:value-type="float" office:value="63" table:style-name="ce138">
            <text:p><text:s text:c="3"/>63</text:p>
          </table:table-cell>
          <table:table-cell office:value-type="float" office:value="16" table:style-name="ce138">
            <text:p><text:s text:c="3"/>16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1.6983363877067399" table:style-name="ce139">
            <text:p>1.70</text:p>
          </table:table-cell>
          <table:table-cell office:value-type="float" office:value="70495" table:style-name="ce138">
            <text:p><text:s text:c="3"/>70,495</text:p>
          </table:table-cell>
          <table:table-cell office:value-type="float" office:value="69143" table:style-name="ce138">
            <text:p><text:s text:c="3"/>69,143</text:p>
          </table:table-cell>
          <table:table-cell office:value-type="float" office:value="612669" table:style-name="ce138">
            <text:p><text:s text:c="3"/>612,669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2">
            <text:p>2月</text:p>
          </table:table-cell>
          <table:covered-table-cell/>
          <table:table-cell office:value-type="float" office:value="9587516" table:style-name="ce141">
            <text:p><text:s text:c="3"/>9,587,516</text:p>
          </table:table-cell>
          <table:table-cell office:value-type="float" office:value="23384614" table:style-name="ce141">
            <text:p><text:s text:c="3"/>23,384,614</text:p>
          </table:table-cell>
          <table:table-cell office:value-type="float" office:value="11515767" table:style-name="ce141">
            <text:p><text:s text:c="3"/>11,515,767</text:p>
          </table:table-cell>
          <table:table-cell office:value-type="float" office:value="11868847" table:style-name="ce141">
            <text:p><text:s text:c="3"/>11,868,847</text:p>
          </table:table-cell>
          <table:table-cell office:value-type="float" office:value="10407" table:style-name="ce141">
            <text:p><text:s text:c="3"/>10,407</text:p>
          </table:table-cell>
          <table:table-cell office:value-type="float" office:value="5356" table:style-name="ce141">
            <text:p><text:s text:c="3"/>5,356</text:p>
          </table:table-cell>
          <table:table-cell office:value-type="float" office:value="5051" table:style-name="ce141">
            <text:p><text:s text:c="3"/>5,051</text:p>
          </table:table-cell>
          <table:table-cell office:value-type="float" office:value="5.7999468101351397" table:style-name="ce142">
            <text:p>5.80</text:p>
          </table:table-cell>
          <table:table-cell office:value-type="float" office:value="21888" table:style-name="ce141">
            <text:p><text:s text:c="3"/>21,888</text:p>
          </table:table-cell>
          <table:table-cell office:value-type="float" office:value="12714" table:style-name="ce141">
            <text:p><text:s text:c="3"/>12,714</text:p>
          </table:table-cell>
          <table:table-cell office:value-type="float" office:value="9174" table:style-name="ce141">
            <text:p><text:s text:c="3"/>9,174</text:p>
          </table:table-cell>
          <table:table-cell office:value-type="float" office:value="12.198446793527239" table:style-name="ce142">
            <text:p>12.20</text:p>
          </table:table-cell>
          <table:table-cell office:value-type="float" office:value="-11481" table:style-name="ce141">
            <text:p>－ <text:s/>11,481</text:p>
          </table:table-cell>
          <table:table-cell office:value-type="float" office:value="-6.3984999833921004" table:style-name="ce143">
            <text:p>－ <text:s/>6.40</text:p>
          </table:table-cell>
          <table:table-cell office:value-type="float" office:value="8221" table:style-name="ce141">
            <text:p><text:s text:c="3"/>8,221</text:p>
          </table:table-cell>
          <table:table-cell office:value-type="float" office:value="7968" table:style-name="ce141">
            <text:p><text:s text:c="3"/>7,968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4.5816626046046904" table:style-name="ce142">
            <text:p>4.58</text:p>
          </table:table-cell>
          <table:table-cell office:value-type="float" office:value="4226" table:style-name="ce141">
            <text:p><text:s text:c="3"/>4,226</text:p>
          </table:table-cell>
          <table:table-cell office:value-type="float" office:value="4163" table:style-name="ce141">
            <text:p><text:s text:c="3"/>4,163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49" table:style-name="ce141">
            <text:p><text:s text:c="3"/>49</text:p>
          </table:table-cell>
          <table:table-cell office:value-type="float" office:value="2.35520084747104" table:style-name="ce142">
            <text:p>2.36</text:p>
          </table:table-cell>
          <table:table-cell office:value-type="float" office:value="122992" table:style-name="ce141">
            <text:p><text:s text:c="3"/>122,992</text:p>
          </table:table-cell>
          <table:table-cell office:value-type="float" office:value="122946" table:style-name="ce141">
            <text:p><text:s text:c="3"/>122,946</text:p>
          </table:table-cell>
          <table:table-cell office:value-type="float" office:value="614152" table:style-name="ce141">
            <text:p><text:s text:c="3"/>614,152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3">
            <text:p>3月</text:p>
          </table:table-cell>
          <table:covered-table-cell/>
          <table:table-cell office:value-type="float" office:value="9714774" table:style-name="ce144">
            <text:p><text:s text:c="3"/>9,714,774</text:p>
          </table:table-cell>
          <table:table-cell office:value-type="float" office:value="23374742" table:style-name="ce144">
            <text:p><text:s text:c="3"/>23,374,742</text:p>
          </table:table-cell>
          <table:table-cell office:value-type="float" office:value="11509611" table:style-name="ce144">
            <text:p><text:s text:c="3"/>11,509,611</text:p>
          </table:table-cell>
          <table:table-cell office:value-type="float" office:value="11865131" table:style-name="ce144">
            <text:p><text:s text:c="3"/>11,865,131</text:p>
          </table:table-cell>
          <table:table-cell office:value-type="float" office:value="9388" table:style-name="ce144">
            <text:p><text:s text:c="3"/>9,388</text:p>
          </table:table-cell>
          <table:table-cell office:value-type="float" office:value="4839" table:style-name="ce144">
            <text:p><text:s text:c="3"/>4,839</text:p>
          </table:table-cell>
          <table:table-cell office:value-type="float" office:value="4549" table:style-name="ce144">
            <text:p><text:s text:c="3"/>4,549</text:p>
          </table:table-cell>
          <table:table-cell office:value-type="float" office:value="4.7278721731008497" table:style-name="ce145">
            <text:p>4.73</text:p>
          </table:table-cell>
          <table:table-cell office:value-type="float" office:value="18633" table:style-name="ce144">
            <text:p><text:s text:c="3"/>18,633</text:p>
          </table:table-cell>
          <table:table-cell office:value-type="float" office:value="10701" table:style-name="ce144">
            <text:p><text:s text:c="3"/>10,701</text:p>
          </table:table-cell>
          <table:table-cell office:value-type="float" office:value="7932" table:style-name="ce144">
            <text:p><text:s text:c="3"/>7,932</text:p>
          </table:table-cell>
          <table:table-cell office:value-type="float" office:value="9.38372839810269" table:style-name="ce145">
            <text:p>9.38</text:p>
          </table:table-cell>
          <table:table-cell office:value-type="float" office:value="-9245" table:style-name="ce144">
            <text:p>－ <text:s/>9,245</text:p>
          </table:table-cell>
          <table:table-cell office:value-type="float" office:value="-4.65585622500185" table:style-name="ce146">
            <text:p>－ <text:s/>4.66</text:p>
          </table:table-cell>
          <table:table-cell office:value-type="float" office:value="10675" table:style-name="ce144">
            <text:p><text:s text:c="3"/>10,675</text:p>
          </table:table-cell>
          <table:table-cell office:value-type="float" office:value="10368" table:style-name="ce144">
            <text:p><text:s text:c="3"/>10,368</text:p>
          </table:table-cell>
          <table:table-cell office:value-type="float" office:value="307" table:style-name="ce144">
            <text:p><text:s text:c="3"/>307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217" table:style-name="ce144">
            <text:p><text:s text:c="3"/>217</text:p>
          </table:table-cell>
          <table:table-cell office:value-type="float" office:value="5.3760157059918603" table:style-name="ce145">
            <text:p>5.38</text:p>
          </table:table-cell>
          <table:table-cell office:value-type="float" office:value="4427" table:style-name="ce144">
            <text:p><text:s text:c="3"/>4,427</text:p>
          </table:table-cell>
          <table:table-cell office:value-type="float" office:value="4356" table:style-name="ce144">
            <text:p><text:s text:c="3"/>4,356</text:p>
          </table:table-cell>
          <table:table-cell office:value-type="float" office:value="71" table:style-name="ce144">
            <text:p><text:s text:c="3"/>71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55" table:style-name="ce144">
            <text:p><text:s text:c="3"/>55</text:p>
          </table:table-cell>
          <table:table-cell office:value-type="float" office:value="2.2294727428970398" table:style-name="ce145">
            <text:p>2.23</text:p>
          </table:table-cell>
          <table:table-cell office:value-type="float" office:value="172334" table:style-name="ce144">
            <text:p><text:s text:c="3"/>172,334</text:p>
          </table:table-cell>
          <table:table-cell office:value-type="float" office:value="172961" table:style-name="ce144">
            <text:p><text:s text:c="3"/>172,961</text:p>
          </table:table-cell>
          <table:table-cell office:value-type="float" office:value="615474" table:style-name="ce144">
            <text:p><text:s text:c="3"/>615,4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4">
            <text:p>4月</text:p>
          </table:table-cell>
          <table:covered-table-cell/>
          <table:table-cell office:value-type="float" office:value="9730761" table:style-name="ce147">
            <text:p><text:s text:c="3"/>9,730,761</text:p>
          </table:table-cell>
          <table:table-cell office:value-type="float" office:value="23365274" table:style-name="ce147">
            <text:p><text:s text:c="3"/>23,365,274</text:p>
          </table:table-cell>
          <table:table-cell office:value-type="float" office:value="11503830" table:style-name="ce147">
            <text:p><text:s text:c="3"/>11,503,830</text:p>
          </table:table-cell>
          <table:table-cell office:value-type="float" office:value="11861444" table:style-name="ce147">
            <text:p><text:s text:c="3"/>11,861,444</text:p>
          </table:table-cell>
          <table:table-cell office:value-type="float" office:value="8684" table:style-name="ce147">
            <text:p><text:s text:c="3"/>8,684</text:p>
          </table:table-cell>
          <table:table-cell office:value-type="float" office:value="4483" table:style-name="ce147">
            <text:p><text:s text:c="3"/>4,483</text:p>
          </table:table-cell>
          <table:table-cell office:value-type="float" office:value="4201" table:style-name="ce147">
            <text:p><text:s text:c="3"/>4,201</text:p>
          </table:table-cell>
          <table:table-cell office:value-type="float" office:value="4.5209797674580798" table:style-name="ce148">
            <text:p>4.52</text:p>
          </table:table-cell>
          <table:table-cell office:value-type="float" office:value="17205" table:style-name="ce147">
            <text:p><text:s text:c="3"/>17,205</text:p>
          </table:table-cell>
          <table:table-cell office:value-type="float" office:value="9832" table:style-name="ce147">
            <text:p><text:s text:c="3"/>9,832</text:p>
          </table:table-cell>
          <table:table-cell office:value-type="float" office:value="7373" table:style-name="ce147">
            <text:p><text:s text:c="3"/>7,373</text:p>
          </table:table-cell>
          <table:table-cell office:value-type="float" office:value="8.9571000574753796" table:style-name="ce148">
            <text:p>8.96</text:p>
          </table:table-cell>
          <table:table-cell office:value-type="float" office:value="-8521" table:style-name="ce147">
            <text:p>－ <text:s/>8,521</text:p>
          </table:table-cell>
          <table:table-cell office:value-type="float" office:value="-4.4361202900172998" table:style-name="ce149">
            <text:p>－ <text:s/>4.44</text:p>
          </table:table-cell>
          <table:table-cell office:value-type="float" office:value="6520" table:style-name="ce147">
            <text:p><text:s text:c="3"/>6,520</text:p>
          </table:table-cell>
          <table:table-cell office:value-type="float" office:value="6353" table:style-name="ce147">
            <text:p><text:s text:c="3"/>6,353</text:p>
          </table:table-cell>
          <table:table-cell office:value-type="float" office:value="167" table:style-name="ce147">
            <text:p><text:s text:c="3"/>167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110" table:style-name="ce147">
            <text:p><text:s text:c="3"/>110</text:p>
          </table:table-cell>
          <table:table-cell office:value-type="float" office:value="3.3943790976308899" table:style-name="ce148">
            <text:p>3.39</text:p>
          </table:table-cell>
          <table:table-cell office:value-type="float" office:value="4334" table:style-name="ce147">
            <text:p><text:s text:c="3"/>4,334</text:p>
          </table:table-cell>
          <table:table-cell office:value-type="float" office:value="4253" table:style-name="ce147">
            <text:p><text:s text:c="3"/>4,253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2.2563250014006599" table:style-name="ce148">
            <text:p>2.26</text:p>
          </table:table-cell>
          <table:table-cell office:value-type="float" office:value="73023" table:style-name="ce147">
            <text:p><text:s text:c="3"/>73,023</text:p>
          </table:table-cell>
          <table:table-cell office:value-type="float" office:value="73970" table:style-name="ce147">
            <text:p><text:s text:c="3"/>73,970</text:p>
          </table:table-cell>
          <table:table-cell office:value-type="float" office:value="616619" table:style-name="ce147">
            <text:p><text:s text:c="3"/>616,61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5">
            <text:p>5月</text:p>
          </table:table-cell>
          <table:covered-table-cell/>
          <table:table-cell office:value-type="float" office:value="9800648" table:style-name="ce150">
            <text:p><text:s text:c="3"/>9,800,648</text:p>
          </table:table-cell>
          <table:table-cell office:value-type="float" office:value="23355470" table:style-name="ce150">
            <text:p><text:s text:c="3"/>23,355,470</text:p>
          </table:table-cell>
          <table:table-cell office:value-type="float" office:value="11498215" table:style-name="ce150">
            <text:p><text:s text:c="3"/>11,498,215</text:p>
          </table:table-cell>
          <table:table-cell office:value-type="float" office:value="11857255" table:style-name="ce150">
            <text:p><text:s text:c="3"/>11,857,255</text:p>
          </table:table-cell>
          <table:table-cell office:value-type="float" office:value="8433" table:style-name="ce150">
            <text:p><text:s text:c="3"/>8,433</text:p>
          </table:table-cell>
          <table:table-cell office:value-type="float" office:value="4421" table:style-name="ce150">
            <text:p><text:s text:c="3"/>4,421</text:p>
          </table:table-cell>
          <table:table-cell office:value-type="float" office:value="4012" table:style-name="ce150">
            <text:p><text:s text:c="3"/>4,012</text:p>
          </table:table-cell>
          <table:table-cell office:value-type="float" office:value="4.2504363455148901" table:style-name="ce151">
            <text:p>4.25</text:p>
          </table:table-cell>
          <table:table-cell office:value-type="float" office:value="15382" table:style-name="ce150">
            <text:p><text:s text:c="3"/>15,382</text:p>
          </table:table-cell>
          <table:table-cell office:value-type="float" office:value="8803" table:style-name="ce150">
            <text:p><text:s text:c="3"/>8,803</text:p>
          </table:table-cell>
          <table:table-cell office:value-type="float" office:value="6579" table:style-name="ce150">
            <text:p><text:s text:c="3"/>6,579</text:p>
          </table:table-cell>
          <table:table-cell office:value-type="float" office:value="7.7529007312593397" table:style-name="ce151">
            <text:p>7.75</text:p>
          </table:table-cell>
          <table:table-cell office:value-type="float" office:value="-6949" table:style-name="ce150">
            <text:p>－ <text:s/>6,949</text:p>
          </table:table-cell>
          <table:table-cell office:value-type="float" office:value="-3.50246438574445" table:style-name="ce152">
            <text:p>－ <text:s/>3.50</text:p>
          </table:table-cell>
          <table:table-cell office:value-type="float" office:value="12791" table:style-name="ce150">
            <text:p><text:s text:c="3"/>12,791</text:p>
          </table:table-cell>
          <table:table-cell office:value-type="float" office:value="12359" table:style-name="ce150">
            <text:p><text:s text:c="3"/>12,359</text:p>
          </table:table-cell>
          <table:table-cell office:value-type="float" office:value="432" table:style-name="ce150">
            <text:p><text:s text:c="3"/>432</text:p>
          </table:table-cell>
          <table:table-cell office:value-type="float" office:value="130" table:style-name="ce150">
            <text:p><text:s text:c="3"/>130</text:p>
          </table:table-cell>
          <table:table-cell office:value-type="float" office:value="302" table:style-name="ce150">
            <text:p><text:s text:c="3"/>302</text:p>
          </table:table-cell>
          <table:table-cell office:value-type="float" office:value="6.4469739470509904" table:style-name="ce151">
            <text:p>6.45</text:p>
          </table:table-cell>
          <table:table-cell office:value-type="float" office:value="4532" table:style-name="ce150">
            <text:p><text:s text:c="3"/>4,532</text:p>
          </table:table-cell>
          <table:table-cell office:value-type="float" office:value="4456" table:style-name="ce150">
            <text:p><text:s text:c="3"/>4,456</text:p>
          </table:table-cell>
          <table:table-cell office:value-type="float" office:value="76" table:style-name="ce150">
            <text:p><text:s text:c="3"/>76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57" table:style-name="ce150">
            <text:p><text:s text:c="3"/>57</text:p>
          </table:table-cell>
          <table:table-cell office:value-type="float" office:value="2.28423781784341" table:style-name="ce151">
            <text:p>2.28</text:p>
          </table:table-cell>
          <table:table-cell office:value-type="float" office:value="121014" table:style-name="ce150">
            <text:p><text:s text:c="3"/>121,014</text:p>
          </table:table-cell>
          <table:table-cell office:value-type="float" office:value="123869" table:style-name="ce150">
            <text:p><text:s text:c="3"/>123,869</text:p>
          </table:table-cell>
          <table:table-cell office:value-type="float" office:value="617824" table:style-name="ce150">
            <text:p><text:s text:c="3"/>617,8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6">
            <text:p>6月</text:p>
          </table:table-cell>
          <table:covered-table-cell/>
          <table:table-cell office:value-type="float" office:value="9810510" table:style-name="ce153">
            <text:p><text:s text:c="3"/>9,810,510</text:p>
          </table:table-cell>
          <table:table-cell office:value-type="float" office:value="23346741" table:style-name="ce153">
            <text:p><text:s text:c="3"/>23,346,741</text:p>
          </table:table-cell>
          <table:table-cell office:value-type="float" office:value="11492835" table:style-name="ce153">
            <text:p><text:s text:c="3"/>11,492,835</text:p>
          </table:table-cell>
          <table:table-cell office:value-type="float" office:value="11853906" table:style-name="ce153">
            <text:p><text:s text:c="3"/>11,853,906</text:p>
          </table:table-cell>
          <table:table-cell office:value-type="float" office:value="8968" table:style-name="ce153">
            <text:p><text:s text:c="3"/>8,968</text:p>
          </table:table-cell>
          <table:table-cell office:value-type="float" office:value="4683" table:style-name="ce153">
            <text:p><text:s text:c="3"/>4,683</text:p>
          </table:table-cell>
          <table:table-cell office:value-type="float" office:value="4285" table:style-name="ce153">
            <text:p><text:s text:c="3"/>4,285</text:p>
          </table:table-cell>
          <table:table-cell office:value-type="float" office:value="4.67261246653469" table:style-name="ce154">
            <text:p>4.67</text:p>
          </table:table-cell>
          <table:table-cell office:value-type="float" office:value="16554" table:style-name="ce153">
            <text:p><text:s text:c="3"/>16,554</text:p>
          </table:table-cell>
          <table:table-cell office:value-type="float" office:value="9528" table:style-name="ce153">
            <text:p><text:s text:c="3"/>9,528</text:p>
          </table:table-cell>
          <table:table-cell office:value-type="float" office:value="7026" table:style-name="ce153">
            <text:p><text:s text:c="3"/>7,026</text:p>
          </table:table-cell>
          <table:table-cell office:value-type="float" office:value="8.6251590957867101" table:style-name="ce154">
            <text:p>8.63</text:p>
          </table:table-cell>
          <table:table-cell office:value-type="float" office:value="-7586" table:style-name="ce153">
            <text:p>－ <text:s/>7,586</text:p>
          </table:table-cell>
          <table:table-cell office:value-type="float" office:value="-3.9525466292520202" table:style-name="ce155">
            <text:p>－ <text:s/>3.95</text:p>
          </table:table-cell>
          <table:table-cell office:value-type="float" office:value="7655" table:style-name="ce153">
            <text:p><text:s text:c="3"/>7,655</text:p>
          </table:table-cell>
          <table:table-cell office:value-type="float" office:value="7392" table:style-name="ce153">
            <text:p><text:s text:c="3"/>7,392</text:p>
          </table:table-cell>
          <table:table-cell office:value-type="float" office:value="263" table:style-name="ce153">
            <text:p><text:s text:c="3"/>263</text:p>
          </table:table-cell>
          <table:table-cell office:value-type="float" office:value="70" table:style-name="ce153">
            <text:p><text:s text:c="3"/>70</text:p>
          </table:table-cell>
          <table:table-cell office:value-type="float" office:value="193" table:style-name="ce153">
            <text:p><text:s text:c="3"/>193</text:p>
          </table:table-cell>
          <table:table-cell office:value-type="float" office:value="3.9884978179441402" table:style-name="ce154">
            <text:p>3.99</text:p>
          </table:table-cell>
          <table:table-cell office:value-type="float" office:value="4562" table:style-name="ce153">
            <text:p><text:s text:c="3"/>4,562</text:p>
          </table:table-cell>
          <table:table-cell office:value-type="float" office:value="4476" table:style-name="ce153">
            <text:p><text:s text:c="3"/>4,476</text:p>
          </table:table-cell>
          <table:table-cell office:value-type="float" office:value="86" table:style-name="ce153">
            <text:p><text:s text:c="3"/>86</text:p>
          </table:table-cell>
          <table:table-cell office:value-type="float" office:value="23" table:style-name="ce153">
            <text:p><text:s text:c="3"/>23</text:p>
          </table:table-cell>
          <table:table-cell office:value-type="float" office:value="63" table:style-name="ce153">
            <text:p><text:s text:c="3"/>63</text:p>
          </table:table-cell>
          <table:table-cell office:value-type="float" office:value="2.3769467074410402" table:style-name="ce154">
            <text:p>2.38</text:p>
          </table:table-cell>
          <table:table-cell office:value-type="float" office:value="71834" table:style-name="ce153">
            <text:p><text:s text:c="3"/>71,834</text:p>
          </table:table-cell>
          <table:table-cell office:value-type="float" office:value="72977" table:style-name="ce153">
            <text:p><text:s text:c="3"/>72,977</text:p>
          </table:table-cell>
          <table:table-cell office:value-type="float" office:value="619075" table:style-name="ce153">
            <text:p><text:s text:c="3"/>619,07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7">
            <text:p>7月</text:p>
          </table:table-cell>
          <table:covered-table-cell/>
          <table:table-cell office:value-type="float" office:value="9815928" table:style-name="ce156">
            <text:p><text:s text:c="3"/>9,815,928</text:p>
          </table:table-cell>
          <table:table-cell office:value-type="float" office:value="23337936" table:style-name="ce156">
            <text:p><text:s text:c="3"/>23,337,936</text:p>
          </table:table-cell>
          <table:table-cell office:value-type="float" office:value="11487371" table:style-name="ce156">
            <text:p><text:s text:c="3"/>11,487,371</text:p>
          </table:table-cell>
          <table:table-cell office:value-type="float" office:value="11850565" table:style-name="ce156">
            <text:p><text:s text:c="3"/>11,850,565</text:p>
          </table:table-cell>
          <table:table-cell office:value-type="float" office:value="8939" table:style-name="ce156">
            <text:p><text:s text:c="3"/>8,939</text:p>
          </table:table-cell>
          <table:table-cell office:value-type="float" office:value="4667" table:style-name="ce156">
            <text:p><text:s text:c="3"/>4,667</text:p>
          </table:table-cell>
          <table:table-cell office:value-type="float" office:value="4272" table:style-name="ce156">
            <text:p><text:s text:c="3"/>4,272</text:p>
          </table:table-cell>
          <table:table-cell office:value-type="float" office:value="4.50895338224284" table:style-name="ce157">
            <text:p>4.51</text:p>
          </table:table-cell>
          <table:table-cell office:value-type="float" office:value="16846" table:style-name="ce156">
            <text:p><text:s text:c="3"/>16,846</text:p>
          </table:table-cell>
          <table:table-cell office:value-type="float" office:value="9728" table:style-name="ce156">
            <text:p><text:s text:c="3"/>9,728</text:p>
          </table:table-cell>
          <table:table-cell office:value-type="float" office:value="7118" table:style-name="ce156">
            <text:p><text:s text:c="3"/>7,118</text:p>
          </table:table-cell>
          <table:table-cell office:value-type="float" office:value="8.4973519048285997" table:style-name="ce157">
            <text:p>8.50</text:p>
          </table:table-cell>
          <table:table-cell office:value-type="float" office:value="-7907" table:style-name="ce156">
            <text:p>－ <text:s/>7,907</text:p>
          </table:table-cell>
          <table:table-cell office:value-type="float" office:value="-3.9883985225857601" table:style-name="ce158">
            <text:p>－ <text:s/>3.99</text:p>
          </table:table-cell>
          <table:table-cell office:value-type="float" office:value="7418" table:style-name="ce156">
            <text:p><text:s text:c="3"/>7,418</text:p>
          </table:table-cell>
          <table:table-cell office:value-type="float" office:value="7149" table:style-name="ce156">
            <text:p><text:s text:c="3"/>7,149</text:p>
          </table:table-cell>
          <table:table-cell office:value-type="float" office:value="269" table:style-name="ce156">
            <text:p><text:s text:c="3"/>269</text:p>
          </table:table-cell>
          <table:table-cell office:value-type="float" office:value="85" table:style-name="ce156">
            <text:p><text:s text:c="3"/>85</text:p>
          </table:table-cell>
          <table:table-cell office:value-type="float" office:value="184" table:style-name="ce156">
            <text:p><text:s text:c="3"/>184</text:p>
          </table:table-cell>
          <table:table-cell office:value-type="float" office:value="3.7417402605970902" table:style-name="ce157">
            <text:p>3.74</text:p>
          </table:table-cell>
          <table:table-cell office:value-type="float" office:value="4506" table:style-name="ce156">
            <text:p><text:s text:c="3"/>4,506</text:p>
          </table:table-cell>
          <table:table-cell office:value-type="float" office:value="4422" table:style-name="ce156">
            <text:p><text:s text:c="3"/>4,422</text:p>
          </table:table-cell>
          <table:table-cell office:value-type="float" office:value="84" table:style-name="ce156">
            <text:p><text:s text:c="3"/>84</text:p>
          </table:table-cell>
          <table:table-cell office:value-type="float" office:value="25" table:style-name="ce156">
            <text:p><text:s text:c="3"/>25</text:p>
          </table:table-cell>
          <table:table-cell office:value-type="float" office:value="59" table:style-name="ce156">
            <text:p><text:s text:c="3"/>59</text:p>
          </table:table-cell>
          <table:table-cell office:value-type="float" office:value="2.27288778838642" table:style-name="ce157">
            <text:p>2.27</text:p>
          </table:table-cell>
          <table:table-cell office:value-type="float" office:value="70410" table:style-name="ce156">
            <text:p><text:s text:c="3"/>70,410</text:p>
          </table:table-cell>
          <table:table-cell office:value-type="float" office:value="71308" table:style-name="ce156">
            <text:p><text:s text:c="3"/>71,308</text:p>
          </table:table-cell>
          <table:table-cell office:value-type="float" office:value="620406" table:style-name="ce156">
            <text:p><text:s text:c="3"/>620,40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8">
            <text:p>8月</text:p>
          </table:table-cell>
          <table:covered-table-cell/>
          <table:table-cell office:value-type="float" office:value="9824963" table:style-name="ce159">
            <text:p><text:s text:c="3"/>9,824,963</text:p>
          </table:table-cell>
          <table:table-cell office:value-type="float" office:value="23328343" table:style-name="ce159">
            <text:p><text:s text:c="3"/>23,328,343</text:p>
          </table:table-cell>
          <table:table-cell office:value-type="float" office:value="11481623" table:style-name="ce159">
            <text:p><text:s text:c="3"/>11,481,623</text:p>
          </table:table-cell>
          <table:table-cell office:value-type="float" office:value="11846720" table:style-name="ce159">
            <text:p><text:s text:c="3"/>11,846,720</text:p>
          </table:table-cell>
          <table:table-cell office:value-type="float" office:value="8464" table:style-name="ce159">
            <text:p><text:s text:c="3"/>8,464</text:p>
          </table:table-cell>
          <table:table-cell office:value-type="float" office:value="4333" table:style-name="ce159">
            <text:p><text:s text:c="3"/>4,333</text:p>
          </table:table-cell>
          <table:table-cell office:value-type="float" office:value="4131" table:style-name="ce159">
            <text:p><text:s text:c="3"/>4,131</text:p>
          </table:table-cell>
          <table:table-cell office:value-type="float" office:value="4.2710400884350896" table:style-name="ce160">
            <text:p>4.27</text:p>
          </table:table-cell>
          <table:table-cell office:value-type="float" office:value="15226" table:style-name="ce159">
            <text:p><text:s text:c="3"/>15,226</text:p>
          </table:table-cell>
          <table:table-cell office:value-type="float" office:value="8735" table:style-name="ce159">
            <text:p><text:s text:c="3"/>8,735</text:p>
          </table:table-cell>
          <table:table-cell office:value-type="float" office:value="6491" table:style-name="ce159">
            <text:p><text:s text:c="3"/>6,491</text:p>
          </table:table-cell>
          <table:table-cell office:value-type="float" office:value="7.6832297243044403" table:style-name="ce160">
            <text:p>7.68</text:p>
          </table:table-cell>
          <table:table-cell office:value-type="float" office:value="-6762" table:style-name="ce159">
            <text:p>－ <text:s/>6,762</text:p>
          </table:table-cell>
          <table:table-cell office:value-type="float" office:value="-3.41218963586934" table:style-name="ce161">
            <text:p>－ <text:s/>3.41</text:p>
          </table:table-cell>
          <table:table-cell office:value-type="float" office:value="5916" table:style-name="ce159">
            <text:p><text:s text:c="3"/>5,916</text:p>
          </table:table-cell>
          <table:table-cell office:value-type="float" office:value="5675" table:style-name="ce159">
            <text:p><text:s text:c="3"/>5,675</text:p>
          </table:table-cell>
          <table:table-cell office:value-type="float" office:value="241" table:style-name="ce159">
            <text:p><text:s text:c="3"/>241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151" table:style-name="ce159">
            <text:p><text:s text:c="3"/>151</text:p>
          </table:table-cell>
          <table:table-cell office:value-type="float" office:value="2.98528747202056" table:style-name="ce160">
            <text:p>2.99</text:p>
          </table:table-cell>
          <table:table-cell office:value-type="float" office:value="4486" table:style-name="ce159">
            <text:p><text:s text:c="3"/>4,486</text:p>
          </table:table-cell>
          <table:table-cell office:value-type="float" office:value="4429" table:style-name="ce159">
            <text:p><text:s text:c="3"/>4,429</text:p>
          </table:table-cell>
          <table:table-cell office:value-type="float" office:value="57" table:style-name="ce159">
            <text:p><text:s text:c="3"/>57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48" table:style-name="ce159">
            <text:p><text:s text:c="3"/>48</text:p>
          </table:table-cell>
          <table:table-cell office:value-type="float" office:value="2.2636916158695501" table:style-name="ce160">
            <text:p>2.26</text:p>
          </table:table-cell>
          <table:table-cell office:value-type="float" office:value="79243" table:style-name="ce159">
            <text:p><text:s text:c="3"/>79,243</text:p>
          </table:table-cell>
          <table:table-cell office:value-type="float" office:value="82074" table:style-name="ce159">
            <text:p><text:s text:c="3"/>82,074</text:p>
          </table:table-cell>
          <table:table-cell office:value-type="float" office:value="621917" table:style-name="ce159">
            <text:p><text:s text:c="3"/>621,91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9">
            <text:p>9月</text:p>
          </table:table-cell>
          <table:covered-table-cell/>
          <table:table-cell office:value-type="float" office:value="9837386" table:style-name="ce162">
            <text:p><text:s text:c="3"/>9,837,386</text:p>
          </table:table-cell>
          <table:table-cell office:value-type="float" office:value="23317031" table:style-name="ce162">
            <text:p><text:s text:c="3"/>23,317,031</text:p>
          </table:table-cell>
          <table:table-cell office:value-type="float" office:value="11475081" table:style-name="ce162">
            <text:p><text:s text:c="3"/>11,475,081</text:p>
          </table:table-cell>
          <table:table-cell office:value-type="float" office:value="11841950" table:style-name="ce162">
            <text:p><text:s text:c="3"/>11,841,950</text:p>
          </table:table-cell>
          <table:table-cell office:value-type="float" office:value="8603" table:style-name="ce162">
            <text:p><text:s text:c="3"/>8,603</text:p>
          </table:table-cell>
          <table:table-cell office:value-type="float" office:value="4491" table:style-name="ce162">
            <text:p><text:s text:c="3"/>4,491</text:p>
          </table:table-cell>
          <table:table-cell office:value-type="float" office:value="4112" table:style-name="ce162">
            <text:p><text:s text:c="3"/>4,112</text:p>
          </table:table-cell>
          <table:table-cell office:value-type="float" office:value="4.4878976994946296" table:style-name="ce163">
            <text:p>4.49</text:p>
          </table:table-cell>
          <table:table-cell office:value-type="float" office:value="15387" table:style-name="ce162">
            <text:p><text:s text:c="3"/>15,387</text:p>
          </table:table-cell>
          <table:table-cell office:value-type="float" office:value="8864" table:style-name="ce162">
            <text:p><text:s text:c="3"/>8,864</text:p>
          </table:table-cell>
          <table:table-cell office:value-type="float" office:value="6523" table:style-name="ce162">
            <text:p><text:s text:c="3"/>6,523</text:p>
          </table:table-cell>
          <table:table-cell office:value-type="float" office:value="8.0268838663400999" table:style-name="ce163">
            <text:p>8.03</text:p>
          </table:table-cell>
          <table:table-cell office:value-type="float" office:value="-6784" table:style-name="ce162">
            <text:p>－ <text:s/>6,784</text:p>
          </table:table-cell>
          <table:table-cell office:value-type="float" office:value="-3.5389861668454698" table:style-name="ce164">
            <text:p>－ <text:s/>3.54</text:p>
          </table:table-cell>
          <table:table-cell office:value-type="float" office:value="5844" table:style-name="ce162">
            <text:p><text:s text:c="3"/>5,844</text:p>
          </table:table-cell>
          <table:table-cell office:value-type="float" office:value="5614" table:style-name="ce162">
            <text:p><text:s text:c="3"/>5,614</text:p>
          </table:table-cell>
          <table:table-cell office:value-type="float" office:value="230" table:style-name="ce162">
            <text:p><text:s text:c="3"/>230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153" table:style-name="ce162">
            <text:p><text:s text:c="3"/>153</text:p>
          </table:table-cell>
          <table:table-cell office:value-type="float" office:value="3.04861956943469" table:style-name="ce163">
            <text:p>3.05</text:p>
          </table:table-cell>
          <table:table-cell office:value-type="float" office:value="4402" table:style-name="ce162">
            <text:p><text:s text:c="3"/>4,402</text:p>
          </table:table-cell>
          <table:table-cell office:value-type="float" office:value="4330" table:style-name="ce162">
            <text:p><text:s text:c="3"/>4,330</text:p>
          </table:table-cell>
          <table:table-cell office:value-type="float" office:value="72" table:style-name="ce162">
            <text:p><text:s text:c="3"/>72</text:p>
          </table:table-cell>
          <table:table-cell office:value-type="float" office:value="14" table:style-name="ce162">
            <text:p><text:s text:c="3"/>14</text:p>
          </table:table-cell>
          <table:table-cell office:value-type="float" office:value="58" table:style-name="ce162">
            <text:p><text:s text:c="3"/>58</text:p>
          </table:table-cell>
          <table:table-cell office:value-type="float" office:value="2.2963763423428301" table:style-name="ce163">
            <text:p>2.30</text:p>
          </table:table-cell>
          <table:table-cell office:value-type="float" office:value="79080" table:style-name="ce162">
            <text:p><text:s text:c="3"/>79,080</text:p>
          </table:table-cell>
          <table:table-cell office:value-type="float" office:value="83608" table:style-name="ce162">
            <text:p><text:s text:c="3"/>83,608</text:p>
          </table:table-cell>
          <table:table-cell office:value-type="float" office:value="623192" table:style-name="ce162">
            <text:p><text:s text:c="3"/>623,19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0">
            <text:p>10月</text:p>
          </table:table-cell>
          <table:covered-table-cell/>
          <table:table-cell office:value-type="float" office:value="9839725" table:style-name="ce165">
            <text:p><text:s text:c="3"/>9,839,725</text:p>
          </table:table-cell>
          <table:table-cell office:value-type="float" office:value="23310853" table:style-name="ce165">
            <text:p><text:s text:c="3"/>23,310,853</text:p>
          </table:table-cell>
          <table:table-cell office:value-type="float" office:value="11470704" table:style-name="ce165">
            <text:p><text:s text:c="3"/>11,470,704</text:p>
          </table:table-cell>
          <table:table-cell office:value-type="float" office:value="11840149" table:style-name="ce165">
            <text:p><text:s text:c="3"/>11,840,149</text:p>
          </table:table-cell>
          <table:table-cell office:value-type="float" office:value="9458" table:style-name="ce165">
            <text:p><text:s text:c="3"/>9,458</text:p>
          </table:table-cell>
          <table:table-cell office:value-type="float" office:value="4834" table:style-name="ce165">
            <text:p><text:s text:c="3"/>4,834</text:p>
          </table:table-cell>
          <table:table-cell office:value-type="float" office:value="4624" table:style-name="ce165">
            <text:p><text:s text:c="3"/>4,624</text:p>
          </table:table-cell>
          <table:table-cell office:value-type="float" office:value="4.7765548434771397" table:style-name="ce166">
            <text:p>4.78</text:p>
          </table:table-cell>
          <table:table-cell office:value-type="float" office:value="15908" table:style-name="ce165">
            <text:p><text:s text:c="3"/>15,908</text:p>
          </table:table-cell>
          <table:table-cell office:value-type="float" office:value="9118" table:style-name="ce165">
            <text:p><text:s text:c="3"/>9,118</text:p>
          </table:table-cell>
          <table:table-cell office:value-type="float" office:value="6790" table:style-name="ce165">
            <text:p><text:s text:c="3"/>6,790</text:p>
          </table:table-cell>
          <table:table-cell office:value-type="float" office:value="8.0339854567598206" table:style-name="ce166">
            <text:p>8.03</text:p>
          </table:table-cell>
          <table:table-cell office:value-type="float" office:value="-6450" table:style-name="ce165">
            <text:p>－ <text:s/>6,450</text:p>
          </table:table-cell>
          <table:table-cell office:value-type="float" office:value="-3.25743061328268" table:style-name="ce167">
            <text:p>－ <text:s/>3.26</text:p>
          </table:table-cell>
          <table:table-cell office:value-type="float" office:value="10735" table:style-name="ce165">
            <text:p><text:s text:c="3"/>10,735</text:p>
          </table:table-cell>
          <table:table-cell office:value-type="float" office:value="10428" table:style-name="ce165">
            <text:p><text:s text:c="3"/>10,428</text:p>
          </table:table-cell>
          <table:table-cell office:value-type="float" office:value="307" table:style-name="ce165">
            <text:p><text:s text:c="3"/>307</text:p>
          </table:table-cell>
          <table:table-cell office:value-type="float" office:value="109" table:style-name="ce165">
            <text:p><text:s text:c="3"/>109</text:p>
          </table:table-cell>
          <table:table-cell office:value-type="float" office:value="198" table:style-name="ce165">
            <text:p><text:s text:c="3"/>198</text:p>
          </table:table-cell>
          <table:table-cell office:value-type="float" office:value="5.4214756021069102" table:style-name="ce166">
            <text:p>5.42</text:p>
          </table:table-cell>
          <table:table-cell office:value-type="float" office:value="4511" table:style-name="ce165">
            <text:p><text:s text:c="3"/>4,511</text:p>
          </table:table-cell>
          <table:table-cell office:value-type="float" office:value="4434" table:style-name="ce165">
            <text:p><text:s text:c="3"/>4,434</text:p>
          </table:table-cell>
          <table:table-cell office:value-type="float" office:value="77" table:style-name="ce165">
            <text:p><text:s text:c="3"/>77</text:p>
          </table:table-cell>
          <table:table-cell office:value-type="float" office:value="22" table:style-name="ce165">
            <text:p><text:s text:c="3"/>22</text:p>
          </table:table-cell>
          <table:table-cell office:value-type="float" office:value="55" table:style-name="ce165">
            <text:p><text:s text:c="3"/>55</text:p>
          </table:table-cell>
          <table:table-cell office:value-type="float" office:value="2.2781813172896399" table:style-name="ce166">
            <text:p>2.28</text:p>
          </table:table-cell>
          <table:table-cell office:value-type="float" office:value="62594" table:style-name="ce165">
            <text:p><text:s text:c="3"/>62,594</text:p>
          </table:table-cell>
          <table:table-cell office:value-type="float" office:value="62322" table:style-name="ce165">
            <text:p><text:s text:c="3"/>62,322</text:p>
          </table:table-cell>
          <table:table-cell office:value-type="float" office:value="624159" table:style-name="ce165">
            <text:p><text:s text:c="3"/>624,15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1">
            <text:p>11月</text:p>
          </table:table-cell>
          <table:covered-table-cell/>
          <table:table-cell office:value-type="float" office:value="9844924" table:style-name="ce168">
            <text:p><text:s text:c="3"/>9,844,924</text:p>
          </table:table-cell>
          <table:table-cell office:value-type="float" office:value="23306085" table:style-name="ce168">
            <text:p><text:s text:c="3"/>23,306,085</text:p>
          </table:table-cell>
          <table:table-cell office:value-type="float" office:value="11467137" table:style-name="ce168">
            <text:p><text:s text:c="3"/>11,467,137</text:p>
          </table:table-cell>
          <table:table-cell office:value-type="float" office:value="11838948" table:style-name="ce168">
            <text:p><text:s text:c="3"/>11,838,948</text:p>
          </table:table-cell>
          <table:table-cell office:value-type="float" office:value="7946" table:style-name="ce168">
            <text:p><text:s text:c="3"/>7,946</text:p>
          </table:table-cell>
          <table:table-cell office:value-type="float" office:value="4054" table:style-name="ce168">
            <text:p><text:s text:c="3"/>4,054</text:p>
          </table:table-cell>
          <table:table-cell office:value-type="float" office:value="3892" table:style-name="ce168">
            <text:p><text:s text:c="3"/>3,892</text:p>
          </table:table-cell>
          <table:table-cell office:value-type="float" office:value="4.1476912676389599" table:style-name="ce169">
            <text:p>4.15</text:p>
          </table:table-cell>
          <table:table-cell office:value-type="float" office:value="14771" table:style-name="ce168">
            <text:p><text:s text:c="3"/>14,771</text:p>
          </table:table-cell>
          <table:table-cell office:value-type="float" office:value="8433" table:style-name="ce168">
            <text:p><text:s text:c="3"/>8,433</text:p>
          </table:table-cell>
          <table:table-cell office:value-type="float" office:value="6338" table:style-name="ce168">
            <text:p><text:s text:c="3"/>6,338</text:p>
          </table:table-cell>
          <table:table-cell office:value-type="float" office:value="7.7102375678700001" table:style-name="ce169">
            <text:p>7.71</text:p>
          </table:table-cell>
          <table:table-cell office:value-type="float" office:value="-6825" table:style-name="ce168">
            <text:p>－ <text:s/>6,825</text:p>
          </table:table-cell>
          <table:table-cell office:value-type="float" office:value="-3.5625463002310398" table:style-name="ce170">
            <text:p>－ <text:s/>3.56</text:p>
          </table:table-cell>
          <table:table-cell office:value-type="float" office:value="8586" table:style-name="ce168">
            <text:p><text:s text:c="3"/>8,586</text:p>
          </table:table-cell>
          <table:table-cell office:value-type="float" office:value="8327" table:style-name="ce168">
            <text:p><text:s text:c="3"/>8,327</text:p>
          </table:table-cell>
          <table:table-cell office:value-type="float" office:value="259" table:style-name="ce168">
            <text:p><text:s text:c="3"/>259</text:p>
          </table:table-cell>
          <table:table-cell office:value-type="float" office:value="86" table:style-name="ce168">
            <text:p><text:s text:c="3"/>86</text:p>
          </table:table-cell>
          <table:table-cell office:value-type="float" office:value="173" table:style-name="ce168">
            <text:p><text:s text:c="3"/>173</text:p>
          </table:table-cell>
          <table:table-cell office:value-type="float" office:value="4.4817615434115403" table:style-name="ce169">
            <text:p>4.48</text:p>
          </table:table-cell>
          <table:table-cell office:value-type="float" office:value="4066" table:style-name="ce168">
            <text:p><text:s text:c="3"/>4,066</text:p>
          </table:table-cell>
          <table:table-cell office:value-type="float" office:value="3996" table:style-name="ce168">
            <text:p><text:s text:c="3"/>3,996</text:p>
          </table:table-cell>
          <table:table-cell office:value-type="float" office:value="70" table:style-name="ce168">
            <text:p><text:s text:c="3"/>70</text:p>
          </table:table-cell>
          <table:table-cell office:value-type="float" office:value="15" table:style-name="ce168">
            <text:p><text:s text:c="3"/>15</text:p>
          </table:table-cell>
          <table:table-cell office:value-type="float" office:value="55" table:style-name="ce168">
            <text:p><text:s text:c="3"/>55</text:p>
          </table:table-cell>
          <table:table-cell office:value-type="float" office:value="2.1223902207676799" table:style-name="ce169">
            <text:p>2.12</text:p>
          </table:table-cell>
          <table:table-cell office:value-type="float" office:value="59696" table:style-name="ce168">
            <text:p><text:s text:c="3"/>59,696</text:p>
          </table:table-cell>
          <table:table-cell office:value-type="float" office:value="57639" table:style-name="ce168">
            <text:p><text:s text:c="3"/>57,639</text:p>
          </table:table-cell>
          <table:table-cell office:value-type="float" office:value="624920" table:style-name="ce168">
            <text:p><text:s text:c="3"/>624,92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2">
            <text:p>12月</text:p>
          </table:table-cell>
          <table:covered-table-cell/>
          <table:table-cell office:value-type="float" office:value="9851532" table:style-name="ce171">
            <text:p><text:s text:c="3"/>9,851,532</text:p>
          </table:table-cell>
          <table:table-cell office:value-type="float" office:value="23299132" table:style-name="ce171">
            <text:p><text:s text:c="3"/>23,299,132</text:p>
          </table:table-cell>
          <table:table-cell office:value-type="float" office:value="11462401" table:style-name="ce171">
            <text:p><text:s text:c="3"/>11,462,401</text:p>
          </table:table-cell>
          <table:table-cell office:value-type="float" office:value="11836731" table:style-name="ce171">
            <text:p><text:s text:c="3"/>11,836,731</text:p>
          </table:table-cell>
          <table:table-cell office:value-type="float" office:value="9027" table:style-name="ce171">
            <text:p><text:s text:c="3"/>9,027</text:p>
          </table:table-cell>
          <table:table-cell office:value-type="float" office:value="4703" table:style-name="ce171">
            <text:p><text:s text:c="3"/>4,703</text:p>
          </table:table-cell>
          <table:table-cell office:value-type="float" office:value="4324" table:style-name="ce171">
            <text:p><text:s text:c="3"/>4,324</text:p>
          </table:table-cell>
          <table:table-cell office:value-type="float" office:value="4.5611050437246297" table:style-name="ce172">
            <text:p>4.56</text:p>
          </table:table-cell>
          <table:table-cell office:value-type="float" office:value="17450" table:style-name="ce171">
            <text:p><text:s text:c="3"/>17,450</text:p>
          </table:table-cell>
          <table:table-cell office:value-type="float" office:value="10051" table:style-name="ce171">
            <text:p><text:s text:c="3"/>10,051</text:p>
          </table:table-cell>
          <table:table-cell office:value-type="float" office:value="7399" table:style-name="ce171">
            <text:p><text:s text:c="3"/>7,399</text:p>
          </table:table-cell>
          <table:table-cell office:value-type="float" office:value="8.8170248158850892" table:style-name="ce172">
            <text:p>8.82</text:p>
          </table:table-cell>
          <table:table-cell office:value-type="float" office:value="-8423" table:style-name="ce171">
            <text:p>－ <text:s/>8,423</text:p>
          </table:table-cell>
          <table:table-cell office:value-type="float" office:value="-4.2559197721604596" table:style-name="ce173">
            <text:p>－ <text:s/>4.26</text:p>
          </table:table-cell>
          <table:table-cell office:value-type="float" office:value="10816" table:style-name="ce171">
            <text:p><text:s text:c="3"/>10,816</text:p>
          </table:table-cell>
          <table:table-cell office:value-type="float" office:value="10456" table:style-name="ce171">
            <text:p><text:s text:c="3"/>10,456</text:p>
          </table:table-cell>
          <table:table-cell office:value-type="float" office:value="360" table:style-name="ce171">
            <text:p><text:s text:c="3"/>360</text:p>
          </table:table-cell>
          <table:table-cell office:value-type="float" office:value="101" table:style-name="ce171">
            <text:p><text:s text:c="3"/>101</text:p>
          </table:table-cell>
          <table:table-cell office:value-type="float" office:value="259" table:style-name="ce171">
            <text:p><text:s text:c="3"/>259</text:p>
          </table:table-cell>
          <table:table-cell office:value-type="float" office:value="5.4650395649635" table:style-name="ce172">
            <text:p>5.47</text:p>
          </table:table-cell>
          <table:table-cell office:value-type="float" office:value="4674" table:style-name="ce171">
            <text:p><text:s text:c="3"/>4,674</text:p>
          </table:table-cell>
          <table:table-cell office:value-type="float" office:value="4576" table:style-name="ce171">
            <text:p><text:s text:c="3"/>4,576</text:p>
          </table:table-cell>
          <table:table-cell office:value-type="float" office:value="98" table:style-name="ce171">
            <text:p><text:s text:c="3"/>98</text:p>
          </table:table-cell>
          <table:table-cell office:value-type="float" office:value="26" table:style-name="ce171">
            <text:p><text:s text:c="3"/>26</text:p>
          </table:table-cell>
          <table:table-cell office:value-type="float" office:value="72" table:style-name="ce171">
            <text:p><text:s text:c="3"/>72</text:p>
          </table:table-cell>
          <table:table-cell office:value-type="float" office:value="2.3616489392233202" table:style-name="ce172">
            <text:p>2.36</text:p>
          </table:table-cell>
          <table:table-cell office:value-type="float" office:value="74682" table:style-name="ce171">
            <text:p><text:s text:c="3"/>74,682</text:p>
          </table:table-cell>
          <table:table-cell office:value-type="float" office:value="73212" table:style-name="ce171">
            <text:p><text:s text:c="3"/>73,212</text:p>
          </table:table-cell>
          <table:table-cell office:value-type="float" office:value="629456" table:style-name="ce171">
            <text:p><text:s text:c="3"/>629,45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3">
            <text:p>115年1~4月</text:p>
          </table:table-cell>
          <table:covered-table-cell/>
          <table:table-cell office:value-type="float" office:value="9895639" table:style-name="ce174">
            <text:p><text:s text:c="3"/>9,895,639</text:p>
          </table:table-cell>
          <table:table-cell office:value-type="float" office:value="23262544" table:style-name="ce174">
            <text:p><text:s text:c="3"/>23,262,544</text:p>
          </table:table-cell>
          <table:table-cell office:value-type="float" office:value="11439382" table:style-name="ce174">
            <text:p><text:s text:c="3"/>11,439,382</text:p>
          </table:table-cell>
          <table:table-cell office:value-type="float" office:value="11823162" table:style-name="ce174">
            <text:p><text:s text:c="3"/>11,823,162</text:p>
          </table:table-cell>
          <table:table-cell office:value-type="float" office:value="32188" table:style-name="ce174">
            <text:p><text:s text:c="3"/>32,188</text:p>
          </table:table-cell>
          <table:table-cell office:value-type="float" office:value="16679" table:style-name="ce174">
            <text:p><text:s text:c="3"/>16,679</text:p>
          </table:table-cell>
          <table:table-cell office:value-type="float" office:value="15509" table:style-name="ce174">
            <text:p><text:s text:c="3"/>15,509</text:p>
          </table:table-cell>
          <table:table-cell office:value-type="float" office:value="4.2053970164934196" table:style-name="ce175">
            <text:p>4.21</text:p>
          </table:table-cell>
          <table:table-cell office:value-type="float" office:value="67011" table:style-name="ce174">
            <text:p><text:s text:c="3"/>67,011</text:p>
          </table:table-cell>
          <table:table-cell office:value-type="float" office:value="38560" table:style-name="ce174">
            <text:p><text:s text:c="3"/>38,560</text:p>
          </table:table-cell>
          <table:table-cell office:value-type="float" office:value="28451" table:style-name="ce174">
            <text:p><text:s text:c="3"/>28,451</text:p>
          </table:table-cell>
          <table:table-cell office:value-type="float" office:value="8.7550596331626895" table:style-name="ce175">
            <text:p>8.76</text:p>
          </table:table-cell>
          <table:table-cell office:value-type="float" office:value="-34823" table:style-name="ce174">
            <text:p>－ <text:s/>34,823</text:p>
          </table:table-cell>
          <table:table-cell office:value-type="float" office:value="-4.54966261666927" table:style-name="ce176">
            <text:p>－ <text:s/>4.55</text:p>
          </table:table-cell>
          <table:table-cell office:value-type="float" office:value="31495" table:style-name="ce174">
            <text:p><text:s text:c="3"/>31,495</text:p>
          </table:table-cell>
          <table:table-cell office:value-type="float" office:value="30542" table:style-name="ce174">
            <text:p><text:s text:c="3"/>30,542</text:p>
          </table:table-cell>
          <table:table-cell office:value-type="float" office:value="953" table:style-name="ce174">
            <text:p><text:s text:c="3"/>953</text:p>
          </table:table-cell>
          <table:table-cell office:value-type="float" office:value="300" table:style-name="ce174">
            <text:p><text:s text:c="3"/>300</text:p>
          </table:table-cell>
          <table:table-cell office:value-type="float" office:value="653" table:style-name="ce174">
            <text:p><text:s text:c="3"/>653</text:p>
          </table:table-cell>
          <table:table-cell office:value-type="float" office:value="4.1148558169025797" table:style-name="ce175">
            <text:p>4.11</text:p>
          </table:table-cell>
          <table:table-cell office:value-type="float" office:value="15853" table:style-name="ce174">
            <text:p><text:s text:c="3"/>15,853</text:p>
          </table:table-cell>
          <table:table-cell office:value-type="float" office:value="15550" table:style-name="ce174">
            <text:p><text:s text:c="3"/>15,550</text:p>
          </table:table-cell>
          <table:table-cell office:value-type="float" office:value="303" table:style-name="ce174">
            <text:p><text:s text:c="3"/>303</text:p>
          </table:table-cell>
          <table:table-cell office:value-type="float" office:value="78" table:style-name="ce174">
            <text:p><text:s text:c="3"/>78</text:p>
          </table:table-cell>
          <table:table-cell office:value-type="float" office:value="225" table:style-name="ce174">
            <text:p><text:s text:c="3"/>225</text:p>
          </table:table-cell>
          <table:table-cell office:value-type="float" office:value="2.07121159756649" table:style-name="ce175">
            <text:p>2.07</text:p>
          </table:table-cell>
          <table:table-cell office:value-type="float" office:value="302240" table:style-name="ce174">
            <text:p><text:s text:c="3"/>302,240</text:p>
          </table:table-cell>
          <table:table-cell office:value-type="float" office:value="304005" table:style-name="ce174">
            <text:p><text:s text:c="3"/>304,005</text:p>
          </table:table-cell>
          <table:table-cell office:value-type="float" office:value="636330" table:style-name="ce174">
            <text:p><text:s text:c="3"/>636,33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4">
            <text:p>1月</text:p>
          </table:table-cell>
          <table:covered-table-cell/>
          <table:table-cell office:value-type="float" office:value="9858677" table:style-name="ce177">
            <text:p><text:s text:c="3"/>9,858,677</text:p>
          </table:table-cell>
          <table:table-cell office:value-type="float" office:value="23289045" table:style-name="ce177">
            <text:p><text:s text:c="3"/>23,289,045</text:p>
          </table:table-cell>
          <table:table-cell office:value-type="float" office:value="11456183" table:style-name="ce177">
            <text:p><text:s text:c="3"/>11,456,183</text:p>
          </table:table-cell>
          <table:table-cell office:value-type="float" office:value="11832862" table:style-name="ce177">
            <text:p><text:s text:c="3"/>11,832,862</text:p>
          </table:table-cell>
          <table:table-cell office:value-type="float" office:value="8723" table:style-name="ce177">
            <text:p><text:s text:c="3"/>8,723</text:p>
          </table:table-cell>
          <table:table-cell office:value-type="float" office:value="4458" table:style-name="ce177">
            <text:p><text:s text:c="3"/>4,458</text:p>
          </table:table-cell>
          <table:table-cell office:value-type="float" office:value="4265" table:style-name="ce177">
            <text:p><text:s text:c="3"/>4,265</text:p>
          </table:table-cell>
          <table:table-cell office:value-type="float" office:value="4.4091139398985604" table:style-name="ce178">
            <text:p>4.41</text:p>
          </table:table-cell>
          <table:table-cell office:value-type="float" office:value="17529" table:style-name="ce177">
            <text:p><text:s text:c="3"/>17,529</text:p>
          </table:table-cell>
          <table:table-cell office:value-type="float" office:value="10114" table:style-name="ce177">
            <text:p><text:s text:c="3"/>10,114</text:p>
          </table:table-cell>
          <table:table-cell office:value-type="float" office:value="7415" table:style-name="ce177">
            <text:p><text:s text:c="3"/>7,415</text:p>
          </table:table-cell>
          <table:table-cell office:value-type="float" office:value="8.8601809300105199" table:style-name="ce178">
            <text:p>8.86</text:p>
          </table:table-cell>
          <table:table-cell office:value-type="float" office:value="-8806" table:style-name="ce177">
            <text:p>－ <text:s/>8,806</text:p>
          </table:table-cell>
          <table:table-cell office:value-type="float" office:value="-4.4510669901119702" table:style-name="ce179">
            <text:p>－ <text:s/>4.45</text:p>
          </table:table-cell>
          <table:table-cell office:value-type="float" office:value="9223" table:style-name="ce177">
            <text:p><text:s text:c="3"/>9,223</text:p>
          </table:table-cell>
          <table:table-cell office:value-type="float" office:value="8982" table:style-name="ce177">
            <text:p><text:s text:c="3"/>8,982</text:p>
          </table:table-cell>
          <table:table-cell office:value-type="float" office:value="241" table:style-name="ce177">
            <text:p><text:s text:c="3"/>241</text:p>
          </table:table-cell>
          <table:table-cell office:value-type="float" office:value="74" table:style-name="ce177">
            <text:p><text:s text:c="3"/>74</text:p>
          </table:table-cell>
          <table:table-cell office:value-type="float" office:value="167" table:style-name="ce177">
            <text:p><text:s text:c="3"/>167</text:p>
          </table:table-cell>
          <table:table-cell office:value-type="float" office:value="4.6618431580516297" table:style-name="ce178">
            <text:p>4.66</text:p>
          </table:table-cell>
          <table:table-cell office:value-type="float" office:value="4001" table:style-name="ce177">
            <text:p><text:s text:c="3"/>4,001</text:p>
          </table:table-cell>
          <table:table-cell office:value-type="float" office:value="3917" table:style-name="ce177">
            <text:p><text:s text:c="3"/>3,917</text:p>
          </table:table-cell>
          <table:table-cell office:value-type="float" office:value="84" table:style-name="ce177">
            <text:p><text:s text:c="3"/>84</text:p>
          </table:table-cell>
          <table:table-cell office:value-type="float" office:value="23" table:style-name="ce177">
            <text:p><text:s text:c="3"/>23</text:p>
          </table:table-cell>
          <table:table-cell office:value-type="float" office:value="61" table:style-name="ce177">
            <text:p><text:s text:c="3"/>61</text:p>
          </table:table-cell>
          <table:table-cell office:value-type="float" office:value="2.02233920366091" table:style-name="ce178">
            <text:p>2.02</text:p>
          </table:table-cell>
          <table:table-cell office:value-type="float" office:value="71042" table:style-name="ce177">
            <text:p><text:s text:c="3"/>71,042</text:p>
          </table:table-cell>
          <table:table-cell office:value-type="float" office:value="72323" table:style-name="ce177">
            <text:p><text:s text:c="3"/>72,323</text:p>
          </table:table-cell>
          <table:table-cell office:value-type="float" office:value="634432" table:style-name="ce177">
            <text:p><text:s text:c="3"/>634,43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5">
            <text:p>2月</text:p>
          </table:table-cell>
          <table:covered-table-cell/>
          <table:table-cell office:value-type="float" office:value="9865599" table:style-name="ce180">
            <text:p><text:s text:c="3"/>9,865,599</text:p>
          </table:table-cell>
          <table:table-cell office:value-type="float" office:value="23280273" table:style-name="ce180">
            <text:p><text:s text:c="3"/>23,280,273</text:p>
          </table:table-cell>
          <table:table-cell office:value-type="float" office:value="11450829" table:style-name="ce180">
            <text:p><text:s text:c="3"/>11,450,829</text:p>
          </table:table-cell>
          <table:table-cell office:value-type="float" office:value="11829444" table:style-name="ce180">
            <text:p><text:s text:c="3"/>11,829,444</text:p>
          </table:table-cell>
          <table:table-cell office:value-type="float" office:value="6523" table:style-name="ce180">
            <text:p><text:s text:c="3"/>6,523</text:p>
          </table:table-cell>
          <table:table-cell office:value-type="float" office:value="3408" table:style-name="ce180">
            <text:p><text:s text:c="3"/>3,408</text:p>
          </table:table-cell>
          <table:table-cell office:value-type="float" office:value="3115" table:style-name="ce180">
            <text:p><text:s text:c="3"/>3,115</text:p>
          </table:table-cell>
          <table:table-cell office:value-type="float" office:value="3.6518449458810802" table:style-name="ce181">
            <text:p>3.65</text:p>
          </table:table-cell>
          <table:table-cell office:value-type="float" office:value="14881" table:style-name="ce180">
            <text:p><text:s text:c="3"/>14,881</text:p>
          </table:table-cell>
          <table:table-cell office:value-type="float" office:value="8469" table:style-name="ce180">
            <text:p><text:s text:c="3"/>8,469</text:p>
          </table:table-cell>
          <table:table-cell office:value-type="float" office:value="6412" table:style-name="ce180">
            <text:p><text:s text:c="3"/>6,412</text:p>
          </table:table-cell>
          <table:table-cell office:value-type="float" office:value="8.33099871832842" table:style-name="ce181">
            <text:p>8.33</text:p>
          </table:table-cell>
          <table:table-cell office:value-type="float" office:value="-8358" table:style-name="ce180">
            <text:p>－ <text:s/>8,358</text:p>
          </table:table-cell>
          <table:table-cell office:value-type="float" office:value="-4.6791537724473402" table:style-name="ce182">
            <text:p>－ <text:s/>4.68</text:p>
          </table:table-cell>
          <table:table-cell office:value-type="float" office:value="6733" table:style-name="ce180">
            <text:p><text:s text:c="3"/>6,733</text:p>
          </table:table-cell>
          <table:table-cell office:value-type="float" office:value="6534" table:style-name="ce180">
            <text:p><text:s text:c="3"/>6,534</text:p>
          </table:table-cell>
          <table:table-cell office:value-type="float" office:value="199" table:style-name="ce180">
            <text:p><text:s text:c="3"/>199</text:p>
          </table:table-cell>
          <table:table-cell office:value-type="float" office:value="59" table:style-name="ce180">
            <text:p><text:s text:c="3"/>59</text:p>
          </table:table-cell>
          <table:table-cell office:value-type="float" office:value="140" table:style-name="ce180">
            <text:p><text:s text:c="3"/>140</text:p>
          </table:table-cell>
          <table:table-cell office:value-type="float" office:value="3.7694116235807602" table:style-name="ce181">
            <text:p>3.77</text:p>
          </table:table-cell>
          <table:table-cell office:value-type="float" office:value="2995" table:style-name="ce180">
            <text:p><text:s text:c="3"/>2,995</text:p>
          </table:table-cell>
          <table:table-cell office:value-type="float" office:value="2939" table:style-name="ce180">
            <text:p><text:s text:c="3"/>2,939</text:p>
          </table:table-cell>
          <table:table-cell office:value-type="float" office:value="56" table:style-name="ce180">
            <text:p><text:s text:c="3"/>56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43" table:style-name="ce180">
            <text:p><text:s text:c="3"/>43</text:p>
          </table:table-cell>
          <table:table-cell office:value-type="float" office:value="1.6767247605264199" table:style-name="ce181">
            <text:p>1.68</text:p>
          </table:table-cell>
          <table:table-cell office:value-type="float" office:value="56116" table:style-name="ce180">
            <text:p><text:s text:c="3"/>56,116</text:p>
          </table:table-cell>
          <table:table-cell office:value-type="float" office:value="56530" table:style-name="ce180">
            <text:p><text:s text:c="3"/>56,530</text:p>
          </table:table-cell>
          <table:table-cell office:value-type="float" office:value="635224" table:style-name="ce180">
            <text:p><text:s text:c="3"/>635,2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6">
            <text:p>3月</text:p>
          </table:table-cell>
          <table:covered-table-cell/>
          <table:table-cell office:value-type="float" office:value="9892098" table:style-name="ce183">
            <text:p><text:s text:c="3"/>9,892,098</text:p>
          </table:table-cell>
          <table:table-cell office:value-type="float" office:value="23270568" table:style-name="ce183">
            <text:p><text:s text:c="3"/>23,270,568</text:p>
          </table:table-cell>
          <table:table-cell office:value-type="float" office:value="11444400" table:style-name="ce183">
            <text:p><text:s text:c="3"/>11,444,400</text:p>
          </table:table-cell>
          <table:table-cell office:value-type="float" office:value="11826168" table:style-name="ce183">
            <text:p><text:s text:c="3"/>11,826,168</text:p>
          </table:table-cell>
          <table:table-cell office:value-type="float" office:value="8798" table:style-name="ce183">
            <text:p><text:s text:c="3"/>8,798</text:p>
          </table:table-cell>
          <table:table-cell office:value-type="float" office:value="4517" table:style-name="ce183">
            <text:p><text:s text:c="3"/>4,517</text:p>
          </table:table-cell>
          <table:table-cell office:value-type="float" office:value="4281" table:style-name="ce183">
            <text:p><text:s text:c="3"/>4,281</text:p>
          </table:table-cell>
          <table:table-cell office:value-type="float" office:value="4.4505900479310201" table:style-name="ce184">
            <text:p>4.45</text:p>
          </table:table-cell>
          <table:table-cell office:value-type="float" office:value="18607" table:style-name="ce183">
            <text:p><text:s text:c="3"/>18,607</text:p>
          </table:table-cell>
          <table:table-cell office:value-type="float" office:value="10756" table:style-name="ce183">
            <text:p><text:s text:c="3"/>10,756</text:p>
          </table:table-cell>
          <table:table-cell office:value-type="float" office:value="7851" table:style-name="ce183">
            <text:p><text:s text:c="3"/>7,851</text:p>
          </table:table-cell>
          <table:table-cell office:value-type="float" office:value="9.4126084362187399" table:style-name="ce184">
            <text:p>9.41</text:p>
          </table:table-cell>
          <table:table-cell office:value-type="float" office:value="-9809" table:style-name="ce183">
            <text:p>－ <text:s/>9,809</text:p>
          </table:table-cell>
          <table:table-cell office:value-type="float" office:value="-4.9620183882877198" table:style-name="ce185">
            <text:p>－ <text:s/>4.96</text:p>
          </table:table-cell>
          <table:table-cell office:value-type="float" office:value="9756" table:style-name="ce183">
            <text:p><text:s text:c="3"/>9,756</text:p>
          </table:table-cell>
          <table:table-cell office:value-type="float" office:value="9447" table:style-name="ce183">
            <text:p><text:s text:c="3"/>9,447</text:p>
          </table:table-cell>
          <table:table-cell office:value-type="float" office:value="309" table:style-name="ce183">
            <text:p><text:s text:c="3"/>309</text:p>
          </table:table-cell>
          <table:table-cell office:value-type="float" office:value="100" table:style-name="ce183">
            <text:p><text:s text:c="3"/>100</text:p>
          </table:table-cell>
          <table:table-cell office:value-type="float" office:value="209" table:style-name="ce183">
            <text:p><text:s text:c="3"/>209</text:p>
          </table:table-cell>
          <table:table-cell office:value-type="float" office:value="4.9352076048664504" table:style-name="ce184">
            <text:p>4.94</text:p>
          </table:table-cell>
          <table:table-cell office:value-type="float" office:value="4765" table:style-name="ce183">
            <text:p><text:s text:c="3"/>4,765</text:p>
          </table:table-cell>
          <table:table-cell office:value-type="float" office:value="4678" table:style-name="ce183">
            <text:p><text:s text:c="3"/>4,678</text:p>
          </table:table-cell>
          <table:table-cell office:value-type="float" office:value="87" table:style-name="ce183">
            <text:p><text:s text:c="3"/>87</text:p>
          </table:table-cell>
          <table:table-cell office:value-type="float" office:value="17" table:style-name="ce183">
            <text:p><text:s text:c="3"/>17</text:p>
          </table:table-cell>
          <table:table-cell office:value-type="float" office:value="70" table:style-name="ce183">
            <text:p><text:s text:c="3"/>70</text:p>
          </table:table-cell>
          <table:table-cell office:value-type="float" office:value="2.4104411887237198" table:style-name="ce184">
            <text:p>2.41</text:p>
          </table:table-cell>
          <table:table-cell office:value-type="float" office:value="105997" table:style-name="ce183">
            <text:p><text:s text:c="3"/>105,997</text:p>
          </table:table-cell>
          <table:table-cell office:value-type="float" office:value="105893" table:style-name="ce183">
            <text:p><text:s text:c="3"/>105,893</text:p>
          </table:table-cell>
          <table:table-cell office:value-type="float" office:value="635762" table:style-name="ce183">
            <text:p><text:s text:c="3"/>635,76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95">
            <text:p>4月</text:p>
          </table:table-cell>
          <table:covered-table-cell/>
          <table:table-cell office:value-type="float" office:value="9895639" table:style-name="ce186">
            <text:p><text:s text:c="3"/>9,895,639</text:p>
          </table:table-cell>
          <table:table-cell office:value-type="float" office:value="23262544" table:style-name="ce186">
            <text:p><text:s text:c="3"/>23,262,544</text:p>
          </table:table-cell>
          <table:table-cell office:value-type="float" office:value="11439382" table:style-name="ce186">
            <text:p><text:s text:c="3"/>11,439,382</text:p>
          </table:table-cell>
          <table:table-cell office:value-type="float" office:value="11823162" table:style-name="ce186">
            <text:p><text:s text:c="3"/>11,823,162</text:p>
          </table:table-cell>
          <table:table-cell office:value-type="float" office:value="8144" table:style-name="ce186">
            <text:p><text:s text:c="3"/>8,144</text:p>
          </table:table-cell>
          <table:table-cell office:value-type="float" office:value="4296" table:style-name="ce186">
            <text:p><text:s text:c="3"/>4,296</text:p>
          </table:table-cell>
          <table:table-cell office:value-type="float" office:value="3848" table:style-name="ce186">
            <text:p><text:s text:c="3"/>3,848</text:p>
          </table:table-cell>
          <table:table-cell office:value-type="float" office:value="4.2587022047153598" table:style-name="ce187">
            <text:p>4.26</text:p>
          </table:table-cell>
          <table:table-cell office:value-type="float" office:value="15994" table:style-name="ce186">
            <text:p><text:s text:c="3"/>15,994</text:p>
          </table:table-cell>
          <table:table-cell office:value-type="float" office:value="9221" table:style-name="ce186">
            <text:p><text:s text:c="3"/>9,221</text:p>
          </table:table-cell>
          <table:table-cell office:value-type="float" office:value="6773" table:style-name="ce186">
            <text:p><text:s text:c="3"/>6,773</text:p>
          </table:table-cell>
          <table:table-cell office:value-type="float" office:value="8.3636644231602908" table:style-name="ce187">
            <text:p>8.36</text:p>
          </table:table-cell>
          <table:table-cell office:value-type="float" office:value="-7850" table:style-name="ce186">
            <text:p>－ <text:s/>7,850</text:p>
          </table:table-cell>
          <table:table-cell office:value-type="float" office:value="-4.1049622184449399" table:style-name="ce188">
            <text:p>－ <text:s/>4.10</text:p>
          </table:table-cell>
          <table:table-cell office:value-type="float" office:value="5783" table:style-name="ce186">
            <text:p><text:s text:c="3"/>5,783</text:p>
          </table:table-cell>
          <table:table-cell office:value-type="float" office:value="5579" table:style-name="ce186">
            <text:p><text:s text:c="3"/>5,579</text:p>
          </table:table-cell>
          <table:table-cell office:value-type="float" office:value="204" table:style-name="ce186">
            <text:p><text:s text:c="3"/>204</text:p>
          </table:table-cell>
          <table:table-cell office:value-type="float" office:value="67" table:style-name="ce186">
            <text:p><text:s text:c="3"/>67</text:p>
          </table:table-cell>
          <table:table-cell office:value-type="float" office:value="137" table:style-name="ce186">
            <text:p><text:s text:c="3"/>137</text:p>
          </table:table-cell>
          <table:table-cell office:value-type="float" office:value="3.0240759884416599" table:style-name="ce187">
            <text:p>3.02</text:p>
          </table:table-cell>
          <table:table-cell office:value-type="float" office:value="4092" table:style-name="ce186">
            <text:p><text:s text:c="3"/>4,092</text:p>
          </table:table-cell>
          <table:table-cell office:value-type="float" office:value="4016" table:style-name="ce186">
            <text:p><text:s text:c="3"/>4,016</text:p>
          </table:table-cell>
          <table:table-cell office:value-type="float" office:value="76" table:style-name="ce186">
            <text:p><text:s text:c="3"/>76</text:p>
          </table:table-cell>
          <table:table-cell office:value-type="float" office:value="25" table:style-name="ce186">
            <text:p><text:s text:c="3"/>25</text:p>
          </table:table-cell>
          <table:table-cell office:value-type="float" office:value="51" table:style-name="ce186">
            <text:p><text:s text:c="3"/>51</text:p>
          </table:table-cell>
          <table:table-cell office:value-type="float" office:value="2.1398096048250501" table:style-name="ce187">
            <text:p>2.14</text:p>
          </table:table-cell>
          <table:table-cell office:value-type="float" office:value="69085" table:style-name="ce186">
            <text:p><text:s text:c="3"/>69,085</text:p>
          </table:table-cell>
          <table:table-cell office:value-type="float" office:value="69259" table:style-name="ce186">
            <text:p><text:s text:c="3"/>69,259</text:p>
          </table:table-cell>
          <table:table-cell office:value-type="float" office:value="636330" table:style-name="ce186">
            <text:p><text:s text:c="3"/>636,330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97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1.6943998521801122" table:style-name="ce38">
            <text:p>1.69</text:p>
          </table:table-cell>
          <table:table-cell office:value-type="float" office:value="-0.43966957117643907" table:style-name="ce38">
            <text:p>–0.44</text:p>
          </table:table-cell>
          <table:table-cell office:value-type="float" office:value="-0.5602308100867277" table:style-name="ce38">
            <text:p>–0.56</text:p>
          </table:table-cell>
          <table:table-cell office:value-type="float" office:value="-0.32274316685219778" table:style-name="ce38">
            <text:p>–0.32</text:p>
          </table:table-cell>
          <table:table-cell office:value-type="float" office:value="-6.2183325656379544" table:style-name="ce38">
            <text:p>–6.22</text:p>
          </table:table-cell>
          <table:table-cell office:value-type="float" office:value="-4.1713138523310285" table:style-name="ce38">
            <text:p>–4.17</text:p>
          </table:table-cell>
          <table:table-cell office:value-type="float" office:value="-8.402761247322065" table:style-name="ce38">
            <text:p>–8.40</text:p>
          </table:table-cell>
          <table:table-cell office:value-type="float" office:value="-0.26227756274272002" table:style-name="ce38">
            <text:p>–0.26</text:p>
          </table:table-cell>
          <table:table-cell office:value-type="float" office:value="-7.0386515547805866" table:style-name="ce38">
            <text:p>–7.04</text:p>
          </table:table-cell>
          <table:table-cell office:value-type="float" office:value="-6.2144019528071599" table:style-name="ce38">
            <text:p>–6.21</text:p>
          </table:table-cell>
          <table:table-cell office:value-type="float" office:value="-8.1378000813780016" table:style-name="ce38">
            <text:p>–8.14</text:p>
          </table:table-cell>
          <table:table-cell office:value-type="float" office:value="-0.59343563431509005" table:style-name="ce38">
            <text:p>–0.59</text:p>
          </table:table-cell>
          <table:table-cell office:value-type="string" table:style-name="ce38">
            <text:p>--</text:p>
          </table:table-cell>
          <table:table-cell office:value-type="float" office:value="0.33115807157235999" table:style-name="ce39">
            <text:p>0.33</text:p>
          </table:table-cell>
          <table:table-cell office:value-type="float" office:value="-11.303680981595091" table:style-name="ce38">
            <text:p>–11.30</text:p>
          </table:table-cell>
          <table:table-cell office:value-type="float" office:value="-12.183220525735873" table:style-name="ce38">
            <text:p>–12.18</text:p>
          </table:table-cell>
          <table:table-cell office:value-type="float" office:value="22.155688622754489" table:style-name="ce38">
            <text:p>22.16</text:p>
          </table:table-cell>
          <table:table-cell office:value-type="float" office:value="17.543859649122805" table:style-name="ce38">
            <text:p>17.54</text:p>
          </table:table-cell>
          <table:table-cell office:value-type="float" office:value="24.545454545454547" table:style-name="ce38">
            <text:p>24.55</text:p>
          </table:table-cell>
          <table:table-cell office:value-type="float" office:value="-0.37030310918922998" table:style-name="ce38">
            <text:p>–0.37</text:p>
          </table:table-cell>
          <table:table-cell office:value-type="float" office:value="-5.5837563451776653" table:style-name="ce38">
            <text:p>–5.58</text:p>
          </table:table-cell>
          <table:table-cell office:value-type="float" office:value="-5.5725370326828125" table:style-name="ce38">
            <text:p>–5.57</text:p>
          </table:table-cell>
          <table:table-cell office:value-type="float" office:value="-6.1728395061728394" table:style-name="ce38">
            <text:p>–6.17</text:p>
          </table:table-cell>
          <table:table-cell office:value-type="float" office:value="66.666666666666657" table:style-name="ce38">
            <text:p>66.67</text:p>
          </table:table-cell>
          <table:table-cell office:value-type="float" office:value="-22.727272727272727" table:style-name="ce38">
            <text:p>–22.73</text:p>
          </table:table-cell>
          <table:table-cell office:value-type="float" office:value="-0.11651539657561" table:style-name="ce38">
            <text:p>–0.12</text:p>
          </table:table-cell>
          <table:table-cell office:value-type="float" office:value="-5.3928214398203309" table:style-name="ce38">
            <text:p>–5.39</text:p>
          </table:table-cell>
          <table:table-cell office:value-type="float" office:value="-6.3687981614167901" table:style-name="ce38">
            <text:p>–6.37</text:p>
          </table:table-cell>
          <table:table-cell office:value-type="float" office:value="3.196625468887595" table:style-name="ce38">
            <text:p>3.20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98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20">△</text:span></text:p>
          </table:table-cell>
          <table:covered-table-cell/>
          <table:table-cell office:value-type="float" office:value="3.5796248682534282E-2" table:style-name="ce40">
            <text:p>0.04</text:p>
          </table:table-cell>
          <table:table-cell office:value-type="float" office:value="-3.4481324220362819E-2" table:style-name="ce40">
            <text:p>–0.03</text:p>
          </table:table-cell>
          <table:table-cell office:value-type="float" office:value="-4.3846772220474645E-2" table:style-name="ce40">
            <text:p>–0.04</text:p>
          </table:table-cell>
          <table:table-cell office:value-type="float" office:value="-2.5418208163455819E-2" table:style-name="ce40">
            <text:p>–0.03</text:p>
          </table:table-cell>
          <table:table-cell office:value-type="float" office:value="-7.4335076153671285" table:style-name="ce40">
            <text:p>–7.43</text:p>
          </table:table-cell>
          <table:table-cell office:value-type="float" office:value="-4.892627850343148" table:style-name="ce40">
            <text:p>–4.89</text:p>
          </table:table-cell>
          <table:table-cell office:value-type="float" office:value="-10.114459238495678" table:style-name="ce40">
            <text:p>–10.11</text:p>
          </table:table-cell>
          <table:table-cell office:value-type="float" office:value="-0.19188784321566033" table:style-name="ce40">
            <text:p>–0.19</text:p>
          </table:table-cell>
          <table:table-cell office:value-type="float" office:value="-14.043102058365131" table:style-name="ce40">
            <text:p>–14.04</text:p>
          </table:table-cell>
          <table:table-cell office:value-type="float" office:value="-14.271104499814058" table:style-name="ce40">
            <text:p>–14.27</text:p>
          </table:table-cell>
          <table:table-cell office:value-type="float" office:value="-13.730734938224428" table:style-name="ce40">
            <text:p>–13.73</text:p>
          </table:table-cell>
          <table:table-cell office:value-type="float" office:value="-1.0489440130584491" table:style-name="ce40">
            <text:p>–1.05</text:p>
          </table:table-cell>
          <table:table-cell office:value-type="string" table:style-name="ce40">
            <text:p>--</text:p>
          </table:table-cell>
          <table:table-cell office:value-type="float" office:value="0.85705616984277988" table:style-name="ce41">
            <text:p>0.86</text:p>
          </table:table-cell>
          <table:table-cell office:value-type="float" office:value="-40.723657236572365" table:style-name="ce40">
            <text:p>–40.72</text:p>
          </table:table-cell>
          <table:table-cell office:value-type="float" office:value="-40.944215094739072" table:style-name="ce40">
            <text:p>–40.94</text:p>
          </table:table-cell>
          <table:table-cell office:value-type="float" office:value="-33.980582524271846" table:style-name="ce40">
            <text:p>–33.98</text:p>
          </table:table-cell>
          <table:table-cell office:value-type="float" office:value="-33" table:style-name="ce40">
            <text:p>–33.00</text:p>
          </table:table-cell>
          <table:table-cell office:value-type="float" office:value="-34.449760765550238" table:style-name="ce40">
            <text:p>–34.45</text:p>
          </table:table-cell>
          <table:table-cell office:value-type="float" office:value="-1.9111316164247905" table:style-name="ce40">
            <text:p>–1.91</text:p>
          </table:table-cell>
          <table:table-cell office:value-type="float" office:value="-14.123819517313747" table:style-name="ce40">
            <text:p>–14.12</text:p>
          </table:table-cell>
          <table:table-cell office:value-type="float" office:value="-14.151346729371525" table:style-name="ce40">
            <text:p>–14.15</text:p>
          </table:table-cell>
          <table:table-cell office:value-type="float" office:value="-12.643678160919542" table:style-name="ce40">
            <text:p>–12.64</text:p>
          </table:table-cell>
          <table:table-cell office:value-type="float" office:value="47.058823529411761" table:style-name="ce40">
            <text:p>47.06</text:p>
          </table:table-cell>
          <table:table-cell office:value-type="float" office:value="-27.142857142857142" table:style-name="ce40">
            <text:p>–27.14</text:p>
          </table:table-cell>
          <table:table-cell office:value-type="float" office:value="-0.2706315838986697" table:style-name="ce40">
            <text:p>–0.27</text:p>
          </table:table-cell>
          <table:table-cell office:value-type="float" office:value="-34.823627083785389" table:style-name="ce40">
            <text:p>–34.82</text:p>
          </table:table-cell>
          <table:table-cell office:value-type="float" office:value="-34.595299028264378" table:style-name="ce40">
            <text:p>–34.60</text:p>
          </table:table-cell>
          <table:table-cell office:value-type="float" office:value="8.9341608966877539E-2" table:style-name="ce40">
            <text:p>0.09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396">
            <text:p>本年1~4月</text:p>
            <text:p>較上年1~4月</text:p>
            <text:p>増減</text:p>
          </table:table-cell>
          <table:table-cell office:value-type="string" table:number-columns-spanned="1" table:number-rows-spanned="2" table:style-name="ce399">
            <text:p><text:span text:style-name="T13">實數</text:span></text:p>
            <text:p>%<text:s/><text:span text:style-name="T19">△</text:span></text:p>
          </table:table-cell>
          <table:table-cell office:value-type="float" office:value="164878" table:style-name="ce42">
            <text:p>164,878</text:p>
          </table:table-cell>
          <table:table-cell office:value-type="float" office:value="-102730" table:style-name="ce42">
            <text:p>–102,730</text:p>
          </table:table-cell>
          <table:table-cell office:value-type="float" office:value="-64448" table:style-name="ce42">
            <text:p>–64,448</text:p>
          </table:table-cell>
          <table:table-cell office:value-type="float" office:value="-38282" table:style-name="ce42">
            <text:p>–38,282</text:p>
          </table:table-cell>
          <table:table-cell office:value-type="float" office:value="-5786" table:style-name="ce42">
            <text:p>–5,786</text:p>
          </table:table-cell>
          <table:table-cell office:value-type="float" office:value="-2932" table:style-name="ce42">
            <text:p>–2,932</text:p>
          </table:table-cell>
          <table:table-cell office:value-type="float" office:value="-2854" table:style-name="ce42">
            <text:p>–2,854</text:p>
          </table:table-cell>
          <table:table-cell office:value-type="string" table:style-name="ce42">
            <text:p/>
          </table:table-cell>
          <table:table-cell office:value-type="float" office:value="-5733" table:style-name="ce42">
            <text:p>–5,733</text:p>
          </table:table-cell>
          <table:table-cell office:value-type="float" office:value="-3331" table:style-name="ce42">
            <text:p>–3,331</text:p>
          </table:table-cell>
          <table:table-cell office:value-type="float" office:value="-2402" table:style-name="ce42">
            <text:p>–2,402</text:p>
          </table:table-cell>
          <table:table-cell office:value-type="string" table:style-name="ce42">
            <text:p/>
          </table:table-cell>
          <table:table-cell office:value-type="float" office:value="-53" table:style-name="ce42">
            <text:p>–53</text:p>
          </table:table-cell>
          <table:table-cell office:value-type="string" table:style-name="ce43">
            <text:p/>
          </table:table-cell>
          <table:table-cell office:value-type="float" office:value="-3120" table:style-name="ce42">
            <text:p>–3,120</text:p>
          </table:table-cell>
          <table:table-cell office:value-type="float" office:value="-3129" table:style-name="ce42">
            <text:p>–3,129</text:p>
          </table:table-cell>
          <table:table-cell office:value-type="float" office:value="9" table:style-name="ce42">
            <text:p>9</text:p>
          </table:table-cell>
          <table:table-cell office:value-type="float" office:value="5" table:style-name="ce42">
            <text:p>5</text:p>
          </table:table-cell>
          <table:table-cell office:value-type="float" office:value="4" table:style-name="ce42">
            <text:p>4</text:p>
          </table:table-cell>
          <table:table-cell office:value-type="string" table:style-name="ce42">
            <text:p/>
          </table:table-cell>
          <table:table-cell office:value-type="float" office:value="-509" table:style-name="ce42">
            <text:p>–509</text:p>
          </table:table-cell>
          <table:table-cell office:value-type="float" office:value="-534" table:style-name="ce42">
            <text:p>–534</text:p>
          </table:table-cell>
          <table:table-cell office:value-type="float" office:value="25" table:style-name="ce42">
            <text:p>25</text:p>
          </table:table-cell>
          <table:table-cell office:value-type="float" office:value="17" table:style-name="ce42">
            <text:p>17</text:p>
          </table:table-cell>
          <table:table-cell office:value-type="float" office:value="8" table:style-name="ce42">
            <text:p>8</text:p>
          </table:table-cell>
          <table:table-cell office:value-type="string" table:style-name="ce42">
            <text:p/>
          </table:table-cell>
          <table:table-cell office:value-type="float" office:value="-136604" table:style-name="ce42">
            <text:p>–136,604</text:p>
          </table:table-cell>
          <table:table-cell office:value-type="float" office:value="-135015" table:style-name="ce42">
            <text:p>–135,015</text:p>
          </table:table-cell>
          <table:table-cell office:value-type="float" office:value="19711" table:style-name="ce42">
            <text:p>19,711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1.6943998521801122" table:style-name="ce44">
            <text:p>1.69</text:p>
          </table:table-cell>
          <table:table-cell office:value-type="float" office:value="-0.43966957117643907" table:style-name="ce44">
            <text:p>–0.44</text:p>
          </table:table-cell>
          <table:table-cell office:value-type="float" office:value="-0.5602308100867277" table:style-name="ce44">
            <text:p>–0.56</text:p>
          </table:table-cell>
          <table:table-cell office:value-type="float" office:value="-0.32274316685219778" table:style-name="ce44">
            <text:p>–0.32</text:p>
          </table:table-cell>
          <table:table-cell office:value-type="float" office:value="-15.236740928003369" table:style-name="ce44">
            <text:p>–15.24</text:p>
          </table:table-cell>
          <table:table-cell office:value-type="float" office:value="-14.950792922339504" table:style-name="ce44">
            <text:p>–14.95</text:p>
          </table:table-cell>
          <table:table-cell office:value-type="float" office:value="-15.542122746827861" table:style-name="ce44">
            <text:p>–15.54</text:p>
          </table:table-cell>
          <table:table-cell office:value-type="float" office:value="-0.73432413774050997" table:style-name="ce44">
            <text:p>–0.73</text:p>
          </table:table-cell>
          <table:table-cell office:value-type="float" office:value="-7.8810623556581989" table:style-name="ce44">
            <text:p>–7.88</text:p>
          </table:table-cell>
          <table:table-cell office:value-type="float" office:value="-7.9515886467260266" table:style-name="ce44">
            <text:p>–7.95</text:p>
          </table:table-cell>
          <table:table-cell office:value-type="float" office:value="-7.7853045084756749" table:style-name="ce44">
            <text:p>–7.79</text:p>
          </table:table-cell>
          <table:table-cell office:value-type="float" office:value="-0.70760102001034997" table:style-name="ce44">
            <text:p>–0.71</text:p>
          </table:table-cell>
          <table:table-cell office:value-type="string" table:style-name="ce44">
            <text:p>--</text:p>
          </table:table-cell>
          <table:table-cell office:value-type="float" office:value="-2.672311773016E-2" table:style-name="ce45">
            <text:p>–0.03</text:p>
          </table:table-cell>
          <table:table-cell office:value-type="float" office:value="-9.0134334825942499" table:style-name="ce44">
            <text:p>–9.01</text:p>
          </table:table-cell>
          <table:table-cell office:value-type="float" office:value="-9.2928632948234391" table:style-name="ce44">
            <text:p>–9.29</text:p>
          </table:table-cell>
          <table:table-cell office:value-type="float" office:value="0.95338983050847459" table:style-name="ce44">
            <text:p>0.95</text:p>
          </table:table-cell>
          <table:table-cell office:value-type="float" office:value="1.6949152542372881" table:style-name="ce44">
            <text:p>1.69</text:p>
          </table:table-cell>
          <table:table-cell office:value-type="float" office:value="0.6163328197226503" table:style-name="ce44">
            <text:p>0.62</text:p>
          </table:table-cell>
          <table:table-cell office:value-type="float" office:value="-0.38792102393082001" table:style-name="ce44">
            <text:p>–0.39</text:p>
          </table:table-cell>
          <table:table-cell office:value-type="float" office:value="-3.1108666422197775" table:style-name="ce44">
            <text:p>–3.11</text:p>
          </table:table-cell>
          <table:table-cell office:value-type="float" office:value="-3.320069634419299" table:style-name="ce44">
            <text:p>–3.32</text:p>
          </table:table-cell>
          <table:table-cell office:value-type="float" office:value="8.9928057553956826" table:style-name="ce44">
            <text:p>8.99</text:p>
          </table:table-cell>
          <table:table-cell office:value-type="float" office:value="27.868852459016392" table:style-name="ce44">
            <text:p>27.87</text:p>
          </table:table-cell>
          <table:table-cell office:value-type="float" office:value="3.6866359447004609" table:style-name="ce44">
            <text:p>3.69</text:p>
          </table:table-cell>
          <table:table-cell office:value-type="float" office:value="-5.7184608405369999E-2" table:style-name="ce44">
            <text:p>–0.06</text:p>
          </table:table-cell>
          <table:table-cell office:value-type="float" office:value="-31.128145764782015" table:style-name="ce44">
            <text:p>–31.13</text:p>
          </table:table-cell>
          <table:table-cell office:value-type="float" office:value="-30.753724203908707" table:style-name="ce44">
            <text:p>–30.75</text:p>
          </table:table-cell>
          <table:table-cell office:value-type="float" office:value="3.196625468887595" table:style-name="ce44">
            <text:p>3.20</text:p>
          </table:table-cell>
          <table:table-cell table:number-columns-repeated="16353"/>
        </table:table-row>
        <table:table-row table:style-name="ro10">
          <table:table-cell table:number-columns-repeated="2" table:style-name="ce2"/>
          <table:table-cell office:value-type="string" table:style-name="ce33">
            <text:p><text:s text:c="2"/><text:span text:style-name="T3">附</text:span><text:s/><text:span text:style-name="T3">註</text:span><text:s/>: 1.<text:s/><text:span text:style-name="T19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7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6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number-rows-repeated="1048515" table:style-name="ro11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8"/>
        <table:table-column table:style-name="co6" table:number-columns-repeated="4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9"/>
        <table:table-column table:style-name="co17" table:default-cell-style-name="ce48"/>
        <table:table-column table:style-name="co18" table:number-columns-repeated="3" table:default-cell-style-name="ce48"/>
        <table:table-column table:style-name="co15" table:number-columns-repeated="2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18" table:default-cell-style-name="ce48"/>
        <table:table-column table:style-name="co15" table:default-cell-style-name="ce48"/>
        <table:table-column table:style-name="co19" table:number-columns-repeated="3" table:default-cell-style-name="ce48"/>
        <table:table-column table:style-name="co22" table:number-columns-repeated="16354" table:default-cell-style-name="ce48"/>
        <table:table-row table:style-name="ro12">
          <table:table-cell table:number-columns-repeated="15" table:style-name="ce48"/>
          <table:table-cell table:style-name="ce49"/>
          <table:table-cell table:number-columns-repeated="16368" table:style-name="ce48"/>
        </table:table-row>
        <table:table-row table:style-name="ro13">
          <table:table-cell office:value-type="string" table:number-columns-spanned="15" table:number-rows-spanned="1" table:style-name="ce315">
            <text:p>民 國 115 年 4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68">
            <text:p>民 國 115 年 4 月 戶 口 統 計 速 報 表(縣市別)(續)</text:p>
          </table:table-cell>
          <table:covered-table-cell table:number-columns-repeated="14"/>
          <table:table-cell table:number-columns-repeated="16354" table:style-name="ce48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6">
            <text:p>單位：人；‰；對</text:p>
          </table:table-cell>
          <table:table-cell table:number-columns-repeated="16354" table:style-name="ce48"/>
        </table:table-row>
        <table:table-row table:style-name="ro14">
          <table:table-cell table:style-name="ce95"/>
          <table:table-cell table:style-name="ce94"/>
          <table:table-cell office:value-type="string" table:style-name="ce93">
            <text:p>人</text:p>
          </table:table-cell>
          <table:table-cell office:value-type="string" table:style-name="ce93">
            <text:p>口</text:p>
          </table:table-cell>
          <table:table-cell office:value-type="string" table:style-name="ce93">
            <text:p>數</text:p>
          </table:table-cell>
          <table:table-cell office:value-type="string" table:style-name="ce92">
            <text:p>出　 <text:s text:c="2"/>　　生</text:p>
          </table:table-cell>
          <table:table-cell table:number-columns-repeated="3" table:style-name="ce91"/>
          <table:table-cell office:value-type="string" table:style-name="ce92">
            <text:p>死 <text:s text:c="4"/>　　亡</text:p>
          </table:table-cell>
          <table:table-cell table:number-columns-repeated="3" table:style-name="ce91"/>
          <table:table-cell office:value-type="string" table:number-columns-spanned="2" table:number-rows-spanned="1" table:style-name="ce405">
            <text:p>自 然 增 加</text:p>
          </table:table-cell>
          <table:covered-table-cell/>
          <table:table-cell office:value-type="string" table:number-columns-spanned="6" table:number-rows-spanned="1" table:style-name="ce405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406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407">
            <text:p>遷入</text:p>
            <text:p>人數</text:p>
          </table:table-cell>
          <table:table-cell office:value-type="string" table:number-columns-spanned="1" table:number-rows-spanned="4" table:style-name="ce407">
            <text:p>遷出</text:p>
            <text:p>人數</text:p>
          </table:table-cell>
          <table:table-cell office:value-type="string" table:number-columns-spanned="1" table:number-rows-spanned="4" table:style-name="ce400">
            <text:p>原住民</text:p>
            <text:p>人口數</text:p>
          </table:table-cell>
          <table:table-cell table:style-name="ce8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366">
            <text:p>區 域 別</text:p>
          </table:table-cell>
          <table:table-cell office:value-type="string" table:number-columns-spanned="1" table:number-rows-spanned="2" table:style-name="ce348">
            <text:p>戶　數</text:p>
          </table:table-cell>
          <table:table-cell table:number-columns-repeated="3" table:style-name="ce90"/>
          <table:table-cell office:value-type="string" table:number-columns-spanned="1" table:number-rows-spanned="3" table:style-name="ce405">
            <text:p>計</text:p>
          </table:table-cell>
          <table:table-cell office:value-type="string" table:number-columns-spanned="1" table:number-rows-spanned="3" table:style-name="ce405">
            <text:p>男</text:p>
          </table:table-cell>
          <table:table-cell office:value-type="string" table:number-columns-spanned="1" table:number-rows-spanned="3" table:style-name="ce405">
            <text:p>女</text:p>
          </table:table-cell>
          <table:table-cell office:value-type="string" table:style-name="ce89">
            <text:p>折合年</text:p>
          </table:table-cell>
          <table:table-cell office:value-type="string" table:number-columns-spanned="1" table:number-rows-spanned="3" table:style-name="ce405">
            <text:p>計</text:p>
          </table:table-cell>
          <table:table-cell office:value-type="string" table:number-columns-spanned="1" table:number-rows-spanned="3" table:style-name="ce405">
            <text:p>男</text:p>
          </table:table-cell>
          <table:table-cell office:value-type="string" table:number-columns-spanned="1" table:number-rows-spanned="3" table:style-name="ce405">
            <text:p>女</text:p>
          </table:table-cell>
          <table:table-cell office:value-type="string" table:style-name="ce88">
            <text:p>折合年</text:p>
          </table:table-cell>
          <table:table-cell table:style-name="ce87"/>
          <table:table-cell office:value-type="string" table:style-name="ce86">
            <text:p>折合年自</text:p>
          </table:table-cell>
          <table:table-cell office:value-type="string" table:number-columns-spanned="1" table:number-rows-spanned="3" table:style-name="ce409">
            <text:p>合 計</text:p>
          </table:table-cell>
          <table:table-cell office:value-type="string" table:number-columns-spanned="1" table:number-rows-spanned="3" table:style-name="ce407">
            <text:p>不同性別</text:p>
          </table:table-cell>
          <table:table-cell office:value-type="string" table:number-columns-spanned="3" table:number-rows-spanned="1" table:style-name="ce405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405">
            <text:p>合 計</text:p>
          </table:table-cell>
          <table:table-cell office:value-type="string" table:number-columns-spanned="1" table:number-rows-spanned="3" table:style-name="ce407">
            <text:p>不同性別</text:p>
          </table:table-cell>
          <table:table-cell office:value-type="string" table:number-columns-spanned="3" table:number-rows-spanned="1" table:style-name="ce405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8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3">
            <text:p>人數</text:p>
          </table:table-cell>
          <table:table-cell office:value-type="string" table:style-name="ce8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405">
            <text:p>計</text:p>
          </table:table-cell>
          <table:table-cell office:value-type="string" table:number-columns-spanned="1" table:number-rows-spanned="2" table:style-name="ce405">
            <text:p>男</text:p>
          </table:table-cell>
          <table:table-cell office:value-type="string" table:number-columns-spanned="1" table:number-rows-spanned="2" table:style-name="ce408">
            <text:p>女</text:p>
          </table:table-cell>
          <table:table-cell office:value-type="string" table:style-name="ce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405">
            <text:p>計</text:p>
          </table:table-cell>
          <table:table-cell office:value-type="string" table:number-columns-spanned="1" table:number-rows-spanned="2" table:style-name="ce405">
            <text:p>男</text:p>
          </table:table-cell>
          <table:table-cell office:value-type="string" table:number-columns-spanned="1" table:number-rows-spanned="2" table:style-name="ce408">
            <text:p>女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16">
          <table:table-cell table:style-name="ce79"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7">
          <table:table-cell office:value-type="string" table:style-name="ce71">
            <text:p><text:span text:style-name="T11">總　　計</text:span></text:p>
          </table:table-cell>
          <table:table-cell office:value-type="float" office:value="9895639" table:style-name="ce189">
            <text:p><text:s text:c="3"/>9,895,639</text:p>
          </table:table-cell>
          <table:table-cell office:value-type="float" office:value="23262544" table:style-name="ce189">
            <text:p><text:s text:c="3"/>23,262,544</text:p>
          </table:table-cell>
          <table:table-cell office:value-type="float" office:value="11439382" table:style-name="ce189">
            <text:p><text:s text:c="3"/>11,439,382</text:p>
          </table:table-cell>
          <table:table-cell office:value-type="float" office:value="11823162" table:style-name="ce189">
            <text:p><text:s text:c="3"/>11,823,162</text:p>
          </table:table-cell>
          <table:table-cell office:value-type="float" office:value="8144" table:style-name="ce189">
            <text:p><text:s text:c="3"/>8,144</text:p>
          </table:table-cell>
          <table:table-cell office:value-type="float" office:value="4296" table:style-name="ce189">
            <text:p><text:s text:c="3"/>4,296</text:p>
          </table:table-cell>
          <table:table-cell office:value-type="float" office:value="3848" table:style-name="ce189">
            <text:p><text:s text:c="3"/>3,848</text:p>
          </table:table-cell>
          <table:table-cell office:value-type="float" office:value="4.2587022047153598" table:style-name="ce190">
            <text:p>4.26</text:p>
          </table:table-cell>
          <table:table-cell office:value-type="float" office:value="15994" table:style-name="ce189">
            <text:p><text:s text:c="3"/>15,994</text:p>
          </table:table-cell>
          <table:table-cell office:value-type="float" office:value="9221" table:style-name="ce189">
            <text:p><text:s text:c="3"/>9,221</text:p>
          </table:table-cell>
          <table:table-cell office:value-type="float" office:value="6773" table:style-name="ce189">
            <text:p><text:s text:c="3"/>6,773</text:p>
          </table:table-cell>
          <table:table-cell office:value-type="float" office:value="8.3636644231602908" table:style-name="ce190">
            <text:p>8.36</text:p>
          </table:table-cell>
          <table:table-cell office:value-type="float" office:value="-7850" table:style-name="ce189">
            <text:p>－ <text:s/>7,850</text:p>
          </table:table-cell>
          <table:table-cell office:value-type="float" office:value="-4.1049622184449399" table:style-name="ce67">
            <text:p>–4.10</text:p>
          </table:table-cell>
          <table:table-cell office:value-type="float" office:value="5783" table:style-name="ce189">
            <text:p><text:s text:c="3"/>5,783</text:p>
          </table:table-cell>
          <table:table-cell office:value-type="float" office:value="5579" table:style-name="ce189">
            <text:p><text:s text:c="3"/>5,579</text:p>
          </table:table-cell>
          <table:table-cell office:value-type="float" office:value="204" table:style-name="ce189">
            <text:p><text:s text:c="3"/>204</text:p>
          </table:table-cell>
          <table:table-cell office:value-type="float" office:value="67" table:style-name="ce189">
            <text:p><text:s text:c="3"/>67</text:p>
          </table:table-cell>
          <table:table-cell office:value-type="float" office:value="137" table:style-name="ce189">
            <text:p><text:s text:c="3"/>137</text:p>
          </table:table-cell>
          <table:table-cell office:value-type="float" office:value="3.0240759884416599" table:style-name="ce190">
            <text:p>3.02</text:p>
          </table:table-cell>
          <table:table-cell office:value-type="float" office:value="4092" table:style-name="ce189">
            <text:p><text:s text:c="3"/>4,092</text:p>
          </table:table-cell>
          <table:table-cell office:value-type="float" office:value="4016" table:style-name="ce72">
            <text:p>4,016</text:p>
          </table:table-cell>
          <table:table-cell office:value-type="float" office:value="76" table:style-name="ce72">
            <text:p>76</text:p>
          </table:table-cell>
          <table:table-cell office:value-type="float" office:value="25" table:style-name="ce72">
            <text:p>25</text:p>
          </table:table-cell>
          <table:table-cell office:value-type="float" office:value="51" table:style-name="ce72">
            <text:p>51</text:p>
          </table:table-cell>
          <table:table-cell office:value-type="float" office:value="2.1398096048250501" table:style-name="ce65">
            <text:p>2.14</text:p>
          </table:table-cell>
          <table:table-cell office:value-type="float" office:value="69085" table:style-name="ce72">
            <text:p>69,085</text:p>
          </table:table-cell>
          <table:table-cell office:value-type="float" office:value="69259" table:style-name="ce72">
            <text:p>69,259</text:p>
          </table:table-cell>
          <table:table-cell office:value-type="float" office:value="636330" table:style-name="ce72">
            <text:p>636,330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95806" table:style-name="ce191">
            <text:p><text:s text:c="3"/>1,795,806</text:p>
          </table:table-cell>
          <table:table-cell office:value-type="float" office:value="4041149" table:style-name="ce191">
            <text:p><text:s text:c="3"/>4,041,149</text:p>
          </table:table-cell>
          <table:table-cell office:value-type="float" office:value="1959070" table:style-name="ce191">
            <text:p><text:s text:c="3"/>1,959,070</text:p>
          </table:table-cell>
          <table:table-cell office:value-type="float" office:value="2082079" table:style-name="ce191">
            <text:p><text:s text:c="3"/>2,082,079</text:p>
          </table:table-cell>
          <table:table-cell office:value-type="float" office:value="1264" table:style-name="ce191">
            <text:p><text:s text:c="3"/>1,264</text:p>
          </table:table-cell>
          <table:table-cell office:value-type="float" office:value="660" table:style-name="ce191">
            <text:p><text:s text:c="3"/>660</text:p>
          </table:table-cell>
          <table:table-cell office:value-type="float" office:value="604" table:style-name="ce191">
            <text:p><text:s text:c="3"/>604</text:p>
          </table:table-cell>
          <table:table-cell office:value-type="float" office:value="3.8049232916545099" table:style-name="ce192">
            <text:p>3.80</text:p>
          </table:table-cell>
          <table:table-cell office:value-type="float" office:value="2359" table:style-name="ce191">
            <text:p><text:s text:c="3"/>2,359</text:p>
          </table:table-cell>
          <table:table-cell office:value-type="float" office:value="1373" table:style-name="ce191">
            <text:p><text:s text:c="3"/>1,373</text:p>
          </table:table-cell>
          <table:table-cell office:value-type="float" office:value="986" table:style-name="ce191">
            <text:p><text:s text:c="3"/>986</text:p>
          </table:table-cell>
          <table:table-cell office:value-type="float" office:value="7.10111870649762" table:style-name="ce192">
            <text:p>7.10</text:p>
          </table:table-cell>
          <table:table-cell office:value-type="float" office:value="-1095" table:style-name="ce191">
            <text:p>－ <text:s/>1,095</text:p>
          </table:table-cell>
          <table:table-cell office:value-type="float" office:value="-3.2961954148431101" table:style-name="ce67">
            <text:p>–3.30</text:p>
          </table:table-cell>
          <table:table-cell office:value-type="float" office:value="1022" table:style-name="ce191">
            <text:p><text:s text:c="3"/>1,022</text:p>
          </table:table-cell>
          <table:table-cell office:value-type="float" office:value="984" table:style-name="ce191">
            <text:p><text:s text:c="3"/>984</text:p>
          </table:table-cell>
          <table:table-cell office:value-type="float" office:value="38" table:style-name="ce191">
            <text:p><text:s text:c="3"/>38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27" table:style-name="ce191">
            <text:p><text:s text:c="3"/>27</text:p>
          </table:table-cell>
          <table:table-cell office:value-type="float" office:value="3.0764490538535698" table:style-name="ce192">
            <text:p>3.08</text:p>
          </table:table-cell>
          <table:table-cell office:value-type="float" office:value="685" table:style-name="ce191">
            <text:p><text:s text:c="3"/>685</text:p>
          </table:table-cell>
          <table:table-cell office:value-type="float" office:value="669" table:style-name="ce70">
            <text:p>669</text:p>
          </table:table-cell>
          <table:table-cell office:value-type="float" office:value="16" table:style-name="ce70">
            <text:p>16</text:p>
          </table:table-cell>
          <table:table-cell office:value-type="float" office:value="5" table:style-name="ce72">
            <text:p>5</text:p>
          </table:table-cell>
          <table:table-cell office:value-type="float" office:value="11" table:style-name="ce72">
            <text:p>11</text:p>
          </table:table-cell>
          <table:table-cell office:value-type="float" office:value="2.0620035243539099" table:style-name="ce65">
            <text:p>2.06</text:p>
          </table:table-cell>
          <table:table-cell office:value-type="float" office:value="11416" table:style-name="ce72">
            <text:p>11,416</text:p>
          </table:table-cell>
          <table:table-cell office:value-type="float" office:value="11585" table:style-name="ce72">
            <text:p>11,585</text:p>
          </table:table-cell>
          <table:table-cell office:value-type="float" office:value="65726" table:style-name="ce72">
            <text:p>65,726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82550" table:style-name="ce193">
            <text:p><text:s text:c="3"/>1,082,550</text:p>
          </table:table-cell>
          <table:table-cell office:value-type="float" office:value="2429429" table:style-name="ce193">
            <text:p><text:s text:c="3"/>2,429,429</text:p>
          </table:table-cell>
          <table:table-cell office:value-type="float" office:value="1143395" table:style-name="ce193">
            <text:p><text:s text:c="3"/>1,143,395</text:p>
          </table:table-cell>
          <table:table-cell office:value-type="float" office:value="1286034" table:style-name="ce193">
            <text:p><text:s text:c="3"/>1,286,034</text:p>
          </table:table-cell>
          <table:table-cell office:value-type="float" office:value="899" table:style-name="ce193">
            <text:p><text:s text:c="3"/>899</text:p>
          </table:table-cell>
          <table:table-cell office:value-type="float" office:value="480" table:style-name="ce193">
            <text:p><text:s text:c="3"/>480</text:p>
          </table:table-cell>
          <table:table-cell office:value-type="float" office:value="419" table:style-name="ce193">
            <text:p><text:s text:c="3"/>419</text:p>
          </table:table-cell>
          <table:table-cell office:value-type="float" office:value="4.5008742574641101" table:style-name="ce194">
            <text:p>4.50</text:p>
          </table:table-cell>
          <table:table-cell office:value-type="float" office:value="1552" table:style-name="ce193">
            <text:p><text:s text:c="3"/>1,552</text:p>
          </table:table-cell>
          <table:table-cell office:value-type="float" office:value="847" table:style-name="ce193">
            <text:p><text:s text:c="3"/>847</text:p>
          </table:table-cell>
          <table:table-cell office:value-type="float" office:value="705" table:style-name="ce193">
            <text:p><text:s text:c="3"/>705</text:p>
          </table:table-cell>
          <table:table-cell office:value-type="float" office:value="7.7701410985364801" table:style-name="ce194">
            <text:p>7.77</text:p>
          </table:table-cell>
          <table:table-cell office:value-type="float" office:value="-653" table:style-name="ce193">
            <text:p>－ <text:s/>653</text:p>
          </table:table-cell>
          <table:table-cell office:value-type="float" office:value="-3.26926684107237" table:style-name="ce67">
            <text:p>–3.27</text:p>
          </table:table-cell>
          <table:table-cell office:value-type="float" office:value="622" table:style-name="ce193">
            <text:p><text:s text:c="3"/>622</text:p>
          </table:table-cell>
          <table:table-cell office:value-type="float" office:value="594" table:style-name="ce193">
            <text:p><text:s text:c="3"/>594</text:p>
          </table:table-cell>
          <table:table-cell office:value-type="float" office:value="28" table:style-name="ce193">
            <text:p><text:s text:c="3"/>28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3.1140642804701599" table:style-name="ce194">
            <text:p>3.11</text:p>
          </table:table-cell>
          <table:table-cell office:value-type="float" office:value="356" table:style-name="ce193">
            <text:p><text:s text:c="3"/>356</text:p>
          </table:table-cell>
          <table:table-cell office:value-type="float" office:value="350" table:style-name="ce70">
            <text:p>350</text:p>
          </table:table-cell>
          <table:table-cell office:value-type="float" office:value="6" table:style-name="ce70">
            <text:p>6</text:p>
          </table:table-cell>
          <table:table-cell office:value-type="float" office:value="4" table:style-name="ce72">
            <text:p>4</text:p>
          </table:table-cell>
          <table:table-cell office:value-type="float" office:value="2" table:style-name="ce72">
            <text:p>2</text:p>
          </table:table-cell>
          <table:table-cell office:value-type="float" office:value="1.78232617981893" table:style-name="ce65">
            <text:p>1.78</text:p>
          </table:table-cell>
          <table:table-cell office:value-type="float" office:value="8402" table:style-name="ce72">
            <text:p>8,402</text:p>
          </table:table-cell>
          <table:table-cell office:value-type="float" office:value="9206" table:style-name="ce72">
            <text:p>9,206</text:p>
          </table:table-cell>
          <table:table-cell office:value-type="float" office:value="19714" table:style-name="ce72">
            <text:p>19,71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99991" table:style-name="ce195">
            <text:p><text:s text:c="3"/>999,991</text:p>
          </table:table-cell>
          <table:table-cell office:value-type="float" office:value="2356795" table:style-name="ce195">
            <text:p><text:s text:c="3"/>2,356,795</text:p>
          </table:table-cell>
          <table:table-cell office:value-type="float" office:value="1158428" table:style-name="ce195">
            <text:p><text:s text:c="3"/>1,158,428</text:p>
          </table:table-cell>
          <table:table-cell office:value-type="float" office:value="1198367" table:style-name="ce195">
            <text:p><text:s text:c="3"/>1,198,367</text:p>
          </table:table-cell>
          <table:table-cell office:value-type="float" office:value="1007" table:style-name="ce195">
            <text:p><text:s text:c="3"/>1,007</text:p>
          </table:table-cell>
          <table:table-cell office:value-type="float" office:value="511" table:style-name="ce195">
            <text:p><text:s text:c="3"/>511</text:p>
          </table:table-cell>
          <table:table-cell office:value-type="float" office:value="496" table:style-name="ce195">
            <text:p><text:s text:c="3"/>496</text:p>
          </table:table-cell>
          <table:table-cell office:value-type="float" office:value="5.19858192591298" table:style-name="ce196">
            <text:p>5.20</text:p>
          </table:table-cell>
          <table:table-cell office:value-type="float" office:value="1349" table:style-name="ce195">
            <text:p><text:s text:c="3"/>1,349</text:p>
          </table:table-cell>
          <table:table-cell office:value-type="float" office:value="817" table:style-name="ce195">
            <text:p><text:s text:c="3"/>817</text:p>
          </table:table-cell>
          <table:table-cell office:value-type="float" office:value="532" table:style-name="ce195">
            <text:p><text:s text:c="3"/>532</text:p>
          </table:table-cell>
          <table:table-cell office:value-type="float" office:value="6.9641380516947402" table:style-name="ce196">
            <text:p>6.96</text:p>
          </table:table-cell>
          <table:table-cell office:value-type="float" office:value="-342" table:style-name="ce195">
            <text:p>－ <text:s/>342</text:p>
          </table:table-cell>
          <table:table-cell office:value-type="float" office:value="-1.76555612578177" table:style-name="ce67">
            <text:p>–1.77</text:p>
          </table:table-cell>
          <table:table-cell office:value-type="float" office:value="639" table:style-name="ce195">
            <text:p><text:s text:c="3"/>639</text:p>
          </table:table-cell>
          <table:table-cell office:value-type="float" office:value="619" table:style-name="ce195">
            <text:p><text:s text:c="3"/>619</text:p>
          </table:table-cell>
          <table:table-cell office:value-type="float" office:value="20" table:style-name="ce195">
            <text:p><text:s text:c="3"/>20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16" table:style-name="ce195">
            <text:p><text:s text:c="3"/>16</text:p>
          </table:table-cell>
          <table:table-cell office:value-type="float" office:value="3.2988022350133002" table:style-name="ce196">
            <text:p>3.30</text:p>
          </table:table-cell>
          <table:table-cell office:value-type="float" office:value="505" table:style-name="ce195">
            <text:p><text:s text:c="3"/>505</text:p>
          </table:table-cell>
          <table:table-cell office:value-type="float" office:value="495" table:style-name="ce70">
            <text:p>495</text:p>
          </table:table-cell>
          <table:table-cell office:value-type="float" office:value="10" table:style-name="ce70">
            <text:p>10</text:p>
          </table:table-cell>
          <table:table-cell office:value-type="float" office:value="3" table:style-name="ce72">
            <text:p>3</text:p>
          </table:table-cell>
          <table:table-cell office:value-type="float" office:value="7" table:style-name="ce72">
            <text:p>7</text:p>
          </table:table-cell>
          <table:table-cell office:value-type="float" office:value="2.6070346301748302" table:style-name="ce65">
            <text:p>2.61</text:p>
          </table:table-cell>
          <table:table-cell office:value-type="float" office:value="7535" table:style-name="ce72">
            <text:p>7,535</text:p>
          </table:table-cell>
          <table:table-cell office:value-type="float" office:value="7132" table:style-name="ce72">
            <text:p>7,132</text:p>
          </table:table-cell>
          <table:table-cell office:value-type="float" office:value="91402" table:style-name="ce72">
            <text:p>91,402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76771" table:style-name="ce197">
            <text:p><text:s text:c="3"/>1,176,771</text:p>
          </table:table-cell>
          <table:table-cell office:value-type="float" office:value="2868452" table:style-name="ce197">
            <text:p><text:s text:c="3"/>2,868,452</text:p>
          </table:table-cell>
          <table:table-cell office:value-type="float" office:value="1397378" table:style-name="ce197">
            <text:p><text:s text:c="3"/>1,397,378</text:p>
          </table:table-cell>
          <table:table-cell office:value-type="float" office:value="1471074" table:style-name="ce197">
            <text:p><text:s text:c="3"/>1,471,074</text:p>
          </table:table-cell>
          <table:table-cell office:value-type="float" office:value="919" table:style-name="ce197">
            <text:p><text:s text:c="3"/>919</text:p>
          </table:table-cell>
          <table:table-cell office:value-type="float" office:value="484" table:style-name="ce197">
            <text:p><text:s text:c="3"/>484</text:p>
          </table:table-cell>
          <table:table-cell office:value-type="float" office:value="435" table:style-name="ce197">
            <text:p><text:s text:c="3"/>435</text:p>
          </table:table-cell>
          <table:table-cell office:value-type="float" office:value="3.8975465854332598" table:style-name="ce198">
            <text:p>3.90</text:p>
          </table:table-cell>
          <table:table-cell office:value-type="float" office:value="1623" table:style-name="ce197">
            <text:p><text:s text:c="3"/>1,623</text:p>
          </table:table-cell>
          <table:table-cell office:value-type="float" office:value="920" table:style-name="ce197">
            <text:p><text:s text:c="3"/>920</text:p>
          </table:table-cell>
          <table:table-cell office:value-type="float" office:value="703" table:style-name="ce197">
            <text:p><text:s text:c="3"/>703</text:p>
          </table:table-cell>
          <table:table-cell office:value-type="float" office:value="6.8832623592580902" table:style-name="ce198">
            <text:p>6.88</text:p>
          </table:table-cell>
          <table:table-cell office:value-type="float" office:value="-704" table:style-name="ce197">
            <text:p>－ <text:s/>704</text:p>
          </table:table-cell>
          <table:table-cell office:value-type="float" office:value="-2.9857157738248299" table:style-name="ce67">
            <text:p>–2.99</text:p>
          </table:table-cell>
          <table:table-cell office:value-type="float" office:value="732" table:style-name="ce197">
            <text:p><text:s text:c="3"/>732</text:p>
          </table:table-cell>
          <table:table-cell office:value-type="float" office:value="705" table:style-name="ce197">
            <text:p><text:s text:c="3"/>705</text:p>
          </table:table-cell>
          <table:table-cell office:value-type="float" office:value="27" table:style-name="ce197">
            <text:p><text:s text:c="3"/>27</text:p>
          </table:table-cell>
          <table:table-cell office:value-type="float" office:value="11" table:style-name="ce197">
            <text:p><text:s text:c="3"/>11</text:p>
          </table:table-cell>
          <table:table-cell office:value-type="float" office:value="16" table:style-name="ce197">
            <text:p><text:s text:c="3"/>16</text:p>
          </table:table-cell>
          <table:table-cell office:value-type="float" office:value="3.10446583301104" table:style-name="ce198">
            <text:p>3.10</text:p>
          </table:table-cell>
          <table:table-cell office:value-type="float" office:value="540" table:style-name="ce197">
            <text:p><text:s text:c="3"/>540</text:p>
          </table:table-cell>
          <table:table-cell office:value-type="float" office:value="525" table:style-name="ce70">
            <text:p>525</text:p>
          </table:table-cell>
          <table:table-cell office:value-type="float" office:value="15" table:style-name="ce70">
            <text:p>15</text:p>
          </table:table-cell>
          <table:table-cell office:value-type="float" office:value="5" table:style-name="ce72">
            <text:p>5</text:p>
          </table:table-cell>
          <table:table-cell office:value-type="float" office:value="10" table:style-name="ce72">
            <text:p>10</text:p>
          </table:table-cell>
          <table:table-cell office:value-type="float" office:value="2.2901797128769998" table:style-name="ce65">
            <text:p>2.29</text:p>
          </table:table-cell>
          <table:table-cell office:value-type="float" office:value="8721" table:style-name="ce72">
            <text:p>8,721</text:p>
          </table:table-cell>
          <table:table-cell office:value-type="float" office:value="8654" table:style-name="ce72">
            <text:p>8,654</text:p>
          </table:table-cell>
          <table:table-cell office:value-type="float" office:value="42851" table:style-name="ce72">
            <text:p>42,85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80503" table:style-name="ce199">
            <text:p><text:s text:c="3"/>780,503</text:p>
          </table:table-cell>
          <table:table-cell office:value-type="float" office:value="1849762" table:style-name="ce199">
            <text:p><text:s text:c="3"/>1,849,762</text:p>
          </table:table-cell>
          <table:table-cell office:value-type="float" office:value="915655" table:style-name="ce199">
            <text:p><text:s text:c="3"/>915,655</text:p>
          </table:table-cell>
          <table:table-cell office:value-type="float" office:value="934107" table:style-name="ce199">
            <text:p><text:s text:c="3"/>934,107</text:p>
          </table:table-cell>
          <table:table-cell office:value-type="float" office:value="531" table:style-name="ce199">
            <text:p><text:s text:c="3"/>531</text:p>
          </table:table-cell>
          <table:table-cell office:value-type="float" office:value="266" table:style-name="ce199">
            <text:p><text:s text:c="3"/>266</text:p>
          </table:table-cell>
          <table:table-cell office:value-type="float" office:value="265" table:style-name="ce199">
            <text:p><text:s text:c="3"/>265</text:p>
          </table:table-cell>
          <table:table-cell office:value-type="float" office:value="3.4917978827073699" table:style-name="ce200">
            <text:p>3.49</text:p>
          </table:table-cell>
          <table:table-cell office:value-type="float" office:value="1400" table:style-name="ce199">
            <text:p><text:s text:c="3"/>1,400</text:p>
          </table:table-cell>
          <table:table-cell office:value-type="float" office:value="788" table:style-name="ce199">
            <text:p><text:s text:c="3"/>788</text:p>
          </table:table-cell>
          <table:table-cell office:value-type="float" office:value="612" table:style-name="ce199">
            <text:p><text:s text:c="3"/>612</text:p>
          </table:table-cell>
          <table:table-cell office:value-type="float" office:value="9.2062467717331806" table:style-name="ce200">
            <text:p>9.21</text:p>
          </table:table-cell>
          <table:table-cell office:value-type="float" office:value="-869" table:style-name="ce199">
            <text:p>－ <text:s/>869</text:p>
          </table:table-cell>
          <table:table-cell office:value-type="float" office:value="-5.7144488890258103" table:style-name="ce67">
            <text:p>–5.71</text:p>
          </table:table-cell>
          <table:table-cell office:value-type="float" office:value="470" table:style-name="ce199">
            <text:p><text:s text:c="3"/>470</text:p>
          </table:table-cell>
          <table:table-cell office:value-type="float" office:value="457" table:style-name="ce199">
            <text:p><text:s text:c="3"/>457</text:p>
          </table:table-cell>
          <table:table-cell office:value-type="float" office:value="13" table:style-name="ce199">
            <text:p><text:s text:c="3"/>13</text:p>
          </table:table-cell>
          <table:table-cell office:value-type="float" office:value="5" table:style-name="ce199">
            <text:p><text:s text:c="3"/>5</text:p>
          </table:table-cell>
          <table:table-cell office:value-type="float" office:value="8" table:style-name="ce199">
            <text:p><text:s text:c="3"/>8</text:p>
          </table:table-cell>
          <table:table-cell office:value-type="float" office:value="3.0906685590818501" table:style-name="ce200">
            <text:p>3.09</text:p>
          </table:table-cell>
          <table:table-cell office:value-type="float" office:value="304" table:style-name="ce199">
            <text:p><text:s text:c="3"/>304</text:p>
          </table:table-cell>
          <table:table-cell office:value-type="float" office:value="299" table:style-name="ce70">
            <text:p>299</text:p>
          </table:table-cell>
          <table:table-cell office:value-type="float" office:value="5" table:style-name="ce70">
            <text:p>5</text:p>
          </table:table-cell>
          <table:table-cell office:value-type="float" office:value="0" table:style-name="ce72">
            <text:p>—</text:p>
          </table:table-cell>
          <table:table-cell office:value-type="float" office:value="5" table:style-name="ce72">
            <text:p>5</text:p>
          </table:table-cell>
          <table:table-cell office:value-type="float" office:value="1.99907072757635" table:style-name="ce65">
            <text:p>2.00</text:p>
          </table:table-cell>
          <table:table-cell office:value-type="float" office:value="4814" table:style-name="ce72">
            <text:p>4,814</text:p>
          </table:table-cell>
          <table:table-cell office:value-type="float" office:value="4807" table:style-name="ce72">
            <text:p>4,807</text:p>
          </table:table-cell>
          <table:table-cell office:value-type="float" office:value="11456" table:style-name="ce72">
            <text:p>11,456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214026" table:style-name="ce201">
            <text:p><text:s text:c="3"/>1,214,026</text:p>
          </table:table-cell>
          <table:table-cell office:value-type="float" office:value="2713032" table:style-name="ce201">
            <text:p><text:s text:c="3"/>2,713,032</text:p>
          </table:table-cell>
          <table:table-cell office:value-type="float" office:value="1325897" table:style-name="ce201">
            <text:p><text:s text:c="3"/>1,325,897</text:p>
          </table:table-cell>
          <table:table-cell office:value-type="float" office:value="1387135" table:style-name="ce201">
            <text:p><text:s text:c="3"/>1,387,135</text:p>
          </table:table-cell>
          <table:table-cell office:value-type="float" office:value="977" table:style-name="ce201">
            <text:p><text:s text:c="3"/>977</text:p>
          </table:table-cell>
          <table:table-cell office:value-type="float" office:value="518" table:style-name="ce201">
            <text:p><text:s text:c="3"/>518</text:p>
          </table:table-cell>
          <table:table-cell office:value-type="float" office:value="459" table:style-name="ce201">
            <text:p><text:s text:c="3"/>459</text:p>
          </table:table-cell>
          <table:table-cell office:value-type="float" office:value="4.3801910785504301" table:style-name="ce202">
            <text:p>4.38</text:p>
          </table:table-cell>
          <table:table-cell office:value-type="float" office:value="2010" table:style-name="ce201">
            <text:p><text:s text:c="3"/>2,010</text:p>
          </table:table-cell>
          <table:table-cell office:value-type="float" office:value="1165" table:style-name="ce201">
            <text:p><text:s text:c="3"/>1,165</text:p>
          </table:table-cell>
          <table:table-cell office:value-type="float" office:value="845" table:style-name="ce201">
            <text:p><text:s text:c="3"/>845</text:p>
          </table:table-cell>
          <table:table-cell office:value-type="float" office:value="9.0114473570996498" table:style-name="ce202">
            <text:p>9.01</text:p>
          </table:table-cell>
          <table:table-cell office:value-type="float" office:value="-1033" table:style-name="ce201">
            <text:p>－ <text:s/>1,033</text:p>
          </table:table-cell>
          <table:table-cell office:value-type="float" office:value="-4.6312562785492197" table:style-name="ce67">
            <text:p>–4.63</text:p>
          </table:table-cell>
          <table:table-cell office:value-type="float" office:value="682" table:style-name="ce201">
            <text:p><text:s text:c="3"/>682</text:p>
          </table:table-cell>
          <table:table-cell office:value-type="float" office:value="655" table:style-name="ce201">
            <text:p><text:s text:c="3"/>655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3.0576154714139099" table:style-name="ce202">
            <text:p>3.06</text:p>
          </table:table-cell>
          <table:table-cell office:value-type="float" office:value="460" table:style-name="ce201">
            <text:p><text:s text:c="3"/>460</text:p>
          </table:table-cell>
          <table:table-cell office:value-type="float" office:value="453" table:style-name="ce70">
            <text:p>453</text:p>
          </table:table-cell>
          <table:table-cell office:value-type="float" office:value="7" table:style-name="ce70">
            <text:p>7</text:p>
          </table:table-cell>
          <table:table-cell office:value-type="float" office:value="2" table:style-name="ce72">
            <text:p>2</text:p>
          </table:table-cell>
          <table:table-cell office:value-type="float" office:value="5" table:style-name="ce72">
            <text:p>5</text:p>
          </table:table-cell>
          <table:table-cell office:value-type="float" office:value="2.0623212857044" table:style-name="ce65">
            <text:p>2.06</text:p>
          </table:table-cell>
          <table:table-cell office:value-type="float" office:value="7621" table:style-name="ce72">
            <text:p>7,621</text:p>
          </table:table-cell>
          <table:table-cell office:value-type="float" office:value="8065" table:style-name="ce72">
            <text:p>8,065</text:p>
          </table:table-cell>
          <table:table-cell office:value-type="float" office:value="42114" table:style-name="ce72">
            <text:p>42,114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3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794949" table:style-name="ce203">
            <text:p><text:s text:c="3"/>2,794,949</text:p>
          </table:table-cell>
          <table:table-cell office:value-type="float" office:value="6852026" table:style-name="ce203">
            <text:p><text:s text:c="3"/>6,852,026</text:p>
          </table:table-cell>
          <table:table-cell office:value-type="float" office:value="3462941" table:style-name="ce203">
            <text:p><text:s text:c="3"/>3,462,941</text:p>
          </table:table-cell>
          <table:table-cell office:value-type="float" office:value="3389085" table:style-name="ce203">
            <text:p><text:s text:c="3"/>3,389,085</text:p>
          </table:table-cell>
          <table:table-cell office:value-type="float" office:value="2488" table:style-name="ce203">
            <text:p><text:s text:c="3"/>2,488</text:p>
          </table:table-cell>
          <table:table-cell office:value-type="float" office:value="1346" table:style-name="ce203">
            <text:p><text:s text:c="3"/>1,346</text:p>
          </table:table-cell>
          <table:table-cell office:value-type="float" office:value="1142" table:style-name="ce203">
            <text:p><text:s text:c="3"/>1,142</text:p>
          </table:table-cell>
          <table:table-cell office:value-type="float" office:value="4.4170532536734504" table:style-name="ce204">
            <text:p>4.42</text:p>
          </table:table-cell>
          <table:table-cell office:value-type="float" office:value="5620" table:style-name="ce203">
            <text:p><text:s text:c="3"/>5,620</text:p>
          </table:table-cell>
          <table:table-cell office:value-type="float" office:value="3269" table:style-name="ce203">
            <text:p><text:s text:c="3"/>3,269</text:p>
          </table:table-cell>
          <table:table-cell office:value-type="float" office:value="2351" table:style-name="ce203">
            <text:p><text:s text:c="3"/>2,351</text:p>
          </table:table-cell>
          <table:table-cell office:value-type="float" office:value="9.9774273656128596" table:style-name="ce204">
            <text:p>9.98</text:p>
          </table:table-cell>
          <table:table-cell office:value-type="float" office:value="-3132" table:style-name="ce203">
            <text:p>－ <text:s/>3,132</text:p>
          </table:table-cell>
          <table:table-cell office:value-type="float" office:value="-5.5603741119394101" table:style-name="ce67">
            <text:p>–5.56</text:p>
          </table:table-cell>
          <table:table-cell office:value-type="float" office:value="1584" table:style-name="ce203">
            <text:p><text:s text:c="3"/>1,584</text:p>
          </table:table-cell>
          <table:table-cell office:value-type="float" office:value="1535" table:style-name="ce203">
            <text:p><text:s text:c="3"/>1,535</text:p>
          </table:table-cell>
          <table:table-cell office:value-type="float" office:value="49" table:style-name="ce203">
            <text:p><text:s text:c="3"/>49</text:p>
          </table:table-cell>
          <table:table-cell office:value-type="float" office:value="15" table:style-name="ce203">
            <text:p><text:s text:c="3"/>15</text:p>
          </table:table-cell>
          <table:table-cell office:value-type="float" office:value="34" table:style-name="ce203">
            <text:p><text:s text:c="3"/>34</text:p>
          </table:table-cell>
          <table:table-cell office:value-type="float" office:value="2.8121432290268298" table:style-name="ce204">
            <text:p>2.81</text:p>
          </table:table-cell>
          <table:table-cell office:value-type="float" office:value="1216" table:style-name="ce203">
            <text:p><text:s text:c="3"/>1,216</text:p>
          </table:table-cell>
          <table:table-cell office:value-type="float" office:value="1200" table:style-name="ce72">
            <text:p>1,200</text:p>
          </table:table-cell>
          <table:table-cell office:value-type="float" office:value="16" table:style-name="ce70">
            <text:p>16</text:p>
          </table:table-cell>
          <table:table-cell office:value-type="float" office:value="6" table:style-name="ce72">
            <text:p>6</text:p>
          </table:table-cell>
          <table:table-cell office:value-type="float" office:value="10" table:style-name="ce72">
            <text:p>10</text:p>
          </table:table-cell>
          <table:table-cell office:value-type="float" office:value="2.1588170243034202" table:style-name="ce65">
            <text:p>2.16</text:p>
          </table:table-cell>
          <table:table-cell office:value-type="float" office:value="20031" table:style-name="ce72">
            <text:p>20,031</text:p>
          </table:table-cell>
          <table:table-cell office:value-type="float" office:value="19119" table:style-name="ce72">
            <text:p>19,119</text:p>
          </table:table-cell>
          <table:table-cell office:value-type="float" office:value="361294" table:style-name="ce72">
            <text:p>361,294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94562" table:style-name="ce205">
            <text:p><text:s text:c="3"/>194,562</text:p>
          </table:table-cell>
          <table:table-cell office:value-type="float" office:value="448763" table:style-name="ce205">
            <text:p><text:s text:c="3"/>448,763</text:p>
          </table:table-cell>
          <table:table-cell office:value-type="float" office:value="224635" table:style-name="ce205">
            <text:p><text:s text:c="3"/>224,635</text:p>
          </table:table-cell>
          <table:table-cell office:value-type="float" office:value="224128" table:style-name="ce205">
            <text:p><text:s text:c="3"/>224,128</text:p>
          </table:table-cell>
          <table:table-cell office:value-type="float" office:value="148" table:style-name="ce205">
            <text:p><text:s text:c="3"/>148</text:p>
          </table:table-cell>
          <table:table-cell office:value-type="float" office:value="77" table:style-name="ce205">
            <text:p><text:s text:c="3"/>77</text:p>
          </table:table-cell>
          <table:table-cell office:value-type="float" office:value="71" table:style-name="ce205">
            <text:p><text:s text:c="3"/>71</text:p>
          </table:table-cell>
          <table:table-cell office:value-type="float" office:value="4.0123057908817703" table:style-name="ce206">
            <text:p>4.01</text:p>
          </table:table-cell>
          <table:table-cell office:value-type="float" office:value="324" table:style-name="ce205">
            <text:p><text:s text:c="3"/>324</text:p>
          </table:table-cell>
          <table:table-cell office:value-type="float" office:value="190" table:style-name="ce205">
            <text:p><text:s text:c="3"/>190</text:p>
          </table:table-cell>
          <table:table-cell office:value-type="float" office:value="134" table:style-name="ce205">
            <text:p><text:s text:c="3"/>134</text:p>
          </table:table-cell>
          <table:table-cell office:value-type="float" office:value="8.7836964611195505" table:style-name="ce206">
            <text:p>8.78</text:p>
          </table:table-cell>
          <table:table-cell office:value-type="float" office:value="-176" table:style-name="ce205">
            <text:p>－ <text:s/>176</text:p>
          </table:table-cell>
          <table:table-cell office:value-type="float" office:value="-4.7713906702377802" table:style-name="ce124">
            <text:p>–4.77</text:p>
          </table:table-cell>
          <table:table-cell office:value-type="float" office:value="103" table:style-name="ce205">
            <text:p><text:s text:c="3"/>103</text:p>
          </table:table-cell>
          <table:table-cell office:value-type="float" office:value="98" table:style-name="ce205">
            <text:p><text:s text:c="3"/>98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0" table:style-name="ce205">
            <text:p>—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2.7923479490596099" table:style-name="ce206">
            <text:p>2.79</text:p>
          </table:table-cell>
          <table:table-cell office:value-type="float" office:value="94" table:style-name="ce205">
            <text:p><text:s text:c="3"/>94</text:p>
          </table:table-cell>
          <table:table-cell office:value-type="float" office:value="94" table:style-name="ce66">
            <text:p>94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5483563806951799" table:style-name="ce123">
            <text:p>2.55</text:p>
          </table:table-cell>
          <table:table-cell office:value-type="float" office:value="1841" table:style-name="ce64">
            <text:p>1,841</text:p>
          </table:table-cell>
          <table:table-cell office:value-type="float" office:value="1711" table:style-name="ce64">
            <text:p>1,711</text:p>
          </table:table-cell>
          <table:table-cell office:value-type="float" office:value="19959" table:style-name="ce64">
            <text:p>19,95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43079" table:style-name="ce207">
            <text:p><text:s text:c="3"/>243,079</text:p>
          </table:table-cell>
          <table:table-cell office:value-type="float" office:value="597286" table:style-name="ce207">
            <text:p><text:s text:c="3"/>597,286</text:p>
          </table:table-cell>
          <table:table-cell office:value-type="float" office:value="303831" table:style-name="ce207">
            <text:p><text:s text:c="3"/>303,831</text:p>
          </table:table-cell>
          <table:table-cell office:value-type="float" office:value="293455" table:style-name="ce207">
            <text:p><text:s text:c="3"/>293,455</text:p>
          </table:table-cell>
          <table:table-cell office:value-type="float" office:value="242" table:style-name="ce207">
            <text:p><text:s text:c="3"/>242</text:p>
          </table:table-cell>
          <table:table-cell office:value-type="float" office:value="137" table:style-name="ce207">
            <text:p><text:s text:c="3"/>137</text:p>
          </table:table-cell>
          <table:table-cell office:value-type="float" office:value="105" table:style-name="ce207">
            <text:p><text:s text:c="3"/>105</text:p>
          </table:table-cell>
          <table:table-cell office:value-type="float" office:value="4.9293962898661396" table:style-name="ce208">
            <text:p>4.93</text:p>
          </table:table-cell>
          <table:table-cell office:value-type="float" office:value="367" table:style-name="ce207">
            <text:p><text:s text:c="3"/>367</text:p>
          </table:table-cell>
          <table:table-cell office:value-type="float" office:value="213" table:style-name="ce207">
            <text:p><text:s text:c="3"/>213</text:p>
          </table:table-cell>
          <table:table-cell office:value-type="float" office:value="154" table:style-name="ce207">
            <text:p><text:s text:c="3"/>154</text:p>
          </table:table-cell>
          <table:table-cell office:value-type="float" office:value="7.4755720594250903" table:style-name="ce208">
            <text:p>7.48</text:p>
          </table:table-cell>
          <table:table-cell office:value-type="float" office:value="-125" table:style-name="ce207">
            <text:p>－ <text:s/>125</text:p>
          </table:table-cell>
          <table:table-cell office:value-type="float" office:value="-2.54617576955896" table:style-name="ce124">
            <text:p>–2.55</text:p>
          </table:table-cell>
          <table:table-cell office:value-type="float" office:value="132" table:style-name="ce207">
            <text:p><text:s text:c="3"/>132</text:p>
          </table:table-cell>
          <table:table-cell office:value-type="float" office:value="126" table:style-name="ce207">
            <text:p><text:s text:c="3"/>126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2.6887616126542602" table:style-name="ce208">
            <text:p>2.69</text:p>
          </table:table-cell>
          <table:table-cell office:value-type="float" office:value="105" table:style-name="ce207">
            <text:p><text:s text:c="3"/>105</text:p>
          </table:table-cell>
          <table:table-cell office:value-type="float" office:value="104" table:style-name="ce66">
            <text:p>104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1387876464295199" table:style-name="ce123">
            <text:p>2.14</text:p>
          </table:table-cell>
          <table:table-cell office:value-type="float" office:value="1677" table:style-name="ce64">
            <text:p>1,677</text:p>
          </table:table-cell>
          <table:table-cell office:value-type="float" office:value="1582" table:style-name="ce64">
            <text:p>1,582</text:p>
          </table:table-cell>
          <table:table-cell office:value-type="float" office:value="23700" table:style-name="ce64">
            <text:p>23,70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13436" table:style-name="ce209">
            <text:p><text:s text:c="3"/>213,436</text:p>
          </table:table-cell>
          <table:table-cell office:value-type="float" office:value="530213" table:style-name="ce209">
            <text:p><text:s text:c="3"/>530,213</text:p>
          </table:table-cell>
          <table:table-cell office:value-type="float" office:value="272226" table:style-name="ce209">
            <text:p><text:s text:c="3"/>272,226</text:p>
          </table:table-cell>
          <table:table-cell office:value-type="float" office:value="257987" table:style-name="ce209">
            <text:p><text:s text:c="3"/>257,987</text:p>
          </table:table-cell>
          <table:table-cell office:value-type="float" office:value="179" table:style-name="ce209">
            <text:p><text:s text:c="3"/>179</text:p>
          </table:table-cell>
          <table:table-cell office:value-type="float" office:value="93" table:style-name="ce209">
            <text:p><text:s text:c="3"/>93</text:p>
          </table:table-cell>
          <table:table-cell office:value-type="float" office:value="86" table:style-name="ce209">
            <text:p><text:s text:c="3"/>86</text:p>
          </table:table-cell>
          <table:table-cell office:value-type="float" office:value="4.1069885122499299" table:style-name="ce210">
            <text:p>4.11</text:p>
          </table:table-cell>
          <table:table-cell office:value-type="float" office:value="443" table:style-name="ce209">
            <text:p><text:s text:c="3"/>443</text:p>
          </table:table-cell>
          <table:table-cell office:value-type="float" office:value="260" table:style-name="ce209">
            <text:p><text:s text:c="3"/>260</text:p>
          </table:table-cell>
          <table:table-cell office:value-type="float" office:value="183" table:style-name="ce209">
            <text:p><text:s text:c="3"/>183</text:p>
          </table:table-cell>
          <table:table-cell office:value-type="float" office:value="10.16422296607106" table:style-name="ce210">
            <text:p>10.16</text:p>
          </table:table-cell>
          <table:table-cell office:value-type="float" office:value="-264" table:style-name="ce209">
            <text:p>－ <text:s/>264</text:p>
          </table:table-cell>
          <table:table-cell office:value-type="float" office:value="-6.0572344538211302" table:style-name="ce124">
            <text:p>–6.06</text:p>
          </table:table-cell>
          <table:table-cell office:value-type="float" office:value="129" table:style-name="ce209">
            <text:p><text:s text:c="3"/>129</text:p>
          </table:table-cell>
          <table:table-cell office:value-type="float" office:value="128" table:style-name="ce209">
            <text:p><text:s text:c="3"/>128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0" table:style-name="ce209">
            <text:p>—</text:p>
          </table:table-cell>
          <table:table-cell office:value-type="float" office:value="2.9597850172080502" table:style-name="ce210">
            <text:p>2.96</text:p>
          </table:table-cell>
          <table:table-cell office:value-type="float" office:value="111" table:style-name="ce209">
            <text:p><text:s text:c="3"/>111</text:p>
          </table:table-cell>
          <table:table-cell office:value-type="float" office:value="110" table:style-name="ce66">
            <text:p>110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2.5467917589929701" table:style-name="ce123">
            <text:p>2.55</text:p>
          </table:table-cell>
          <table:table-cell office:value-type="float" office:value="1303" table:style-name="ce64">
            <text:p>1,303</text:p>
          </table:table-cell>
          <table:table-cell office:value-type="float" office:value="1163" table:style-name="ce64">
            <text:p>1,163</text:p>
          </table:table-cell>
          <table:table-cell office:value-type="float" office:value="12729" table:style-name="ce64">
            <text:p>12,72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45706" table:style-name="ce211">
            <text:p><text:s text:c="3"/>445,706</text:p>
          </table:table-cell>
          <table:table-cell office:value-type="float" office:value="1205583" table:style-name="ce211">
            <text:p><text:s text:c="3"/>1,205,583</text:p>
          </table:table-cell>
          <table:table-cell office:value-type="float" office:value="611008" table:style-name="ce211">
            <text:p><text:s text:c="3"/>611,008</text:p>
          </table:table-cell>
          <table:table-cell office:value-type="float" office:value="594575" table:style-name="ce211">
            <text:p><text:s text:c="3"/>594,575</text:p>
          </table:table-cell>
          <table:table-cell office:value-type="float" office:value="473" table:style-name="ce211">
            <text:p><text:s text:c="3"/>473</text:p>
          </table:table-cell>
          <table:table-cell office:value-type="float" office:value="252" table:style-name="ce211">
            <text:p><text:s text:c="3"/>252</text:p>
          </table:table-cell>
          <table:table-cell office:value-type="float" office:value="221" table:style-name="ce211">
            <text:p><text:s text:c="3"/>221</text:p>
          </table:table-cell>
          <table:table-cell office:value-type="float" office:value="4.7717541561966303" table:style-name="ce212">
            <text:p>4.77</text:p>
          </table:table-cell>
          <table:table-cell office:value-type="float" office:value="934" table:style-name="ce211">
            <text:p><text:s text:c="3"/>934</text:p>
          </table:table-cell>
          <table:table-cell office:value-type="float" office:value="540" table:style-name="ce211">
            <text:p><text:s text:c="3"/>540</text:p>
          </table:table-cell>
          <table:table-cell office:value-type="float" office:value="394" table:style-name="ce211">
            <text:p><text:s text:c="3"/>394</text:p>
          </table:table-cell>
          <table:table-cell office:value-type="float" office:value="9.4224490103332901" table:style-name="ce212">
            <text:p>9.42</text:p>
          </table:table-cell>
          <table:table-cell office:value-type="float" office:value="-461" table:style-name="ce211">
            <text:p>－ <text:s/>461</text:p>
          </table:table-cell>
          <table:table-cell office:value-type="float" office:value="-4.6506948541366704" table:style-name="ce124">
            <text:p>–4.65</text:p>
          </table:table-cell>
          <table:table-cell office:value-type="float" office:value="242" table:style-name="ce211">
            <text:p><text:s text:c="3"/>242</text:p>
          </table:table-cell>
          <table:table-cell office:value-type="float" office:value="239" table:style-name="ce211">
            <text:p><text:s text:c="3"/>239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0" table:style-name="ce211">
            <text:p>—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2.4413625915424602" table:style-name="ce212">
            <text:p>2.44</text:p>
          </table:table-cell>
          <table:table-cell office:value-type="float" office:value="171" table:style-name="ce211">
            <text:p><text:s text:c="3"/>171</text:p>
          </table:table-cell>
          <table:table-cell office:value-type="float" office:value="169" table:style-name="ce66">
            <text:p>169</text:p>
          </table:table-cell>
          <table:table-cell office:value-type="float" office:value="2" table:style-name="ce66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1.7250950543543799" table:style-name="ce123">
            <text:p>1.73</text:p>
          </table:table-cell>
          <table:table-cell office:value-type="float" office:value="2103" table:style-name="ce64">
            <text:p>2,103</text:p>
          </table:table-cell>
          <table:table-cell office:value-type="float" office:value="2517" table:style-name="ce64">
            <text:p>2,517</text:p>
          </table:table-cell>
          <table:table-cell office:value-type="float" office:value="7605" table:style-name="ce64">
            <text:p>7,605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90211" table:style-name="ce213">
            <text:p><text:s text:c="3"/>190,211</text:p>
          </table:table-cell>
          <table:table-cell office:value-type="float" office:value="467424" table:style-name="ce213">
            <text:p><text:s text:c="3"/>467,424</text:p>
          </table:table-cell>
          <table:table-cell office:value-type="float" office:value="237213" table:style-name="ce213">
            <text:p><text:s text:c="3"/>237,213</text:p>
          </table:table-cell>
          <table:table-cell office:value-type="float" office:value="230211" table:style-name="ce213">
            <text:p><text:s text:c="3"/>230,211</text:p>
          </table:table-cell>
          <table:table-cell office:value-type="float" office:value="154" table:style-name="ce213">
            <text:p><text:s text:c="3"/>154</text:p>
          </table:table-cell>
          <table:table-cell office:value-type="float" office:value="96" table:style-name="ce213">
            <text:p><text:s text:c="3"/>96</text:p>
          </table:table-cell>
          <table:table-cell office:value-type="float" office:value="58" table:style-name="ce213">
            <text:p><text:s text:c="3"/>58</text:p>
          </table:table-cell>
          <table:table-cell office:value-type="float" office:value="4.0085891206848503" table:style-name="ce214">
            <text:p>4.01</text:p>
          </table:table-cell>
          <table:table-cell office:value-type="float" office:value="425" table:style-name="ce213">
            <text:p><text:s text:c="3"/>425</text:p>
          </table:table-cell>
          <table:table-cell office:value-type="float" office:value="243" table:style-name="ce213">
            <text:p><text:s text:c="3"/>243</text:p>
          </table:table-cell>
          <table:table-cell office:value-type="float" office:value="182" table:style-name="ce213">
            <text:p><text:s text:c="3"/>182</text:p>
          </table:table-cell>
          <table:table-cell office:value-type="float" office:value="11.062664781110779" table:style-name="ce214">
            <text:p>11.06</text:p>
          </table:table-cell>
          <table:table-cell office:value-type="float" office:value="-271" table:style-name="ce213">
            <text:p>－ <text:s/>271</text:p>
          </table:table-cell>
          <table:table-cell office:value-type="float" office:value="-7.05407566042593" table:style-name="ce124">
            <text:p>–7.05</text:p>
          </table:table-cell>
          <table:table-cell office:value-type="float" office:value="97" table:style-name="ce213">
            <text:p><text:s text:c="3"/>97</text:p>
          </table:table-cell>
          <table:table-cell office:value-type="float" office:value="95" table:style-name="ce213">
            <text:p><text:s text:c="3"/>95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2.52489055004175" table:style-name="ce214">
            <text:p>2.52</text:p>
          </table:table-cell>
          <table:table-cell office:value-type="float" office:value="75" table:style-name="ce213">
            <text:p><text:s text:c="3"/>75</text:p>
          </table:table-cell>
          <table:table-cell office:value-type="float" office:value="74" table:style-name="ce66">
            <text:p>74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9522349613724901" table:style-name="ce123">
            <text:p>1.95</text:p>
          </table:table-cell>
          <table:table-cell office:value-type="float" office:value="1538" table:style-name="ce64">
            <text:p>1,538</text:p>
          </table:table-cell>
          <table:table-cell office:value-type="float" office:value="1245" table:style-name="ce64">
            <text:p>1,245</text:p>
          </table:table-cell>
          <table:table-cell office:value-type="float" office:value="30355" table:style-name="ce64">
            <text:p>30,35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62834" table:style-name="ce215">
            <text:p><text:s text:c="3"/>262,834</text:p>
          </table:table-cell>
          <table:table-cell office:value-type="float" office:value="648459" table:style-name="ce215">
            <text:p><text:s text:c="3"/>648,459</text:p>
          </table:table-cell>
          <table:table-cell office:value-type="float" office:value="332835" table:style-name="ce215">
            <text:p><text:s text:c="3"/>332,835</text:p>
          </table:table-cell>
          <table:table-cell office:value-type="float" office:value="315624" table:style-name="ce215">
            <text:p><text:s text:c="3"/>315,624</text:p>
          </table:table-cell>
          <table:table-cell office:value-type="float" office:value="271" table:style-name="ce215">
            <text:p><text:s text:c="3"/>271</text:p>
          </table:table-cell>
          <table:table-cell office:value-type="float" office:value="148" table:style-name="ce215">
            <text:p><text:s text:c="3"/>148</text:p>
          </table:table-cell>
          <table:table-cell office:value-type="float" office:value="123" table:style-name="ce215">
            <text:p><text:s text:c="3"/>123</text:p>
          </table:table-cell>
          <table:table-cell office:value-type="float" office:value="5.0829097789295199" table:style-name="ce216">
            <text:p>5.08</text:p>
          </table:table-cell>
          <table:table-cell office:value-type="float" office:value="622" table:style-name="ce215">
            <text:p><text:s text:c="3"/>622</text:p>
          </table:table-cell>
          <table:table-cell office:value-type="float" office:value="364" table:style-name="ce215">
            <text:p><text:s text:c="3"/>364</text:p>
          </table:table-cell>
          <table:table-cell office:value-type="float" office:value="258" table:style-name="ce215">
            <text:p><text:s text:c="3"/>258</text:p>
          </table:table-cell>
          <table:table-cell office:value-type="float" office:value="11.66630952949876" table:style-name="ce216">
            <text:p>11.67</text:p>
          </table:table-cell>
          <table:table-cell office:value-type="float" office:value="-351" table:style-name="ce215">
            <text:p>－ <text:s/>351</text:p>
          </table:table-cell>
          <table:table-cell office:value-type="float" office:value="-6.5833997505692397" table:style-name="ce124">
            <text:p>–6.58</text:p>
          </table:table-cell>
          <table:table-cell office:value-type="float" office:value="153" table:style-name="ce215">
            <text:p><text:s text:c="3"/>153</text:p>
          </table:table-cell>
          <table:table-cell office:value-type="float" office:value="148" table:style-name="ce215">
            <text:p><text:s text:c="3"/>148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2.8696870707609499" table:style-name="ce216">
            <text:p>2.87</text:p>
          </table:table-cell>
          <table:table-cell office:value-type="float" office:value="110" table:style-name="ce215">
            <text:p><text:s text:c="3"/>110</text:p>
          </table:table-cell>
          <table:table-cell office:value-type="float" office:value="110" table:style-name="ce66">
            <text:p>11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0631737110046" table:style-name="ce123">
            <text:p>2.06</text:p>
          </table:table-cell>
          <table:table-cell office:value-type="float" office:value="1784" table:style-name="ce64">
            <text:p>1,784</text:p>
          </table:table-cell>
          <table:table-cell office:value-type="float" office:value="1869" table:style-name="ce64">
            <text:p>1,869</text:p>
          </table:table-cell>
          <table:table-cell office:value-type="float" office:value="3759" table:style-name="ce64">
            <text:p>3,75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95570" table:style-name="ce217">
            <text:p><text:s text:c="3"/>195,570</text:p>
          </table:table-cell>
          <table:table-cell office:value-type="float" office:value="471253" table:style-name="ce217">
            <text:p><text:s text:c="3"/>471,253</text:p>
          </table:table-cell>
          <table:table-cell office:value-type="float" office:value="243626" table:style-name="ce217">
            <text:p><text:s text:c="3"/>243,626</text:p>
          </table:table-cell>
          <table:table-cell office:value-type="float" office:value="227627" table:style-name="ce217">
            <text:p><text:s text:c="3"/>227,627</text:p>
          </table:table-cell>
          <table:table-cell office:value-type="float" office:value="101" table:style-name="ce217">
            <text:p><text:s text:c="3"/>101</text:p>
          </table:table-cell>
          <table:table-cell office:value-type="float" office:value="55" table:style-name="ce217">
            <text:p><text:s text:c="3"/>55</text:p>
          </table:table-cell>
          <table:table-cell office:value-type="float" office:value="46" table:style-name="ce217">
            <text:p><text:s text:c="3"/>46</text:p>
          </table:table-cell>
          <table:table-cell office:value-type="float" office:value="2.6062793197586198" table:style-name="ce218">
            <text:p>2.61</text:p>
          </table:table-cell>
          <table:table-cell office:value-type="float" office:value="474" table:style-name="ce217">
            <text:p><text:s text:c="3"/>474</text:p>
          </table:table-cell>
          <table:table-cell office:value-type="float" office:value="276" table:style-name="ce217">
            <text:p><text:s text:c="3"/>276</text:p>
          </table:table-cell>
          <table:table-cell office:value-type="float" office:value="198" table:style-name="ce217">
            <text:p><text:s text:c="3"/>198</text:p>
          </table:table-cell>
          <table:table-cell office:value-type="float" office:value="12.231449480847401" table:style-name="ce218">
            <text:p>12.23</text:p>
          </table:table-cell>
          <table:table-cell office:value-type="float" office:value="-373" table:style-name="ce217">
            <text:p>－ <text:s/>373</text:p>
          </table:table-cell>
          <table:table-cell office:value-type="float" office:value="-9.6251701610887697" table:style-name="ce124">
            <text:p>–9.63</text:p>
          </table:table-cell>
          <table:table-cell office:value-type="float" office:value="115" table:style-name="ce217">
            <text:p><text:s text:c="3"/>115</text:p>
          </table:table-cell>
          <table:table-cell office:value-type="float" office:value="112" table:style-name="ce217">
            <text:p><text:s text:c="3"/>112</text:p>
          </table:table-cell>
          <table:table-cell office:value-type="float" office:value="3" table:style-name="ce217">
            <text:p><text:s text:c="3"/>3</text:p>
          </table:table-cell>
          <table:table-cell office:value-type="float" office:value="0" table:style-name="ce217">
            <text:p>—</text:p>
          </table:table-cell>
          <table:table-cell office:value-type="float" office:value="3" table:style-name="ce217">
            <text:p><text:s text:c="3"/>3</text:p>
          </table:table-cell>
          <table:table-cell office:value-type="float" office:value="2.9675457601212001" table:style-name="ce218">
            <text:p>2.97</text:p>
          </table:table-cell>
          <table:table-cell office:value-type="float" office:value="78" table:style-name="ce217">
            <text:p><text:s text:c="3"/>78</text:p>
          </table:table-cell>
          <table:table-cell office:value-type="float" office:value="76" table:style-name="ce66">
            <text:p>76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2</text:p>
          </table:table-cell>
          <table:table-cell office:value-type="float" office:value="2.0127701677343799" table:style-name="ce123">
            <text:p>2.01</text:p>
          </table:table-cell>
          <table:table-cell office:value-type="float" office:value="1298" table:style-name="ce64">
            <text:p>1,298</text:p>
          </table:table-cell>
          <table:table-cell office:value-type="float" office:value="1398" table:style-name="ce64">
            <text:p>1,398</text:p>
          </table:table-cell>
          <table:table-cell office:value-type="float" office:value="6452" table:style-name="ce64">
            <text:p>6,452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14316" table:style-name="ce219">
            <text:p><text:s text:c="3"/>314,316</text:p>
          </table:table-cell>
          <table:table-cell office:value-type="float" office:value="780101" table:style-name="ce219">
            <text:p><text:s text:c="3"/>780,101</text:p>
          </table:table-cell>
          <table:table-cell office:value-type="float" office:value="393783" table:style-name="ce219">
            <text:p><text:s text:c="3"/>393,783</text:p>
          </table:table-cell>
          <table:table-cell office:value-type="float" office:value="386318" table:style-name="ce219">
            <text:p><text:s text:c="3"/>386,318</text:p>
          </table:table-cell>
          <table:table-cell office:value-type="float" office:value="296" table:style-name="ce219">
            <text:p><text:s text:c="3"/>296</text:p>
          </table:table-cell>
          <table:table-cell office:value-type="float" office:value="164" table:style-name="ce219">
            <text:p><text:s text:c="3"/>164</text:p>
          </table:table-cell>
          <table:table-cell office:value-type="float" office:value="132" table:style-name="ce219">
            <text:p><text:s text:c="3"/>132</text:p>
          </table:table-cell>
          <table:table-cell office:value-type="float" office:value="4.6157152201115998" table:style-name="ce220">
            <text:p>4.62</text:p>
          </table:table-cell>
          <table:table-cell office:value-type="float" office:value="755" table:style-name="ce219">
            <text:p><text:s text:c="3"/>755</text:p>
          </table:table-cell>
          <table:table-cell office:value-type="float" office:value="448" table:style-name="ce219">
            <text:p><text:s text:c="3"/>448</text:p>
          </table:table-cell>
          <table:table-cell office:value-type="float" office:value="307" table:style-name="ce219">
            <text:p><text:s text:c="3"/>307</text:p>
          </table:table-cell>
          <table:table-cell office:value-type="float" office:value="11.773192537784659" table:style-name="ce220">
            <text:p>11.77</text:p>
          </table:table-cell>
          <table:table-cell office:value-type="float" office:value="-459" table:style-name="ce219">
            <text:p>－ <text:s/>459</text:p>
          </table:table-cell>
          <table:table-cell office:value-type="float" office:value="-7.1574773176730497" table:style-name="ce124">
            <text:p>–7.16</text:p>
          </table:table-cell>
          <table:table-cell office:value-type="float" office:value="172" table:style-name="ce219">
            <text:p><text:s text:c="3"/>172</text:p>
          </table:table-cell>
          <table:table-cell office:value-type="float" office:value="169" table:style-name="ce219">
            <text:p><text:s text:c="3"/>169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0" table:style-name="ce219">
            <text:p>—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2.6821047900648498" table:style-name="ce220">
            <text:p>2.68</text:p>
          </table:table-cell>
          <table:table-cell office:value-type="float" office:value="151" table:style-name="ce219">
            <text:p><text:s text:c="3"/>151</text:p>
          </table:table-cell>
          <table:table-cell office:value-type="float" office:value="149" table:style-name="ce66">
            <text:p>149</text:p>
          </table:table-cell>
          <table:table-cell office:value-type="float" office:value="2" table:style-name="ce66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2.3546385075569298" table:style-name="ce123">
            <text:p>2.35</text:p>
          </table:table-cell>
          <table:table-cell office:value-type="float" office:value="2410" table:style-name="ce64">
            <text:p>2,410</text:p>
          </table:table-cell>
          <table:table-cell office:value-type="float" office:value="2215" table:style-name="ce64">
            <text:p>2,215</text:p>
          </table:table-cell>
          <table:table-cell office:value-type="float" office:value="63575" table:style-name="ce64">
            <text:p>63,575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8027" table:style-name="ce221">
            <text:p><text:s text:c="3"/>88,027</text:p>
          </table:table-cell>
          <table:table-cell office:value-type="float" office:value="208068" table:style-name="ce221">
            <text:p><text:s text:c="3"/>208,068</text:p>
          </table:table-cell>
          <table:table-cell office:value-type="float" office:value="105665" table:style-name="ce221">
            <text:p><text:s text:c="3"/>105,665</text:p>
          </table:table-cell>
          <table:table-cell office:value-type="float" office:value="102403" table:style-name="ce221">
            <text:p><text:s text:c="3"/>102,403</text:p>
          </table:table-cell>
          <table:table-cell office:value-type="float" office:value="104" table:style-name="ce221">
            <text:p><text:s text:c="3"/>104</text:p>
          </table:table-cell>
          <table:table-cell office:value-type="float" office:value="53" table:style-name="ce221">
            <text:p><text:s text:c="3"/>53</text:p>
          </table:table-cell>
          <table:table-cell office:value-type="float" office:value="51" table:style-name="ce221">
            <text:p><text:s text:c="3"/>51</text:p>
          </table:table-cell>
          <table:table-cell office:value-type="float" office:value="6.0822952492883804" table:style-name="ce222">
            <text:p>6.08</text:p>
          </table:table-cell>
          <table:table-cell office:value-type="float" office:value="213" table:style-name="ce221">
            <text:p><text:s text:c="3"/>213</text:p>
          </table:table-cell>
          <table:table-cell office:value-type="float" office:value="135" table:style-name="ce221">
            <text:p><text:s text:c="3"/>135</text:p>
          </table:table-cell>
          <table:table-cell office:value-type="float" office:value="78" table:style-name="ce221">
            <text:p><text:s text:c="3"/>78</text:p>
          </table:table-cell>
          <table:table-cell office:value-type="float" office:value="12.457008539407941" table:style-name="ce222">
            <text:p>12.46</text:p>
          </table:table-cell>
          <table:table-cell office:value-type="float" office:value="-109" table:style-name="ce221">
            <text:p>－ <text:s/>109</text:p>
          </table:table-cell>
          <table:table-cell office:value-type="float" office:value="-6.3747132901195496" table:style-name="ce124">
            <text:p>–6.37</text:p>
          </table:table-cell>
          <table:table-cell office:value-type="float" office:value="60" table:style-name="ce221">
            <text:p><text:s text:c="3"/>60</text:p>
          </table:table-cell>
          <table:table-cell office:value-type="float" office:value="59" table:style-name="ce221">
            <text:p><text:s text:c="3"/>59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0" table:style-name="ce221">
            <text:p>—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3.5090164899740701" table:style-name="ce222">
            <text:p>3.51</text:p>
          </table:table-cell>
          <table:table-cell office:value-type="float" office:value="49" table:style-name="ce221">
            <text:p><text:s text:c="3"/>49</text:p>
          </table:table-cell>
          <table:table-cell office:value-type="float" office:value="49" table:style-name="ce66">
            <text:p>49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8656968001454901" table:style-name="ce123">
            <text:p>2.87</text:p>
          </table:table-cell>
          <table:table-cell office:value-type="float" office:value="824" table:style-name="ce64">
            <text:p>824</text:p>
          </table:table-cell>
          <table:table-cell office:value-type="float" office:value="650" table:style-name="ce64">
            <text:p>650</text:p>
          </table:table-cell>
          <table:table-cell office:value-type="float" office:value="79695" table:style-name="ce64">
            <text:p>79,69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4098" table:style-name="ce223">
            <text:p><text:s text:c="3"/>134,098</text:p>
          </table:table-cell>
          <table:table-cell office:value-type="float" office:value="311615" table:style-name="ce223">
            <text:p><text:s text:c="3"/>311,615</text:p>
          </table:table-cell>
          <table:table-cell office:value-type="float" office:value="155968" table:style-name="ce223">
            <text:p><text:s text:c="3"/>155,968</text:p>
          </table:table-cell>
          <table:table-cell office:value-type="float" office:value="155647" table:style-name="ce223">
            <text:p><text:s text:c="3"/>155,647</text:p>
          </table:table-cell>
          <table:table-cell office:value-type="float" office:value="122" table:style-name="ce223">
            <text:p><text:s text:c="3"/>122</text:p>
          </table:table-cell>
          <table:table-cell office:value-type="float" office:value="70" table:style-name="ce223">
            <text:p><text:s text:c="3"/>70</text:p>
          </table:table-cell>
          <table:table-cell office:value-type="float" office:value="52" table:style-name="ce223">
            <text:p><text:s text:c="3"/>52</text:p>
          </table:table-cell>
          <table:table-cell office:value-type="float" office:value="4.7616221594539301" table:style-name="ce224">
            <text:p>4.76</text:p>
          </table:table-cell>
          <table:table-cell office:value-type="float" office:value="293" table:style-name="ce223">
            <text:p><text:s text:c="3"/>293</text:p>
          </table:table-cell>
          <table:table-cell office:value-type="float" office:value="171" table:style-name="ce223">
            <text:p><text:s text:c="3"/>171</text:p>
          </table:table-cell>
          <table:table-cell office:value-type="float" office:value="122" table:style-name="ce223">
            <text:p><text:s text:c="3"/>122</text:p>
          </table:table-cell>
          <table:table-cell office:value-type="float" office:value="11.435699120655739" table:style-name="ce224">
            <text:p>11.44</text:p>
          </table:table-cell>
          <table:table-cell office:value-type="float" office:value="-171" table:style-name="ce223">
            <text:p>－ <text:s/>171</text:p>
          </table:table-cell>
          <table:table-cell office:value-type="float" office:value="-6.67407696120181" table:style-name="ce124">
            <text:p>–6.67</text:p>
          </table:table-cell>
          <table:table-cell office:value-type="float" office:value="87" table:style-name="ce223">
            <text:p><text:s text:c="3"/>87</text:p>
          </table:table-cell>
          <table:table-cell office:value-type="float" office:value="81" table:style-name="ce223">
            <text:p><text:s text:c="3"/>81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3.39558301534829" table:style-name="ce224">
            <text:p>3.40</text:p>
          </table:table-cell>
          <table:table-cell office:value-type="float" office:value="73" table:style-name="ce223">
            <text:p><text:s text:c="3"/>73</text:p>
          </table:table-cell>
          <table:table-cell office:value-type="float" office:value="73" table:style-name="ce66">
            <text:p>73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8491673577060399" table:style-name="ce123">
            <text:p>2.85</text:p>
          </table:table-cell>
          <table:table-cell office:value-type="float" office:value="1105" table:style-name="ce64">
            <text:p>1,105</text:p>
          </table:table-cell>
          <table:table-cell office:value-type="float" office:value="1161" table:style-name="ce64">
            <text:p>1,161</text:p>
          </table:table-cell>
          <table:table-cell office:value-type="float" office:value="95031" table:style-name="ce64">
            <text:p>95,03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5133" table:style-name="ce225">
            <text:p><text:s text:c="3"/>45,133</text:p>
          </table:table-cell>
          <table:table-cell office:value-type="float" office:value="106662" table:style-name="ce225">
            <text:p><text:s text:c="3"/>106,662</text:p>
          </table:table-cell>
          <table:table-cell office:value-type="float" office:value="54535" table:style-name="ce225">
            <text:p><text:s text:c="3"/>54,535</text:p>
          </table:table-cell>
          <table:table-cell office:value-type="float" office:value="52127" table:style-name="ce225">
            <text:p><text:s text:c="3"/>52,127</text:p>
          </table:table-cell>
          <table:table-cell office:value-type="float" office:value="53" table:style-name="ce225">
            <text:p><text:s text:c="3"/>53</text:p>
          </table:table-cell>
          <table:table-cell office:value-type="float" office:value="30" table:style-name="ce225">
            <text:p><text:s text:c="3"/>30</text:p>
          </table:table-cell>
          <table:table-cell office:value-type="float" office:value="23" table:style-name="ce225">
            <text:p><text:s text:c="3"/>23</text:p>
          </table:table-cell>
          <table:table-cell office:value-type="float" office:value="6.0482704822827396" table:style-name="ce226">
            <text:p>6.0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27" table:style-name="ce225">
            <text:p><text:s text:c="3"/>27</text:p>
          </table:table-cell>
          <table:table-cell office:value-type="float" office:value="30" table:style-name="ce225">
            <text:p><text:s text:c="3"/>30</text:p>
          </table:table-cell>
          <table:table-cell office:value-type="float" office:value="6.5047437262286101" table:style-name="ce226">
            <text:p>6.50</text:p>
          </table:table-cell>
          <table:table-cell office:value-type="float" office:value="-4" table:style-name="ce225">
            <text:p>－ <text:s/>4</text:p>
          </table:table-cell>
          <table:table-cell office:value-type="float" office:value="-0.45647324394587002" table:style-name="ce124">
            <text:p>–0.46</text:p>
          </table:table-cell>
          <table:table-cell office:value-type="float" office:value="34" table:style-name="ce225">
            <text:p><text:s text:c="3"/>34</text:p>
          </table:table-cell>
          <table:table-cell office:value-type="float" office:value="30" table:style-name="ce225">
            <text:p><text:s text:c="3"/>30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3.8800225735398701" table:style-name="ce226">
            <text:p>3.88</text:p>
          </table:table-cell>
          <table:table-cell office:value-type="float" office:value="18" table:style-name="ce225">
            <text:p><text:s text:c="3"/>18</text:p>
          </table:table-cell>
          <table:table-cell office:value-type="float" office:value="18" table:style-name="ce66">
            <text:p>18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0541295977564" table:style-name="ce123">
            <text:p>2.05</text:p>
          </table:table-cell>
          <table:table-cell office:value-type="float" office:value="523" table:style-name="ce64">
            <text:p>523</text:p>
          </table:table-cell>
          <table:table-cell office:value-type="float" office:value="424" table:style-name="ce64">
            <text:p>424</text:p>
          </table:table-cell>
          <table:table-cell office:value-type="float" office:value="866" table:style-name="ce64">
            <text:p>866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8826" table:style-name="ce227">
            <text:p><text:s text:c="3"/>168,826</text:p>
          </table:table-cell>
          <table:table-cell office:value-type="float" office:value="359102" table:style-name="ce227">
            <text:p><text:s text:c="3"/>359,102</text:p>
          </table:table-cell>
          <table:table-cell office:value-type="float" office:value="177825" table:style-name="ce227">
            <text:p><text:s text:c="3"/>177,825</text:p>
          </table:table-cell>
          <table:table-cell office:value-type="float" office:value="181277" table:style-name="ce227">
            <text:p><text:s text:c="3"/>181,277</text:p>
          </table:table-cell>
          <table:table-cell office:value-type="float" office:value="86" table:style-name="ce227">
            <text:p><text:s text:c="3"/>86</text:p>
          </table:table-cell>
          <table:table-cell office:value-type="float" office:value="40" table:style-name="ce227">
            <text:p><text:s text:c="3"/>40</text:p>
          </table:table-cell>
          <table:table-cell office:value-type="float" office:value="46" table:style-name="ce227">
            <text:p><text:s text:c="3"/>46</text:p>
          </table:table-cell>
          <table:table-cell office:value-type="float" office:value="2.9136279634028299" table:style-name="ce228">
            <text:p>2.91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164" table:style-name="ce227">
            <text:p><text:s text:c="3"/>164</text:p>
          </table:table-cell>
          <table:table-cell office:value-type="float" office:value="112" table:style-name="ce227">
            <text:p><text:s text:c="3"/>112</text:p>
          </table:table-cell>
          <table:table-cell office:value-type="float" office:value="9.3507129988276798" table:style-name="ce228">
            <text:p>9.35</text:p>
          </table:table-cell>
          <table:table-cell office:value-type="float" office:value="-190" table:style-name="ce227">
            <text:p>－ <text:s/>190</text:p>
          </table:table-cell>
          <table:table-cell office:value-type="float" office:value="-6.4370850354248503" table:style-name="ce124">
            <text:p>–6.44</text:p>
          </table:table-cell>
          <table:table-cell office:value-type="float" office:value="80" table:style-name="ce227">
            <text:p><text:s text:c="3"/>80</text:p>
          </table:table-cell>
          <table:table-cell office:value-type="float" office:value="75" table:style-name="ce227">
            <text:p><text:s text:c="3"/>75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2.7103515938631002" table:style-name="ce228">
            <text:p>2.71</text:p>
          </table:table-cell>
          <table:table-cell office:value-type="float" office:value="54" table:style-name="ce227">
            <text:p><text:s text:c="3"/>54</text:p>
          </table:table-cell>
          <table:table-cell office:value-type="float" office:value="53" table:style-name="ce66">
            <text:p>53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8294873258575901" table:style-name="ce123">
            <text:p>1.83</text:p>
          </table:table-cell>
          <table:table-cell office:value-type="float" office:value="1324" table:style-name="ce64">
            <text:p>1,324</text:p>
          </table:table-cell>
          <table:table-cell office:value-type="float" office:value="1164" table:style-name="ce64">
            <text:p>1,164</text:p>
          </table:table-cell>
          <table:table-cell office:value-type="float" office:value="10477" table:style-name="ce64">
            <text:p>10,477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9896" table:style-name="ce229">
            <text:p><text:s text:c="3"/>189,896</text:p>
          </table:table-cell>
          <table:table-cell office:value-type="float" office:value="455871" table:style-name="ce229">
            <text:p><text:s text:c="3"/>455,871</text:p>
          </table:table-cell>
          <table:table-cell office:value-type="float" office:value="224836" table:style-name="ce229">
            <text:p><text:s text:c="3"/>224,836</text:p>
          </table:table-cell>
          <table:table-cell office:value-type="float" office:value="231035" table:style-name="ce229">
            <text:p><text:s text:c="3"/>231,035</text:p>
          </table:table-cell>
          <table:table-cell office:value-type="float" office:value="194" table:style-name="ce229">
            <text:p><text:s text:c="3"/>194</text:p>
          </table:table-cell>
          <table:table-cell office:value-type="float" office:value="94" table:style-name="ce229">
            <text:p><text:s text:c="3"/>94</text:p>
          </table:table-cell>
          <table:table-cell office:value-type="float" office:value="100" table:style-name="ce229">
            <text:p><text:s text:c="3"/>100</text:p>
          </table:table-cell>
          <table:table-cell office:value-type="float" office:value="5.1777933284633804" table:style-name="ce230">
            <text:p>5.18</text:p>
          </table:table-cell>
          <table:table-cell office:value-type="float" office:value="254" table:style-name="ce229">
            <text:p><text:s text:c="3"/>254</text:p>
          </table:table-cell>
          <table:table-cell office:value-type="float" office:value="137" table:style-name="ce229">
            <text:p><text:s text:c="3"/>137</text:p>
          </table:table-cell>
          <table:table-cell office:value-type="float" office:value="117" table:style-name="ce229">
            <text:p><text:s text:c="3"/>117</text:p>
          </table:table-cell>
          <table:table-cell office:value-type="float" office:value="6.7791727084005204" table:style-name="ce230">
            <text:p>6.78</text:p>
          </table:table-cell>
          <table:table-cell office:value-type="float" office:value="-60" table:style-name="ce229">
            <text:p>－ <text:s/>60</text:p>
          </table:table-cell>
          <table:table-cell office:value-type="float" office:value="-1.6013793799371301" table:style-name="ce124">
            <text:p>–1.60</text:p>
          </table:table-cell>
          <table:table-cell office:value-type="float" office:value="121" table:style-name="ce229">
            <text:p><text:s text:c="3"/>121</text:p>
          </table:table-cell>
          <table:table-cell office:value-type="float" office:value="116" table:style-name="ce229">
            <text:p><text:s text:c="3"/>116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3.22944841620654" table:style-name="ce230">
            <text:p>3.23</text:p>
          </table:table-cell>
          <table:table-cell office:value-type="float" office:value="77" table:style-name="ce229">
            <text:p><text:s text:c="3"/>77</text:p>
          </table:table-cell>
          <table:table-cell office:value-type="float" office:value="72" table:style-name="ce66">
            <text:p>72</text:p>
          </table:table-cell>
          <table:table-cell office:value-type="float" office:value="5" table:style-name="ce66">
            <text:p>5</text:p>
          </table:table-cell>
          <table:table-cell office:value-type="float" office:value="3" table:style-name="ce64">
            <text:p>3</text:p>
          </table:table-cell>
          <table:table-cell office:value-type="float" office:value="2" table:style-name="ce64">
            <text:p>2</text:p>
          </table:table-cell>
          <table:table-cell office:value-type="float" office:value="2.0551035375859801" table:style-name="ce123">
            <text:p>2.06</text:p>
          </table:table-cell>
          <table:table-cell office:value-type="float" office:value="1355" table:style-name="ce64">
            <text:p>1,355</text:p>
          </table:table-cell>
          <table:table-cell office:value-type="float" office:value="1267" table:style-name="ce64">
            <text:p>1,267</text:p>
          </table:table-cell>
          <table:table-cell office:value-type="float" office:value="5565" table:style-name="ce64">
            <text:p>5,56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9255" table:style-name="ce231">
            <text:p><text:s text:c="3"/>109,255</text:p>
          </table:table-cell>
          <table:table-cell office:value-type="float" office:value="261626" table:style-name="ce231">
            <text:p><text:s text:c="3"/>261,626</text:p>
          </table:table-cell>
          <table:table-cell office:value-type="float" office:value="124955" table:style-name="ce231">
            <text:p><text:s text:c="3"/>124,955</text:p>
          </table:table-cell>
          <table:table-cell office:value-type="float" office:value="136671" table:style-name="ce231">
            <text:p><text:s text:c="3"/>136,671</text:p>
          </table:table-cell>
          <table:table-cell office:value-type="float" office:value="65" table:style-name="ce231">
            <text:p><text:s text:c="3"/>65</text:p>
          </table:table-cell>
          <table:table-cell office:value-type="float" office:value="37" table:style-name="ce231">
            <text:p><text:s text:c="3"/>37</text:p>
          </table:table-cell>
          <table:table-cell office:value-type="float" office:value="28" table:style-name="ce231">
            <text:p><text:s text:c="3"/>28</text:p>
          </table:table-cell>
          <table:table-cell office:value-type="float" office:value="3.02319610125573" table:style-name="ce232">
            <text:p>3.02</text:p>
          </table:table-cell>
          <table:table-cell office:value-type="float" office:value="183" table:style-name="ce231">
            <text:p><text:s text:c="3"/>183</text:p>
          </table:table-cell>
          <table:table-cell office:value-type="float" office:value="101" table:style-name="ce231">
            <text:p><text:s text:c="3"/>101</text:p>
          </table:table-cell>
          <table:table-cell office:value-type="float" office:value="82" table:style-name="ce231">
            <text:p><text:s text:c="3"/>82</text:p>
          </table:table-cell>
          <table:table-cell office:value-type="float" office:value="8.5114597927661197" table:style-name="ce232">
            <text:p>8.51</text:p>
          </table:table-cell>
          <table:table-cell office:value-type="float" office:value="-118" table:style-name="ce231">
            <text:p>－ <text:s/>118</text:p>
          </table:table-cell>
          <table:table-cell office:value-type="float" office:value="-5.4882636915103902" table:style-name="ce124">
            <text:p>–5.49</text:p>
          </table:table-cell>
          <table:table-cell office:value-type="float" office:value="59" table:style-name="ce231">
            <text:p><text:s text:c="3"/>59</text:p>
          </table:table-cell>
          <table:table-cell office:value-type="float" office:value="59" table:style-name="ce231">
            <text:p><text:s text:c="3"/>59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2.7441318457552" table:style-name="ce232">
            <text:p>2.74</text:p>
          </table:table-cell>
          <table:table-cell office:value-type="float" office:value="50" table:style-name="ce231">
            <text:p><text:s text:c="3"/>50</text:p>
          </table:table-cell>
          <table:table-cell office:value-type="float" office:value="49" table:style-name="ce66">
            <text:p>49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3255354625044" table:style-name="ce123">
            <text:p>2.33</text:p>
          </table:table-cell>
          <table:table-cell office:value-type="float" office:value="946" table:style-name="ce64">
            <text:p>946</text:p>
          </table:table-cell>
          <table:table-cell office:value-type="float" office:value="753" table:style-name="ce64">
            <text:p>753</text:p>
          </table:table-cell>
          <table:table-cell office:value-type="float" office:value="1526" table:style-name="ce64">
            <text:p>1,526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51043" table:style-name="ce233">
            <text:p><text:s text:c="3"/>51,043</text:p>
          </table:table-cell>
          <table:table-cell office:value-type="float" office:value="151899" table:style-name="ce233">
            <text:p><text:s text:c="3"/>151,899</text:p>
          </table:table-cell>
          <table:table-cell office:value-type="float" office:value="76618" table:style-name="ce233">
            <text:p><text:s text:c="3"/>76,618</text:p>
          </table:table-cell>
          <table:table-cell office:value-type="float" office:value="75281" table:style-name="ce233">
            <text:p><text:s text:c="3"/>75,281</text:p>
          </table:table-cell>
          <table:table-cell office:value-type="float" office:value="59" table:style-name="ce233">
            <text:p><text:s text:c="3"/>59</text:p>
          </table:table-cell>
          <table:table-cell office:value-type="float" office:value="31" table:style-name="ce233">
            <text:p><text:s text:c="3"/>31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4.7231159625309003" table:style-name="ce234">
            <text:p>4.72</text:p>
          </table:table-cell>
          <table:table-cell office:value-type="float" office:value="81" table:style-name="ce233">
            <text:p><text:s text:c="3"/>81</text:p>
          </table:table-cell>
          <table:table-cell office:value-type="float" office:value="42" table:style-name="ce233">
            <text:p><text:s text:c="3"/>42</text:p>
          </table:table-cell>
          <table:table-cell office:value-type="float" office:value="39" table:style-name="ce233">
            <text:p><text:s text:c="3"/>39</text:p>
          </table:table-cell>
          <table:table-cell office:value-type="float" office:value="6.4842778468644502" table:style-name="ce234">
            <text:p>6.48</text:p>
          </table:table-cell>
          <table:table-cell office:value-type="float" office:value="-22" table:style-name="ce233">
            <text:p>－ <text:s/>22</text:p>
          </table:table-cell>
          <table:table-cell office:value-type="float" office:value="-1.7611618843335499" table:style-name="ce67">
            <text:p>–1.76</text:p>
          </table:table-cell>
          <table:table-cell office:value-type="float" office:value="32" table:style-name="ce233">
            <text:p><text:s text:c="3"/>32</text:p>
          </table:table-cell>
          <table:table-cell office:value-type="float" office:value="30" table:style-name="ce233">
            <text:p><text:s text:c="3"/>30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0" table:style-name="ce233">
            <text:p>—</text:p>
          </table:table-cell>
          <table:table-cell office:value-type="float" office:value="2.5616900135760798" table:style-name="ce234">
            <text:p>2.56</text:p>
          </table:table-cell>
          <table:table-cell office:value-type="float" office:value="26" table:style-name="ce233">
            <text:p><text:s text:c="3"/>26</text:p>
          </table:table-cell>
          <table:table-cell office:value-type="float" office:value="25" table:style-name="ce70">
            <text:p>25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70">
            <text:p>1</text:p>
          </table:table-cell>
          <table:table-cell office:value-type="float" office:value="2.0813731360305598" table:style-name="ce65">
            <text:p>2.08</text:p>
          </table:table-cell>
          <table:table-cell office:value-type="float" office:value="545" table:style-name="ce70">
            <text:p>545</text:p>
          </table:table-cell>
          <table:table-cell office:value-type="float" office:value="691" table:style-name="ce70">
            <text:p>691</text:p>
          </table:table-cell>
          <table:table-cell office:value-type="float" office:value="1773" table:style-name="ce70">
            <text:p>1,773</text:p>
          </table:table-cell>
          <table:table-cell table:style-name="ce57"/>
          <table:table-cell table:number-columns-repeated="16353" table:style-name="ce69"/>
        </table:table-row>
        <table:table-row table:style-name="ro17">
          <table:table-cell office:value-type="string" table:style-name="ce68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6929" table:style-name="ce235">
            <text:p><text:s text:c="3"/>46,929</text:p>
          </table:table-cell>
          <table:table-cell office:value-type="float" office:value="138253" table:style-name="ce235">
            <text:p><text:s text:c="3"/>138,253</text:p>
          </table:table-cell>
          <table:table-cell office:value-type="float" office:value="68662" table:style-name="ce235">
            <text:p><text:s text:c="3"/>68,662</text:p>
          </table:table-cell>
          <table:table-cell office:value-type="float" office:value="69591" table:style-name="ce235">
            <text:p><text:s text:c="3"/>69,591</text:p>
          </table:table-cell>
          <table:table-cell office:value-type="float" office:value="49" table:style-name="ce235">
            <text:p><text:s text:c="3"/>49</text:p>
          </table:table-cell>
          <table:table-cell office:value-type="float" office:value="26" table:style-name="ce235">
            <text:p><text:s text:c="3"/>26</text:p>
          </table:table-cell>
          <table:table-cell office:value-type="float" office:value="23" table:style-name="ce235">
            <text:p><text:s text:c="3"/>23</text:p>
          </table:table-cell>
          <table:table-cell office:value-type="float" office:value="4.30925954705189" table:style-name="ce236">
            <text:p>4.31</text:p>
          </table:table-cell>
          <table:table-cell office:value-type="float" office:value="75" table:style-name="ce235">
            <text:p><text:s text:c="3"/>75</text:p>
          </table:table-cell>
          <table:table-cell office:value-type="float" office:value="39" table:style-name="ce235">
            <text:p><text:s text:c="3"/>39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6.5958054291610502" table:style-name="ce236">
            <text:p>6.60</text:p>
          </table:table-cell>
          <table:table-cell office:value-type="float" office:value="-26" table:style-name="ce235">
            <text:p>－ <text:s/>26</text:p>
          </table:table-cell>
          <table:table-cell office:value-type="float" office:value="-2.2865458821091602" table:style-name="ce124">
            <text:p>–2.29</text:p>
          </table:table-cell>
          <table:table-cell office:value-type="float" office:value="29" table:style-name="ce235">
            <text:p><text:s text:c="3"/>29</text:p>
          </table:table-cell>
          <table:table-cell office:value-type="float" office:value="27" table:style-name="ce235">
            <text:p><text:s text:c="3"/>27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2.5503780992756102" table:style-name="ce236">
            <text:p>2.55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24" table:style-name="ce66">
            <text:p>24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1106577373315401" table:style-name="ce123">
            <text:p>2.11</text:p>
          </table:table-cell>
          <table:table-cell office:value-type="float" office:value="423" table:style-name="ce64">
            <text:p>423</text:p>
          </table:table-cell>
          <table:table-cell office:value-type="float" office:value="582" table:style-name="ce64">
            <text:p>582</text:p>
          </table:table-cell>
          <table:table-cell office:value-type="float" office:value="1419" table:style-name="ce64">
            <text:p>1,41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4114" table:style-name="ce237">
            <text:p><text:s text:c="3"/>4,114</text:p>
          </table:table-cell>
          <table:table-cell office:value-type="float" office:value="13646" table:style-name="ce237">
            <text:p><text:s text:c="3"/>13,646</text:p>
          </table:table-cell>
          <table:table-cell office:value-type="float" office:value="7956" table:style-name="ce237">
            <text:p><text:s text:c="3"/>7,956</text:p>
          </table:table-cell>
          <table:table-cell office:value-type="float" office:value="5690" table:style-name="ce237">
            <text:p><text:s text:c="3"/>5,690</text:p>
          </table:table-cell>
          <table:table-cell office:value-type="float" office:value="10" table:style-name="ce237">
            <text:p><text:s text:c="3"/>10</text:p>
          </table:table-cell>
          <table:table-cell office:value-type="float" office:value="5" table:style-name="ce237">
            <text:p><text:s text:c="3"/>5</text:p>
          </table:table-cell>
          <table:table-cell office:value-type="float" office:value="5" table:style-name="ce237">
            <text:p><text:s text:c="3"/>5</text:p>
          </table:table-cell>
          <table:table-cell office:value-type="float" office:value="8.9214787656584207" table:style-name="ce238">
            <text:p>8.92</text:p>
          </table:table-cell>
          <table:table-cell office:value-type="float" office:value="6" table:style-name="ce237">
            <text:p><text:s text:c="3"/>6</text:p>
          </table:table-cell>
          <table:table-cell office:value-type="float" office:value="3" table:style-name="ce237">
            <text:p><text:s text:c="3"/>3</text:p>
          </table:table-cell>
          <table:table-cell office:value-type="float" office:value="3" table:style-name="ce237">
            <text:p><text:s text:c="3"/>3</text:p>
          </table:table-cell>
          <table:table-cell office:value-type="float" office:value="5.3528872593950503" table:style-name="ce238">
            <text:p>5.35</text:p>
          </table:table-cell>
          <table:table-cell office:value-type="float" office:value="4" table:style-name="ce237">
            <text:p><text:s text:c="3"/>4</text:p>
          </table:table-cell>
          <table:table-cell office:value-type="float" office:value="3.56859150626337" table:style-name="ce124">
            <text:p>3.57</text:p>
          </table:table-cell>
          <table:table-cell office:value-type="float" office:value="3" table:style-name="ce237">
            <text:p><text:s text:c="3"/>3</text:p>
          </table:table-cell>
          <table:table-cell office:value-type="float" office:value="3" table:style-name="ce237">
            <text:p><text:s text:c="3"/>3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2.67644362969753" table:style-name="ce238">
            <text:p>2.68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7842957531316801" table:style-name="ce123">
            <text:p>1.78</text:p>
          </table:table-cell>
          <table:table-cell office:value-type="float" office:value="122" table:style-name="ce64">
            <text:p>122</text:p>
          </table:table-cell>
          <table:table-cell office:value-type="float" office:value="109" table:style-name="ce64">
            <text:p>109</text:p>
          </table:table-cell>
          <table:table-cell office:value-type="float" office:value="354" table:style-name="ce64">
            <text:p>354</text:p>
          </table:table-cell>
          <table:table-cell table:style-name="ce57"/>
          <table:table-cell table:number-columns-repeated="16353" table:style-name="ce56"/>
        </table:table-row>
        <table:table-row table:style-name="ro18">
          <table:table-cell table:style-name="ce63"/>
          <table:table-cell table:number-columns-repeated="5" table:style-name="ce60"/>
          <table:table-cell table:number-columns-repeated="2" table:style-name="ce58"/>
          <table:table-cell table:style-name="ce59"/>
          <table:table-cell table:style-name="ce60"/>
          <table:table-cell table:number-columns-repeated="2" table:style-name="ce58"/>
          <table:table-cell table:style-name="ce62"/>
          <table:table-cell table:style-name="ce60"/>
          <table:table-cell table:style-name="ce61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58"/>
          <table:table-cell table:style-name="ce57"/>
          <table:table-cell table:number-columns-repeated="16353" table:style-name="ce56"/>
        </table:table-row>
        <table:table-row table:style-name="ro19">
          <table:table-cell table:style-name="ce48"/>
          <table:table-cell office:value-type="string" table:style-name="ce5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5"/>
          <table:table-cell table:number-columns-repeated="3" table:style-name="ce48"/>
          <table:table-cell table:style-name="ce54"/>
          <table:table-cell table:style-name="ce53"/>
          <table:table-cell table:style-name="ce48"/>
          <table:table-cell table:style-name="ce49"/>
          <table:table-cell table:number-columns-repeated="13" table:style-name="ce48"/>
          <table:table-cell office:value-type="string" table:style-name="ce6">
            <text:p>內政部戶政司編製</text:p>
          </table:table-cell>
          <table:table-cell table:number-columns-repeated="16354" table:style-name="ce48"/>
        </table:table-row>
        <table:table-row table:style-name="ro20">
          <table:table-cell table:style-name="ce48"/>
          <table:table-cell office:value-type="string" table:style-name="ce52">
            <text:p><text:s text:c="14"/>2.本表相同性別2人之結婚及終止結婚資料係自108年5月24日起統計。</text:p>
          </table:table-cell>
          <table:table-cell table:number-columns-repeated="13" table:style-name="ce48"/>
          <table:table-cell table:style-name="ce49"/>
          <table:table-cell table:number-columns-repeated="11" table:style-name="ce48"/>
          <table:table-cell table:number-columns-repeated="2" table:style-name="ce51"/>
          <table:table-cell table:number-columns-repeated="16355" table:style-name="ce48"/>
        </table:table-row>
        <table:table-row table:style-name="ro21">
          <table:table-cell table:style-name="ce50"/>
          <table:table-cell table:number-columns-repeated="14" table:style-name="ce48"/>
          <table:table-cell table:style-name="ce49"/>
          <table:table-cell table:number-columns-repeated="16368" table:style-name="ce48"/>
        </table:table-row>
        <table:table-row table:number-rows-repeated="1048540" table:style-name="ro22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9"/>
        <table:table-column table:style-name="co6" table:number-columns-repeated="3" table:default-cell-style-name="ce99"/>
        <table:table-column table:style-name="co24" table:default-cell-style-name="ce99"/>
        <table:table-column table:style-name="co25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8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121" table:default-cell-style-name="ce99"/>
        <table:table-column table:style-name="co30" table:default-cell-style-name="ce99"/>
        <table:table-column table:style-name="co31" table:number-columns-repeated="3" table:default-cell-style-name="ce99"/>
        <table:table-column table:style-name="co24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31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3" table:default-cell-style-name="ce99"/>
        <table:table-column table:style-name="co23" table:number-columns-repeated="6" table:default-cell-style-name="ce99"/>
        <table:table-column table:style-name="co29" table:number-columns-repeated="16202" table:default-cell-style-name="ce99"/>
        <table:table-row table:style-name="ro2">
          <table:table-cell office:value-type="string" table:number-columns-spanned="25" table:number-rows-spanned="1" table:style-name="ce377">
            <text:p>各 縣 市 人 口 年 齡 結 構 統 計 表</text:p>
          </table:table-cell>
          <table:covered-table-cell table:number-columns-repeated="24"/>
          <table:table-cell table:number-columns-repeated="16359" table:style-name="ce99"/>
        </table:table-row>
        <table:table-row table:style-name="ro23">
          <table:table-cell table:style-name="ce100"/>
          <table:table-cell table:number-columns-repeated="8" table:style-name="ce101"/>
          <table:table-cell table:style-name="ce99"/>
          <table:table-cell office:value-type="string" table:style-name="ce102">
            <text:p>中 華 民 國 115 年 4 月 底</text:p>
          </table:table-cell>
          <table:table-cell table:style-name="ce103"/>
          <table:table-cell table:number-columns-repeated="9" table:style-name="ce101"/>
          <table:table-cell table:number-columns-repeated="3" table:style-name="ce99"/>
          <table:table-cell office:value-type="string" table:style-name="ce104">
            <text:p>單位：人；％</text:p>
          </table:table-cell>
          <table:table-cell table:number-columns-repeated="16359" table:style-name="ce99"/>
        </table:table-row>
        <table:table-row table:style-name="ro7">
          <table:table-cell office:value-type="string" table:number-columns-spanned="1" table:number-rows-spanned="3" table:style-name="ce410">
            <text:p>區域別</text:p>
          </table:table-cell>
          <table:table-cell office:value-type="string" table:number-columns-spanned="4" table:number-rows-spanned="2" table:style-name="ce41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41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41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41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41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413">
            <text:p>20歲以上</text:p>
          </table:table-cell>
          <table:covered-table-cell table:number-columns-repeated="3"/>
          <table:table-cell table:number-columns-repeated="16359" table:style-name="ce105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5"/>
        </table:table-row>
        <table:table-row table:style-name="ro25">
          <table:covered-table-cell/>
          <table:table-cell office:value-type="string" table:style-name="ce106">
            <text:p>計</text:p>
          </table:table-cell>
          <table:table-cell office:value-type="string" table:style-name="ce106">
            <text:p>男</text:p>
          </table:table-cell>
          <table:table-cell office:value-type="string" table:style-name="ce106">
            <text:p>女</text:p>
          </table:table-cell>
          <table:table-cell office:value-type="string" table:style-name="ce106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table:number-columns-repeated="16359" table:style-name="ce105"/>
        </table:table-row>
        <table:table-row table:style-name="ro26">
          <table:table-cell office:value-type="string" table:style-name="ce125">
            <text:p>總<text:s/><text:span text:style-name="T21">　<text:s/></text:span>計</text:p>
          </table:table-cell>
          <table:table-cell office:value-type="float" office:value="23262544" table:style-name="ce239">
            <text:p><text:s text:c="3"/>23,262,544</text:p>
          </table:table-cell>
          <table:table-cell office:value-type="float" office:value="11439382" table:style-name="ce239">
            <text:p><text:s text:c="3"/>11,439,382</text:p>
          </table:table-cell>
          <table:table-cell office:value-type="float" office:value="11823162" table:style-name="ce239">
            <text:p><text:s text:c="3"/>11,823,162</text:p>
          </table:table-cell>
          <table:table-cell office:value-type="float" office:value="100" table:style-name="ce240">
            <text:p>100.00</text:p>
          </table:table-cell>
          <table:table-cell office:value-type="float" office:value="2652508" table:style-name="ce239">
            <text:p><text:s text:c="3"/>2,652,508</text:p>
          </table:table-cell>
          <table:table-cell office:value-type="float" office:value="1372671" table:style-name="ce239">
            <text:p><text:s text:c="3"/>1,372,671</text:p>
          </table:table-cell>
          <table:table-cell office:value-type="float" office:value="1279837" table:style-name="ce239">
            <text:p><text:s text:c="3"/>1,279,837</text:p>
          </table:table-cell>
          <table:table-cell office:value-type="float" office:value="11.40248461217311" table:style-name="ce240">
            <text:p>11.40</text:p>
          </table:table-cell>
          <table:table-cell office:value-type="float" office:value="15873366" table:style-name="ce239">
            <text:p><text:s text:c="3"/>15,873,366</text:p>
          </table:table-cell>
          <table:table-cell office:value-type="float" office:value="7935337" table:style-name="ce239">
            <text:p><text:s text:c="3"/>7,935,337</text:p>
          </table:table-cell>
          <table:table-cell office:value-type="float" office:value="7938029" table:style-name="ce239">
            <text:p><text:s text:c="3"/>7,938,029</text:p>
          </table:table-cell>
          <table:table-cell office:value-type="float" office:value="68.23572692651328" table:style-name="ce240">
            <text:p>68.24</text:p>
          </table:table-cell>
          <table:table-cell office:value-type="float" office:value="4736670" table:style-name="ce239">
            <text:p><text:s text:c="3"/>4,736,670</text:p>
          </table:table-cell>
          <table:table-cell office:value-type="float" office:value="2131374" table:style-name="ce239">
            <text:p><text:s text:c="3"/>2,131,374</text:p>
          </table:table-cell>
          <table:table-cell office:value-type="float" office:value="2605296" table:style-name="ce239">
            <text:p><text:s text:c="3"/>2,605,296</text:p>
          </table:table-cell>
          <table:table-cell office:value-type="float" office:value="20.361788461313601" table:style-name="ce240">
            <text:p>20.36</text:p>
          </table:table-cell>
          <table:table-cell office:value-type="float" office:value="9647045" table:style-name="ce239">
            <text:p><text:s text:c="3"/>9,647,045</text:p>
          </table:table-cell>
          <table:table-cell office:value-type="float" office:value="4889663" table:style-name="ce239">
            <text:p><text:s text:c="3"/>4,889,663</text:p>
          </table:table-cell>
          <table:table-cell office:value-type="float" office:value="4757382" table:style-name="ce239">
            <text:p><text:s text:c="3"/>4,757,382</text:p>
          </table:table-cell>
          <table:table-cell office:value-type="float" office:value="41.470292329162277" table:style-name="ce240">
            <text:p>41.47</text:p>
          </table:table-cell>
          <table:table-cell office:value-type="float" office:value="19641503" table:style-name="ce239">
            <text:p><text:s text:c="3"/>19,641,503</text:p>
          </table:table-cell>
          <table:table-cell office:value-type="float" office:value="9562226" table:style-name="ce239">
            <text:p><text:s text:c="3"/>9,562,226</text:p>
          </table:table-cell>
          <table:table-cell office:value-type="float" office:value="10079277" table:style-name="ce239">
            <text:p><text:s text:c="3"/>10,079,277</text:p>
          </table:table-cell>
          <table:table-cell office:value-type="float" office:value="84.434028367662634" table:style-name="ce240">
            <text:p>84.43</text:p>
          </table:table-cell>
          <table:table-cell table:style-name="ce108"/>
          <table:table-cell table:number-columns-repeated="16358" table:style-name="ce109"/>
        </table:table-row>
        <table:table-row table:style-name="ro17">
          <table:table-cell office:value-type="string" table:style-name="ce110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41149" table:style-name="ce241">
            <text:p><text:s text:c="3"/>4,041,149</text:p>
          </table:table-cell>
          <table:table-cell office:value-type="float" office:value="1959070" table:style-name="ce241">
            <text:p><text:s text:c="3"/>1,959,070</text:p>
          </table:table-cell>
          <table:table-cell office:value-type="float" office:value="2082079" table:style-name="ce241">
            <text:p><text:s text:c="3"/>2,082,079</text:p>
          </table:table-cell>
          <table:table-cell office:value-type="float" office:value="100" table:style-name="ce242">
            <text:p>100.00</text:p>
          </table:table-cell>
          <table:table-cell office:value-type="float" office:value="429903" table:style-name="ce241">
            <text:p><text:s text:c="3"/>429,903</text:p>
          </table:table-cell>
          <table:table-cell office:value-type="float" office:value="221453" table:style-name="ce241">
            <text:p><text:s text:c="3"/>221,453</text:p>
          </table:table-cell>
          <table:table-cell office:value-type="float" office:value="208450" table:style-name="ce241">
            <text:p><text:s text:c="3"/>208,450</text:p>
          </table:table-cell>
          <table:table-cell office:value-type="float" office:value="10.63813781674469" table:style-name="ce242">
            <text:p>10.64</text:p>
          </table:table-cell>
          <table:table-cell office:value-type="float" office:value="2791650" table:style-name="ce241">
            <text:p><text:s text:c="3"/>2,791,650</text:p>
          </table:table-cell>
          <table:table-cell office:value-type="float" office:value="1377860" table:style-name="ce241">
            <text:p><text:s text:c="3"/>1,377,860</text:p>
          </table:table-cell>
          <table:table-cell office:value-type="float" office:value="1413790" table:style-name="ce241">
            <text:p><text:s text:c="3"/>1,413,790</text:p>
          </table:table-cell>
          <table:table-cell office:value-type="float" office:value="69.080600591564433" table:style-name="ce242">
            <text:p>69.08</text:p>
          </table:table-cell>
          <table:table-cell office:value-type="float" office:value="819596" table:style-name="ce241">
            <text:p><text:s text:c="3"/>819,596</text:p>
          </table:table-cell>
          <table:table-cell office:value-type="float" office:value="359757" table:style-name="ce241">
            <text:p><text:s text:c="3"/>359,757</text:p>
          </table:table-cell>
          <table:table-cell office:value-type="float" office:value="459839" table:style-name="ce241">
            <text:p><text:s text:c="3"/>459,839</text:p>
          </table:table-cell>
          <table:table-cell office:value-type="float" office:value="20.281261591690878" table:style-name="ce242">
            <text:p>20.28</text:p>
          </table:table-cell>
          <table:table-cell office:value-type="float" office:value="1687672" table:style-name="ce241">
            <text:p><text:s text:c="3"/>1,687,672</text:p>
          </table:table-cell>
          <table:table-cell office:value-type="float" office:value="852785" table:style-name="ce241">
            <text:p><text:s text:c="3"/>852,785</text:p>
          </table:table-cell>
          <table:table-cell office:value-type="float" office:value="834887" table:style-name="ce241">
            <text:p><text:s text:c="3"/>834,887</text:p>
          </table:table-cell>
          <table:table-cell office:value-type="float" office:value="41.762181993289531" table:style-name="ce242">
            <text:p>41.76</text:p>
          </table:table-cell>
          <table:table-cell office:value-type="float" office:value="3446717" table:style-name="ce241">
            <text:p><text:s text:c="3"/>3,446,717</text:p>
          </table:table-cell>
          <table:table-cell office:value-type="float" office:value="1651782" table:style-name="ce241">
            <text:p><text:s text:c="3"/>1,651,782</text:p>
          </table:table-cell>
          <table:table-cell office:value-type="float" office:value="1794935" table:style-name="ce241">
            <text:p><text:s text:c="3"/>1,794,935</text:p>
          </table:table-cell>
          <table:table-cell office:value-type="float" office:value="85.290520097130795" table:style-name="ce242">
            <text:p>85.2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29429" table:style-name="ce243">
            <text:p><text:s text:c="3"/>2,429,429</text:p>
          </table:table-cell>
          <table:table-cell office:value-type="float" office:value="1143395" table:style-name="ce243">
            <text:p><text:s text:c="3"/>1,143,395</text:p>
          </table:table-cell>
          <table:table-cell office:value-type="float" office:value="1286034" table:style-name="ce243">
            <text:p><text:s text:c="3"/>1,286,034</text:p>
          </table:table-cell>
          <table:table-cell office:value-type="float" office:value="100" table:style-name="ce244">
            <text:p>100.00</text:p>
          </table:table-cell>
          <table:table-cell office:value-type="float" office:value="287482" table:style-name="ce243">
            <text:p><text:s text:c="3"/>287,482</text:p>
          </table:table-cell>
          <table:table-cell office:value-type="float" office:value="148237" table:style-name="ce243">
            <text:p><text:s text:c="3"/>148,237</text:p>
          </table:table-cell>
          <table:table-cell office:value-type="float" office:value="139245" table:style-name="ce243">
            <text:p><text:s text:c="3"/>139,245</text:p>
          </table:table-cell>
          <table:table-cell office:value-type="float" office:value="11.833315565097809" table:style-name="ce244">
            <text:p>11.83</text:p>
          </table:table-cell>
          <table:table-cell office:value-type="float" office:value="1546782" table:style-name="ce243">
            <text:p><text:s text:c="3"/>1,546,782</text:p>
          </table:table-cell>
          <table:table-cell office:value-type="float" office:value="736341" table:style-name="ce243">
            <text:p><text:s text:c="3"/>736,341</text:p>
          </table:table-cell>
          <table:table-cell office:value-type="float" office:value="810441" table:style-name="ce243">
            <text:p><text:s text:c="3"/>810,441</text:p>
          </table:table-cell>
          <table:table-cell office:value-type="float" office:value="63.668541044006631" table:style-name="ce244">
            <text:p>63.67</text:p>
          </table:table-cell>
          <table:table-cell office:value-type="float" office:value="595165" table:style-name="ce243">
            <text:p><text:s text:c="3"/>595,165</text:p>
          </table:table-cell>
          <table:table-cell office:value-type="float" office:value="258817" table:style-name="ce243">
            <text:p><text:s text:c="3"/>258,817</text:p>
          </table:table-cell>
          <table:table-cell office:value-type="float" office:value="336348" table:style-name="ce243">
            <text:p><text:s text:c="3"/>336,348</text:p>
          </table:table-cell>
          <table:table-cell office:value-type="float" office:value="24.49814339089556" table:style-name="ce244">
            <text:p>24.50</text:p>
          </table:table-cell>
          <table:table-cell office:value-type="float" office:value="914335" table:style-name="ce243">
            <text:p><text:s text:c="3"/>914,335</text:p>
          </table:table-cell>
          <table:table-cell office:value-type="float" office:value="440833" table:style-name="ce243">
            <text:p><text:s text:c="3"/>440,833</text:p>
          </table:table-cell>
          <table:table-cell office:value-type="float" office:value="473502" table:style-name="ce243">
            <text:p><text:s text:c="3"/>473,502</text:p>
          </table:table-cell>
          <table:table-cell office:value-type="float" office:value="37.635798370728267" table:style-name="ce244">
            <text:p>37.64</text:p>
          </table:table-cell>
          <table:table-cell office:value-type="float" office:value="2046227" table:style-name="ce243">
            <text:p><text:s text:c="3"/>2,046,227</text:p>
          </table:table-cell>
          <table:table-cell office:value-type="float" office:value="945674" table:style-name="ce243">
            <text:p><text:s text:c="3"/>945,674</text:p>
          </table:table-cell>
          <table:table-cell office:value-type="float" office:value="1100553" table:style-name="ce243">
            <text:p><text:s text:c="3"/>1,100,553</text:p>
          </table:table-cell>
          <table:table-cell office:value-type="float" office:value="84.226663960955435" table:style-name="ce244">
            <text:p>84.2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356795" table:style-name="ce245">
            <text:p><text:s text:c="3"/>2,356,795</text:p>
          </table:table-cell>
          <table:table-cell office:value-type="float" office:value="1158428" table:style-name="ce245">
            <text:p><text:s text:c="3"/>1,158,428</text:p>
          </table:table-cell>
          <table:table-cell office:value-type="float" office:value="1198367" table:style-name="ce245">
            <text:p><text:s text:c="3"/>1,198,367</text:p>
          </table:table-cell>
          <table:table-cell office:value-type="float" office:value="100" table:style-name="ce246">
            <text:p>100.00</text:p>
          </table:table-cell>
          <table:table-cell office:value-type="float" office:value="306028" table:style-name="ce245">
            <text:p><text:s text:c="3"/>306,028</text:p>
          </table:table-cell>
          <table:table-cell office:value-type="float" office:value="158356" table:style-name="ce245">
            <text:p><text:s text:c="3"/>158,356</text:p>
          </table:table-cell>
          <table:table-cell office:value-type="float" office:value="147672" table:style-name="ce245">
            <text:p><text:s text:c="3"/>147,672</text:p>
          </table:table-cell>
          <table:table-cell office:value-type="float" office:value="12.984922320354549" table:style-name="ce246">
            <text:p>12.98</text:p>
          </table:table-cell>
          <table:table-cell office:value-type="float" office:value="1649697" table:style-name="ce245">
            <text:p><text:s text:c="3"/>1,649,697</text:p>
          </table:table-cell>
          <table:table-cell office:value-type="float" office:value="820044" table:style-name="ce245">
            <text:p><text:s text:c="3"/>820,044</text:p>
          </table:table-cell>
          <table:table-cell office:value-type="float" office:value="829653" table:style-name="ce245">
            <text:p><text:s text:c="3"/>829,653</text:p>
          </table:table-cell>
          <table:table-cell office:value-type="float" office:value="69.997475385003781" table:style-name="ce246">
            <text:p>70.00</text:p>
          </table:table-cell>
          <table:table-cell office:value-type="float" office:value="401070" table:style-name="ce245">
            <text:p><text:s text:c="3"/>401,070</text:p>
          </table:table-cell>
          <table:table-cell office:value-type="float" office:value="180028" table:style-name="ce245">
            <text:p><text:s text:c="3"/>180,028</text:p>
          </table:table-cell>
          <table:table-cell office:value-type="float" office:value="221042" table:style-name="ce245">
            <text:p><text:s text:c="3"/>221,042</text:p>
          </table:table-cell>
          <table:table-cell office:value-type="float" office:value="17.017602294641669" table:style-name="ce246">
            <text:p>17.02</text:p>
          </table:table-cell>
          <table:table-cell office:value-type="float" office:value="1037110" table:style-name="ce245">
            <text:p><text:s text:c="3"/>1,037,110</text:p>
          </table:table-cell>
          <table:table-cell office:value-type="float" office:value="522363" table:style-name="ce245">
            <text:p><text:s text:c="3"/>522,363</text:p>
          </table:table-cell>
          <table:table-cell office:value-type="float" office:value="514747" table:style-name="ce245">
            <text:p><text:s text:c="3"/>514,747</text:p>
          </table:table-cell>
          <table:table-cell office:value-type="float" office:value="44.005100146597393" table:style-name="ce246">
            <text:p>44.01</text:p>
          </table:table-cell>
          <table:table-cell office:value-type="float" office:value="1944392" table:style-name="ce245">
            <text:p><text:s text:c="3"/>1,944,392</text:p>
          </table:table-cell>
          <table:table-cell office:value-type="float" office:value="944520" table:style-name="ce245">
            <text:p><text:s text:c="3"/>944,520</text:p>
          </table:table-cell>
          <table:table-cell office:value-type="float" office:value="999872" table:style-name="ce245">
            <text:p><text:s text:c="3"/>999,872</text:p>
          </table:table-cell>
          <table:table-cell office:value-type="float" office:value="82.501532801961986" table:style-name="ce246">
            <text:p>82.5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68452" table:style-name="ce247">
            <text:p><text:s text:c="3"/>2,868,452</text:p>
          </table:table-cell>
          <table:table-cell office:value-type="float" office:value="1397378" table:style-name="ce247">
            <text:p><text:s text:c="3"/>1,397,378</text:p>
          </table:table-cell>
          <table:table-cell office:value-type="float" office:value="1471074" table:style-name="ce247">
            <text:p><text:s text:c="3"/>1,471,074</text:p>
          </table:table-cell>
          <table:table-cell office:value-type="float" office:value="100" table:style-name="ce248">
            <text:p>100.00</text:p>
          </table:table-cell>
          <table:table-cell office:value-type="float" office:value="362196" table:style-name="ce247">
            <text:p><text:s text:c="3"/>362,196</text:p>
          </table:table-cell>
          <table:table-cell office:value-type="float" office:value="187511" table:style-name="ce247">
            <text:p><text:s text:c="3"/>187,511</text:p>
          </table:table-cell>
          <table:table-cell office:value-type="float" office:value="174685" table:style-name="ce247">
            <text:p><text:s text:c="3"/>174,685</text:p>
          </table:table-cell>
          <table:table-cell office:value-type="float" office:value="12.62688028246594" table:style-name="ce248">
            <text:p>12.63</text:p>
          </table:table-cell>
          <table:table-cell office:value-type="float" office:value="1998994" table:style-name="ce247">
            <text:p><text:s text:c="3"/>1,998,994</text:p>
          </table:table-cell>
          <table:table-cell office:value-type="float" office:value="982381" table:style-name="ce247">
            <text:p><text:s text:c="3"/>982,381</text:p>
          </table:table-cell>
          <table:table-cell office:value-type="float" office:value="1016613" table:style-name="ce247">
            <text:p><text:s text:c="3"/>1,016,613</text:p>
          </table:table-cell>
          <table:table-cell office:value-type="float" office:value="69.688947209156709" table:style-name="ce248">
            <text:p>69.69</text:p>
          </table:table-cell>
          <table:table-cell office:value-type="float" office:value="507262" table:style-name="ce247">
            <text:p><text:s text:c="3"/>507,262</text:p>
          </table:table-cell>
          <table:table-cell office:value-type="float" office:value="227486" table:style-name="ce247">
            <text:p><text:s text:c="3"/>227,486</text:p>
          </table:table-cell>
          <table:table-cell office:value-type="float" office:value="279776" table:style-name="ce247">
            <text:p><text:s text:c="3"/>279,776</text:p>
          </table:table-cell>
          <table:table-cell office:value-type="float" office:value="17.68417250837734" table:style-name="ce248">
            <text:p>17.68</text:p>
          </table:table-cell>
          <table:table-cell office:value-type="float" office:value="1248202" table:style-name="ce247">
            <text:p><text:s text:c="3"/>1,248,202</text:p>
          </table:table-cell>
          <table:table-cell office:value-type="float" office:value="624647" table:style-name="ce247">
            <text:p><text:s text:c="3"/>624,647</text:p>
          </table:table-cell>
          <table:table-cell office:value-type="float" office:value="623555" table:style-name="ce247">
            <text:p><text:s text:c="3"/>623,555</text:p>
          </table:table-cell>
          <table:table-cell office:value-type="float" office:value="43.514829601471448" table:style-name="ce248">
            <text:p>43.51</text:p>
          </table:table-cell>
          <table:table-cell office:value-type="float" office:value="2378039" table:style-name="ce247">
            <text:p><text:s text:c="3"/>2,378,039</text:p>
          </table:table-cell>
          <table:table-cell office:value-type="float" office:value="1143362" table:style-name="ce247">
            <text:p><text:s text:c="3"/>1,143,362</text:p>
          </table:table-cell>
          <table:table-cell office:value-type="float" office:value="1234677" table:style-name="ce247">
            <text:p><text:s text:c="3"/>1,234,677</text:p>
          </table:table-cell>
          <table:table-cell office:value-type="float" office:value="82.903217484552655" table:style-name="ce248">
            <text:p>82.90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49762" table:style-name="ce249">
            <text:p><text:s text:c="3"/>1,849,762</text:p>
          </table:table-cell>
          <table:table-cell office:value-type="float" office:value="915655" table:style-name="ce249">
            <text:p><text:s text:c="3"/>915,655</text:p>
          </table:table-cell>
          <table:table-cell office:value-type="float" office:value="934107" table:style-name="ce249">
            <text:p><text:s text:c="3"/>934,107</text:p>
          </table:table-cell>
          <table:table-cell office:value-type="float" office:value="100" table:style-name="ce250">
            <text:p>100.00</text:p>
          </table:table-cell>
          <table:table-cell office:value-type="float" office:value="203301" table:style-name="ce249">
            <text:p><text:s text:c="3"/>203,301</text:p>
          </table:table-cell>
          <table:table-cell office:value-type="float" office:value="105467" table:style-name="ce249">
            <text:p><text:s text:c="3"/>105,467</text:p>
          </table:table-cell>
          <table:table-cell office:value-type="float" office:value="97834" table:style-name="ce249">
            <text:p><text:s text:c="3"/>97,834</text:p>
          </table:table-cell>
          <table:table-cell office:value-type="float" office:value="10.99065717643675" table:style-name="ce250">
            <text:p>10.99</text:p>
          </table:table-cell>
          <table:table-cell office:value-type="float" office:value="1261824" table:style-name="ce249">
            <text:p><text:s text:c="3"/>1,261,824</text:p>
          </table:table-cell>
          <table:table-cell office:value-type="float" office:value="634170" table:style-name="ce249">
            <text:p><text:s text:c="3"/>634,170</text:p>
          </table:table-cell>
          <table:table-cell office:value-type="float" office:value="627654" table:style-name="ce249">
            <text:p><text:s text:c="3"/>627,654</text:p>
          </table:table-cell>
          <table:table-cell office:value-type="float" office:value="68.215478531832744" table:style-name="ce250">
            <text:p>68.22</text:p>
          </table:table-cell>
          <table:table-cell office:value-type="float" office:value="384637" table:style-name="ce249">
            <text:p><text:s text:c="3"/>384,637</text:p>
          </table:table-cell>
          <table:table-cell office:value-type="float" office:value="176018" table:style-name="ce249">
            <text:p><text:s text:c="3"/>176,018</text:p>
          </table:table-cell>
          <table:table-cell office:value-type="float" office:value="208619" table:style-name="ce249">
            <text:p><text:s text:c="3"/>208,619</text:p>
          </table:table-cell>
          <table:table-cell office:value-type="float" office:value="20.7938642917305" table:style-name="ce250">
            <text:p>20.79</text:p>
          </table:table-cell>
          <table:table-cell office:value-type="float" office:value="765083" table:style-name="ce249">
            <text:p><text:s text:c="3"/>765,083</text:p>
          </table:table-cell>
          <table:table-cell office:value-type="float" office:value="390593" table:style-name="ce249">
            <text:p><text:s text:c="3"/>390,593</text:p>
          </table:table-cell>
          <table:table-cell office:value-type="float" office:value="374490" table:style-name="ce249">
            <text:p><text:s text:c="3"/>374,490</text:p>
          </table:table-cell>
          <table:table-cell office:value-type="float" office:value="41.361158895036233" table:style-name="ce250">
            <text:p>41.36</text:p>
          </table:table-cell>
          <table:table-cell office:value-type="float" office:value="1572555" table:style-name="ce249">
            <text:p><text:s text:c="3"/>1,572,555</text:p>
          </table:table-cell>
          <table:table-cell office:value-type="float" office:value="771859" table:style-name="ce249">
            <text:p><text:s text:c="3"/>771,859</text:p>
          </table:table-cell>
          <table:table-cell office:value-type="float" office:value="800696" table:style-name="ce249">
            <text:p><text:s text:c="3"/>800,696</text:p>
          </table:table-cell>
          <table:table-cell office:value-type="float" office:value="85.013909897597642" table:style-name="ce250">
            <text:p>85.01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13032" table:style-name="ce251">
            <text:p><text:s text:c="3"/>2,713,032</text:p>
          </table:table-cell>
          <table:table-cell office:value-type="float" office:value="1325897" table:style-name="ce251">
            <text:p><text:s text:c="3"/>1,325,897</text:p>
          </table:table-cell>
          <table:table-cell office:value-type="float" office:value="1387135" table:style-name="ce251">
            <text:p><text:s text:c="3"/>1,387,135</text:p>
          </table:table-cell>
          <table:table-cell office:value-type="float" office:value="100" table:style-name="ce252">
            <text:p>100.00</text:p>
          </table:table-cell>
          <table:table-cell office:value-type="float" office:value="291158" table:style-name="ce251">
            <text:p><text:s text:c="3"/>291,158</text:p>
          </table:table-cell>
          <table:table-cell office:value-type="float" office:value="150748" table:style-name="ce251">
            <text:p><text:s text:c="3"/>150,748</text:p>
          </table:table-cell>
          <table:table-cell office:value-type="float" office:value="140410" table:style-name="ce251">
            <text:p><text:s text:c="3"/>140,410</text:p>
          </table:table-cell>
          <table:table-cell office:value-type="float" office:value="10.7318306603092" table:style-name="ce252">
            <text:p>10.73</text:p>
          </table:table-cell>
          <table:table-cell office:value-type="float" office:value="1849741" table:style-name="ce251">
            <text:p><text:s text:c="3"/>1,849,741</text:p>
          </table:table-cell>
          <table:table-cell office:value-type="float" office:value="921310" table:style-name="ce251">
            <text:p><text:s text:c="3"/>921,310</text:p>
          </table:table-cell>
          <table:table-cell office:value-type="float" office:value="928431" table:style-name="ce251">
            <text:p><text:s text:c="3"/>928,431</text:p>
          </table:table-cell>
          <table:table-cell office:value-type="float" office:value="68.179844542932045" table:style-name="ce252">
            <text:p>68.18</text:p>
          </table:table-cell>
          <table:table-cell office:value-type="float" office:value="572133" table:style-name="ce251">
            <text:p><text:s text:c="3"/>572,133</text:p>
          </table:table-cell>
          <table:table-cell office:value-type="float" office:value="253839" table:style-name="ce251">
            <text:p><text:s text:c="3"/>253,839</text:p>
          </table:table-cell>
          <table:table-cell office:value-type="float" office:value="318294" table:style-name="ce251">
            <text:p><text:s text:c="3"/>318,294</text:p>
          </table:table-cell>
          <table:table-cell office:value-type="float" office:value="21.088324796758759" table:style-name="ce252">
            <text:p>21.09</text:p>
          </table:table-cell>
          <table:table-cell office:value-type="float" office:value="1112391" table:style-name="ce251">
            <text:p><text:s text:c="3"/>1,112,391</text:p>
          </table:table-cell>
          <table:table-cell office:value-type="float" office:value="562389" table:style-name="ce251">
            <text:p><text:s text:c="3"/>562,389</text:p>
          </table:table-cell>
          <table:table-cell office:value-type="float" office:value="550002" table:style-name="ce251">
            <text:p><text:s text:c="3"/>550,002</text:p>
          </table:table-cell>
          <table:table-cell office:value-type="float" office:value="41.001764815158829" table:style-name="ce252">
            <text:p>41.00</text:p>
          </table:table-cell>
          <table:table-cell office:value-type="float" office:value="2314988" table:style-name="ce251">
            <text:p><text:s text:c="3"/>2,314,988</text:p>
          </table:table-cell>
          <table:table-cell office:value-type="float" office:value="1119798" table:style-name="ce251">
            <text:p><text:s text:c="3"/>1,119,798</text:p>
          </table:table-cell>
          <table:table-cell office:value-type="float" office:value="1195190" table:style-name="ce251">
            <text:p><text:s text:c="3"/>1,195,190</text:p>
          </table:table-cell>
          <table:table-cell office:value-type="float" office:value="85.32844433829014" table:style-name="ce252">
            <text:p>85.33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852026" table:style-name="ce253">
            <text:p><text:s text:c="3"/>6,852,026</text:p>
          </table:table-cell>
          <table:table-cell office:value-type="float" office:value="3462941" table:style-name="ce253">
            <text:p><text:s text:c="3"/>3,462,941</text:p>
          </table:table-cell>
          <table:table-cell office:value-type="float" office:value="3389085" table:style-name="ce253">
            <text:p><text:s text:c="3"/>3,389,085</text:p>
          </table:table-cell>
          <table:table-cell office:value-type="float" office:value="100" table:style-name="ce254">
            <text:p>100.00</text:p>
          </table:table-cell>
          <table:table-cell office:value-type="float" office:value="760685" table:style-name="ce253">
            <text:p><text:s text:c="3"/>760,685</text:p>
          </table:table-cell>
          <table:table-cell office:value-type="float" office:value="394731" table:style-name="ce253">
            <text:p><text:s text:c="3"/>394,731</text:p>
          </table:table-cell>
          <table:table-cell office:value-type="float" office:value="365954" table:style-name="ce253">
            <text:p><text:s text:c="3"/>365,954</text:p>
          </table:table-cell>
          <table:table-cell office:value-type="float" office:value="11.10160702834461" table:style-name="ce254">
            <text:p>11.10</text:p>
          </table:table-cell>
          <table:table-cell office:value-type="float" office:value="4664626" table:style-name="ce253">
            <text:p><text:s text:c="3"/>4,664,626</text:p>
          </table:table-cell>
          <table:table-cell office:value-type="float" office:value="2407512" table:style-name="ce253">
            <text:p><text:s text:c="3"/>2,407,512</text:p>
          </table:table-cell>
          <table:table-cell office:value-type="float" office:value="2257114" table:style-name="ce253">
            <text:p><text:s text:c="3"/>2,257,114</text:p>
          </table:table-cell>
          <table:table-cell office:value-type="float" office:value="68.07659515594365" table:style-name="ce254">
            <text:p>68.08</text:p>
          </table:table-cell>
          <table:table-cell office:value-type="float" office:value="1426715" table:style-name="ce253">
            <text:p><text:s text:c="3"/>1,426,715</text:p>
          </table:table-cell>
          <table:table-cell office:value-type="float" office:value="660698" table:style-name="ce253">
            <text:p><text:s text:c="3"/>660,698</text:p>
          </table:table-cell>
          <table:table-cell office:value-type="float" office:value="766017" table:style-name="ce253">
            <text:p><text:s text:c="3"/>766,017</text:p>
          </table:table-cell>
          <table:table-cell office:value-type="float" office:value="20.821797815711729" table:style-name="ce254">
            <text:p>20.82</text:p>
          </table:table-cell>
          <table:table-cell office:value-type="float" office:value="2817467" table:style-name="ce253">
            <text:p><text:s text:c="3"/>2,817,467</text:p>
          </table:table-cell>
          <table:table-cell office:value-type="float" office:value="1463089" table:style-name="ce253">
            <text:p><text:s text:c="3"/>1,463,089</text:p>
          </table:table-cell>
          <table:table-cell office:value-type="float" office:value="1354378" table:style-name="ce253">
            <text:p><text:s text:c="3"/>1,354,378</text:p>
          </table:table-cell>
          <table:table-cell office:value-type="float" office:value="41.118743565771638" table:style-name="ce254">
            <text:p>41.12</text:p>
          </table:table-cell>
          <table:table-cell office:value-type="float" office:value="5804074" table:style-name="ce253">
            <text:p><text:s text:c="3"/>5,804,074</text:p>
          </table:table-cell>
          <table:table-cell office:value-type="float" office:value="2917762" table:style-name="ce253">
            <text:p><text:s text:c="3"/>2,917,762</text:p>
          </table:table-cell>
          <table:table-cell office:value-type="float" office:value="2886312" table:style-name="ce253">
            <text:p><text:s text:c="3"/>2,886,312</text:p>
          </table:table-cell>
          <table:table-cell office:value-type="float" office:value="84.705954122182263" table:style-name="ce254">
            <text:p>84.71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48763" table:style-name="ce255">
            <text:p><text:s text:c="3"/>448,763</text:p>
          </table:table-cell>
          <table:table-cell office:value-type="float" office:value="224635" table:style-name="ce255">
            <text:p><text:s text:c="3"/>224,635</text:p>
          </table:table-cell>
          <table:table-cell office:value-type="float" office:value="224128" table:style-name="ce255">
            <text:p><text:s text:c="3"/>224,128</text:p>
          </table:table-cell>
          <table:table-cell office:value-type="float" office:value="100" table:style-name="ce256">
            <text:p>100.00</text:p>
          </table:table-cell>
          <table:table-cell office:value-type="float" office:value="48832" table:style-name="ce255">
            <text:p><text:s text:c="3"/>48,832</text:p>
          </table:table-cell>
          <table:table-cell office:value-type="float" office:value="25304" table:style-name="ce255">
            <text:p><text:s text:c="3"/>25,304</text:p>
          </table:table-cell>
          <table:table-cell office:value-type="float" office:value="23528" table:style-name="ce255">
            <text:p><text:s text:c="3"/>23,528</text:p>
          </table:table-cell>
          <table:table-cell office:value-type="float" office:value="10.88146750066293" table:style-name="ce256">
            <text:p>10.88</text:p>
          </table:table-cell>
          <table:table-cell office:value-type="float" office:value="305442" table:style-name="ce255">
            <text:p><text:s text:c="3"/>305,442</text:p>
          </table:table-cell>
          <table:table-cell office:value-type="float" office:value="155710" table:style-name="ce255">
            <text:p><text:s text:c="3"/>155,710</text:p>
          </table:table-cell>
          <table:table-cell office:value-type="float" office:value="149732" table:style-name="ce255">
            <text:p><text:s text:c="3"/>149,732</text:p>
          </table:table-cell>
          <table:table-cell office:value-type="float" office:value="68.063097893542917" table:style-name="ce256">
            <text:p>68.06</text:p>
          </table:table-cell>
          <table:table-cell office:value-type="float" office:value="94489" table:style-name="ce255">
            <text:p><text:s text:c="3"/>94,489</text:p>
          </table:table-cell>
          <table:table-cell office:value-type="float" office:value="43621" table:style-name="ce255">
            <text:p><text:s text:c="3"/>43,621</text:p>
          </table:table-cell>
          <table:table-cell office:value-type="float" office:value="50868" table:style-name="ce255">
            <text:p><text:s text:c="3"/>50,868</text:p>
          </table:table-cell>
          <table:table-cell office:value-type="float" office:value="21.055434605794151" table:style-name="ce256">
            <text:p>21.06</text:p>
          </table:table-cell>
          <table:table-cell office:value-type="float" office:value="182000" table:style-name="ce255">
            <text:p><text:s text:c="3"/>182,000</text:p>
          </table:table-cell>
          <table:table-cell office:value-type="float" office:value="93840" table:style-name="ce255">
            <text:p><text:s text:c="3"/>93,840</text:p>
          </table:table-cell>
          <table:table-cell office:value-type="float" office:value="88160" table:style-name="ce255">
            <text:p><text:s text:c="3"/>88,160</text:p>
          </table:table-cell>
          <table:table-cell office:value-type="float" office:value="40.555928184810249" table:style-name="ce256">
            <text:p>40.56</text:p>
          </table:table-cell>
          <table:table-cell office:value-type="float" office:value="381731" table:style-name="ce255">
            <text:p><text:s text:c="3"/>381,731</text:p>
          </table:table-cell>
          <table:table-cell office:value-type="float" office:value="189933" table:style-name="ce255">
            <text:p><text:s text:c="3"/>189,933</text:p>
          </table:table-cell>
          <table:table-cell office:value-type="float" office:value="191798" table:style-name="ce255">
            <text:p><text:s text:c="3"/>191,798</text:p>
          </table:table-cell>
          <table:table-cell office:value-type="float" office:value="85.062939680856047" table:style-name="ce256">
            <text:p>85.0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7286" table:style-name="ce257">
            <text:p><text:s text:c="3"/>597,286</text:p>
          </table:table-cell>
          <table:table-cell office:value-type="float" office:value="303831" table:style-name="ce257">
            <text:p><text:s text:c="3"/>303,831</text:p>
          </table:table-cell>
          <table:table-cell office:value-type="float" office:value="293455" table:style-name="ce257">
            <text:p><text:s text:c="3"/>293,455</text:p>
          </table:table-cell>
          <table:table-cell office:value-type="float" office:value="100" table:style-name="ce258">
            <text:p>100.00</text:p>
          </table:table-cell>
          <table:table-cell office:value-type="float" office:value="87405" table:style-name="ce257">
            <text:p><text:s text:c="3"/>87,405</text:p>
          </table:table-cell>
          <table:table-cell office:value-type="float" office:value="45185" table:style-name="ce257">
            <text:p><text:s text:c="3"/>45,185</text:p>
          </table:table-cell>
          <table:table-cell office:value-type="float" office:value="42220" table:style-name="ce257">
            <text:p><text:s text:c="3"/>42,220</text:p>
          </table:table-cell>
          <table:table-cell office:value-type="float" office:value="14.63369307166081" table:style-name="ce258">
            <text:p>14.63</text:p>
          </table:table-cell>
          <table:table-cell office:value-type="float" office:value="418418" table:style-name="ce257">
            <text:p><text:s text:c="3"/>418,418</text:p>
          </table:table-cell>
          <table:table-cell office:value-type="float" office:value="215053" table:style-name="ce257">
            <text:p><text:s text:c="3"/>215,053</text:p>
          </table:table-cell>
          <table:table-cell office:value-type="float" office:value="203365" table:style-name="ce257">
            <text:p><text:s text:c="3"/>203,365</text:p>
          </table:table-cell>
          <table:table-cell office:value-type="float" office:value="70.053207341206729" table:style-name="ce258">
            <text:p>70.05</text:p>
          </table:table-cell>
          <table:table-cell office:value-type="float" office:value="91463" table:style-name="ce257">
            <text:p><text:s text:c="3"/>91,463</text:p>
          </table:table-cell>
          <table:table-cell office:value-type="float" office:value="43593" table:style-name="ce257">
            <text:p><text:s text:c="3"/>43,593</text:p>
          </table:table-cell>
          <table:table-cell office:value-type="float" office:value="47870" table:style-name="ce257">
            <text:p><text:s text:c="3"/>47,870</text:p>
          </table:table-cell>
          <table:table-cell office:value-type="float" office:value="15.313099587132459" table:style-name="ce258">
            <text:p>15.31</text:p>
          </table:table-cell>
          <table:table-cell office:value-type="float" office:value="263271" table:style-name="ce257">
            <text:p><text:s text:c="3"/>263,271</text:p>
          </table:table-cell>
          <table:table-cell office:value-type="float" office:value="135989" table:style-name="ce257">
            <text:p><text:s text:c="3"/>135,989</text:p>
          </table:table-cell>
          <table:table-cell office:value-type="float" office:value="127282" table:style-name="ce257">
            <text:p><text:s text:c="3"/>127,282</text:p>
          </table:table-cell>
          <table:table-cell office:value-type="float" office:value="44.077878939067723" table:style-name="ce258">
            <text:p>44.08</text:p>
          </table:table-cell>
          <table:table-cell office:value-type="float" office:value="479930" table:style-name="ce257">
            <text:p><text:s text:c="3"/>479,930</text:p>
          </table:table-cell>
          <table:table-cell office:value-type="float" office:value="242929" table:style-name="ce257">
            <text:p><text:s text:c="3"/>242,929</text:p>
          </table:table-cell>
          <table:table-cell office:value-type="float" office:value="237001" table:style-name="ce257">
            <text:p><text:s text:c="3"/>237,001</text:p>
          </table:table-cell>
          <table:table-cell office:value-type="float" office:value="80.351791269174228" table:style-name="ce258">
            <text:p>80.3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0213" table:style-name="ce259">
            <text:p><text:s text:c="3"/>530,213</text:p>
          </table:table-cell>
          <table:table-cell office:value-type="float" office:value="272226" table:style-name="ce259">
            <text:p><text:s text:c="3"/>272,226</text:p>
          </table:table-cell>
          <table:table-cell office:value-type="float" office:value="257987" table:style-name="ce259">
            <text:p><text:s text:c="3"/>257,987</text:p>
          </table:table-cell>
          <table:table-cell office:value-type="float" office:value="100" table:style-name="ce260">
            <text:p>100.00</text:p>
          </table:table-cell>
          <table:table-cell office:value-type="float" office:value="59386" table:style-name="ce259">
            <text:p><text:s text:c="3"/>59,386</text:p>
          </table:table-cell>
          <table:table-cell office:value-type="float" office:value="30666" table:style-name="ce259">
            <text:p><text:s text:c="3"/>30,666</text:p>
          </table:table-cell>
          <table:table-cell office:value-type="float" office:value="28720" table:style-name="ce259">
            <text:p><text:s text:c="3"/>28,720</text:p>
          </table:table-cell>
          <table:table-cell office:value-type="float" office:value="11.200404365792609" table:style-name="ce260">
            <text:p>11.20</text:p>
          </table:table-cell>
          <table:table-cell office:value-type="float" office:value="362033" table:style-name="ce259">
            <text:p><text:s text:c="3"/>362,033</text:p>
          </table:table-cell>
          <table:table-cell office:value-type="float" office:value="189861" table:style-name="ce259">
            <text:p><text:s text:c="3"/>189,861</text:p>
          </table:table-cell>
          <table:table-cell office:value-type="float" office:value="172172" table:style-name="ce259">
            <text:p><text:s text:c="3"/>172,172</text:p>
          </table:table-cell>
          <table:table-cell office:value-type="float" office:value="68.280672107247469" table:style-name="ce260">
            <text:p>68.28</text:p>
          </table:table-cell>
          <table:table-cell office:value-type="float" office:value="108794" table:style-name="ce259">
            <text:p><text:s text:c="3"/>108,794</text:p>
          </table:table-cell>
          <table:table-cell office:value-type="float" office:value="51699" table:style-name="ce259">
            <text:p><text:s text:c="3"/>51,699</text:p>
          </table:table-cell>
          <table:table-cell office:value-type="float" office:value="57095" table:style-name="ce259">
            <text:p><text:s text:c="3"/>57,095</text:p>
          </table:table-cell>
          <table:table-cell office:value-type="float" office:value="20.51892352695992" table:style-name="ce260">
            <text:p>20.52</text:p>
          </table:table-cell>
          <table:table-cell office:value-type="float" office:value="221211" table:style-name="ce259">
            <text:p><text:s text:c="3"/>221,211</text:p>
          </table:table-cell>
          <table:table-cell office:value-type="float" office:value="117029" table:style-name="ce259">
            <text:p><text:s text:c="3"/>117,029</text:p>
          </table:table-cell>
          <table:table-cell office:value-type="float" office:value="104182" table:style-name="ce259">
            <text:p><text:s text:c="3"/>104,182</text:p>
          </table:table-cell>
          <table:table-cell office:value-type="float" office:value="41.721157346198602" table:style-name="ce260">
            <text:p>41.72</text:p>
          </table:table-cell>
          <table:table-cell office:value-type="float" office:value="447981" table:style-name="ce259">
            <text:p><text:s text:c="3"/>447,981</text:p>
          </table:table-cell>
          <table:table-cell office:value-type="float" office:value="229605" table:style-name="ce259">
            <text:p><text:s text:c="3"/>229,605</text:p>
          </table:table-cell>
          <table:table-cell office:value-type="float" office:value="218376" table:style-name="ce259">
            <text:p><text:s text:c="3"/>218,376</text:p>
          </table:table-cell>
          <table:table-cell office:value-type="float" office:value="84.490761260097358" table:style-name="ce260">
            <text:p>84.4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05583" table:style-name="ce261">
            <text:p><text:s text:c="3"/>1,205,583</text:p>
          </table:table-cell>
          <table:table-cell office:value-type="float" office:value="611008" table:style-name="ce261">
            <text:p><text:s text:c="3"/>611,008</text:p>
          </table:table-cell>
          <table:table-cell office:value-type="float" office:value="594575" table:style-name="ce261">
            <text:p><text:s text:c="3"/>594,575</text:p>
          </table:table-cell>
          <table:table-cell office:value-type="float" office:value="100" table:style-name="ce262">
            <text:p>100.00</text:p>
          </table:table-cell>
          <table:table-cell office:value-type="float" office:value="136314" table:style-name="ce261">
            <text:p><text:s text:c="3"/>136,314</text:p>
          </table:table-cell>
          <table:table-cell office:value-type="float" office:value="71055" table:style-name="ce261">
            <text:p><text:s text:c="3"/>71,055</text:p>
          </table:table-cell>
          <table:table-cell office:value-type="float" office:value="65259" table:style-name="ce261">
            <text:p><text:s text:c="3"/>65,259</text:p>
          </table:table-cell>
          <table:table-cell office:value-type="float" office:value="11.30689467253603" table:style-name="ce262">
            <text:p>11.31</text:p>
          </table:table-cell>
          <table:table-cell office:value-type="float" office:value="819681" table:style-name="ce261">
            <text:p><text:s text:c="3"/>819,681</text:p>
          </table:table-cell>
          <table:table-cell office:value-type="float" office:value="424187" table:style-name="ce261">
            <text:p><text:s text:c="3"/>424,187</text:p>
          </table:table-cell>
          <table:table-cell office:value-type="float" office:value="395494" table:style-name="ce261">
            <text:p><text:s text:c="3"/>395,494</text:p>
          </table:table-cell>
          <table:table-cell office:value-type="float" office:value="67.990424549782134" table:style-name="ce262">
            <text:p>67.99</text:p>
          </table:table-cell>
          <table:table-cell office:value-type="float" office:value="249588" table:style-name="ce261">
            <text:p><text:s text:c="3"/>249,588</text:p>
          </table:table-cell>
          <table:table-cell office:value-type="float" office:value="115766" table:style-name="ce261">
            <text:p><text:s text:c="3"/>115,766</text:p>
          </table:table-cell>
          <table:table-cell office:value-type="float" office:value="133822" table:style-name="ce261">
            <text:p><text:s text:c="3"/>133,822</text:p>
          </table:table-cell>
          <table:table-cell office:value-type="float" office:value="20.702680777681831" table:style-name="ce262">
            <text:p>20.70</text:p>
          </table:table-cell>
          <table:table-cell office:value-type="float" office:value="506725" table:style-name="ce261">
            <text:p><text:s text:c="3"/>506,725</text:p>
          </table:table-cell>
          <table:table-cell office:value-type="float" office:value="263291" table:style-name="ce261">
            <text:p><text:s text:c="3"/>263,291</text:p>
          </table:table-cell>
          <table:table-cell office:value-type="float" office:value="243434" table:style-name="ce261">
            <text:p><text:s text:c="3"/>243,434</text:p>
          </table:table-cell>
          <table:table-cell office:value-type="float" office:value="42.031531632413532" table:style-name="ce262">
            <text:p>42.03</text:p>
          </table:table-cell>
          <table:table-cell office:value-type="float" office:value="1017559" table:style-name="ce261">
            <text:p><text:s text:c="3"/>1,017,559</text:p>
          </table:table-cell>
          <table:table-cell office:value-type="float" office:value="512716" table:style-name="ce261">
            <text:p><text:s text:c="3"/>512,716</text:p>
          </table:table-cell>
          <table:table-cell office:value-type="float" office:value="504843" table:style-name="ce261">
            <text:p><text:s text:c="3"/>504,843</text:p>
          </table:table-cell>
          <table:table-cell office:value-type="float" office:value="84.40389421549574" table:style-name="ce262">
            <text:p>84.4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67424" table:style-name="ce263">
            <text:p><text:s text:c="3"/>467,424</text:p>
          </table:table-cell>
          <table:table-cell office:value-type="float" office:value="237213" table:style-name="ce263">
            <text:p><text:s text:c="3"/>237,213</text:p>
          </table:table-cell>
          <table:table-cell office:value-type="float" office:value="230211" table:style-name="ce263">
            <text:p><text:s text:c="3"/>230,211</text:p>
          </table:table-cell>
          <table:table-cell office:value-type="float" office:value="100" table:style-name="ce264">
            <text:p>100.00</text:p>
          </table:table-cell>
          <table:table-cell office:value-type="float" office:value="46961" table:style-name="ce263">
            <text:p><text:s text:c="3"/>46,961</text:p>
          </table:table-cell>
          <table:table-cell office:value-type="float" office:value="24439" table:style-name="ce263">
            <text:p><text:s text:c="3"/>24,439</text:p>
          </table:table-cell>
          <table:table-cell office:value-type="float" office:value="22522" table:style-name="ce263">
            <text:p><text:s text:c="3"/>22,522</text:p>
          </table:table-cell>
          <table:table-cell office:value-type="float" office:value="10.046766961046069" table:style-name="ce264">
            <text:p>10.05</text:p>
          </table:table-cell>
          <table:table-cell office:value-type="float" office:value="312714" table:style-name="ce263">
            <text:p><text:s text:c="3"/>312,714</text:p>
          </table:table-cell>
          <table:table-cell office:value-type="float" office:value="162137" table:style-name="ce263">
            <text:p><text:s text:c="3"/>162,137</text:p>
          </table:table-cell>
          <table:table-cell office:value-type="float" office:value="150577" table:style-name="ce263">
            <text:p><text:s text:c="3"/>150,577</text:p>
          </table:table-cell>
          <table:table-cell office:value-type="float" office:value="66.901571164510159" table:style-name="ce264">
            <text:p>66.90</text:p>
          </table:table-cell>
          <table:table-cell office:value-type="float" office:value="107749" table:style-name="ce263">
            <text:p><text:s text:c="3"/>107,749</text:p>
          </table:table-cell>
          <table:table-cell office:value-type="float" office:value="50637" table:style-name="ce263">
            <text:p><text:s text:c="3"/>50,637</text:p>
          </table:table-cell>
          <table:table-cell office:value-type="float" office:value="57112" table:style-name="ce263">
            <text:p><text:s text:c="3"/>57,112</text:p>
          </table:table-cell>
          <table:table-cell office:value-type="float" office:value="23.051661874443759" table:style-name="ce264">
            <text:p>23.05</text:p>
          </table:table-cell>
          <table:table-cell office:value-type="float" office:value="185024" table:style-name="ce263">
            <text:p><text:s text:c="3"/>185,024</text:p>
          </table:table-cell>
          <table:table-cell office:value-type="float" office:value="97339" table:style-name="ce263">
            <text:p><text:s text:c="3"/>97,339</text:p>
          </table:table-cell>
          <table:table-cell office:value-type="float" office:value="87685" table:style-name="ce263">
            <text:p><text:s text:c="3"/>87,685</text:p>
          </table:table-cell>
          <table:table-cell office:value-type="float" office:value="39.58376121037859" table:style-name="ce264">
            <text:p>39.58</text:p>
          </table:table-cell>
          <table:table-cell office:value-type="float" office:value="402055" table:style-name="ce263">
            <text:p><text:s text:c="3"/>402,055</text:p>
          </table:table-cell>
          <table:table-cell office:value-type="float" office:value="203228" table:style-name="ce263">
            <text:p><text:s text:c="3"/>203,228</text:p>
          </table:table-cell>
          <table:table-cell office:value-type="float" office:value="198827" table:style-name="ce263">
            <text:p><text:s text:c="3"/>198,827</text:p>
          </table:table-cell>
          <table:table-cell office:value-type="float" office:value="86.015052714451983" table:style-name="ce264">
            <text:p>86.0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48459" table:style-name="ce265">
            <text:p><text:s text:c="3"/>648,459</text:p>
          </table:table-cell>
          <table:table-cell office:value-type="float" office:value="332835" table:style-name="ce265">
            <text:p><text:s text:c="3"/>332,835</text:p>
          </table:table-cell>
          <table:table-cell office:value-type="float" office:value="315624" table:style-name="ce265">
            <text:p><text:s text:c="3"/>315,624</text:p>
          </table:table-cell>
          <table:table-cell office:value-type="float" office:value="100" table:style-name="ce266">
            <text:p>100.00</text:p>
          </table:table-cell>
          <table:table-cell office:value-type="float" office:value="67569" table:style-name="ce265">
            <text:p><text:s text:c="3"/>67,569</text:p>
          </table:table-cell>
          <table:table-cell office:value-type="float" office:value="34865" table:style-name="ce265">
            <text:p><text:s text:c="3"/>34,865</text:p>
          </table:table-cell>
          <table:table-cell office:value-type="float" office:value="32704" table:style-name="ce265">
            <text:p><text:s text:c="3"/>32,704</text:p>
          </table:table-cell>
          <table:table-cell office:value-type="float" office:value="10.4199340282115" table:style-name="ce266">
            <text:p>10.42</text:p>
          </table:table-cell>
          <table:table-cell office:value-type="float" office:value="438031" table:style-name="ce265">
            <text:p><text:s text:c="3"/>438,031</text:p>
          </table:table-cell>
          <table:table-cell office:value-type="float" office:value="231156" table:style-name="ce265">
            <text:p><text:s text:c="3"/>231,156</text:p>
          </table:table-cell>
          <table:table-cell office:value-type="float" office:value="206875" table:style-name="ce265">
            <text:p><text:s text:c="3"/>206,875</text:p>
          </table:table-cell>
          <table:table-cell office:value-type="float" office:value="67.549528960196398" table:style-name="ce266">
            <text:p>67.55</text:p>
          </table:table-cell>
          <table:table-cell office:value-type="float" office:value="142859" table:style-name="ce265">
            <text:p><text:s text:c="3"/>142,859</text:p>
          </table:table-cell>
          <table:table-cell office:value-type="float" office:value="66814" table:style-name="ce265">
            <text:p><text:s text:c="3"/>66,814</text:p>
          </table:table-cell>
          <table:table-cell office:value-type="float" office:value="76045" table:style-name="ce265">
            <text:p><text:s text:c="3"/>76,045</text:p>
          </table:table-cell>
          <table:table-cell office:value-type="float" office:value="22.030537011592099" table:style-name="ce266">
            <text:p>22.03</text:p>
          </table:table-cell>
          <table:table-cell office:value-type="float" office:value="262507" table:style-name="ce265">
            <text:p><text:s text:c="3"/>262,507</text:p>
          </table:table-cell>
          <table:table-cell office:value-type="float" office:value="136818" table:style-name="ce265">
            <text:p><text:s text:c="3"/>136,818</text:p>
          </table:table-cell>
          <table:table-cell office:value-type="float" office:value="125689" table:style-name="ce265">
            <text:p><text:s text:c="3"/>125,689</text:p>
          </table:table-cell>
          <table:table-cell office:value-type="float" office:value="40.481664993469131" table:style-name="ce266">
            <text:p>40.48</text:p>
          </table:table-cell>
          <table:table-cell office:value-type="float" office:value="554384" table:style-name="ce265">
            <text:p><text:s text:c="3"/>554,384</text:p>
          </table:table-cell>
          <table:table-cell office:value-type="float" office:value="284019" table:style-name="ce265">
            <text:p><text:s text:c="3"/>284,019</text:p>
          </table:table-cell>
          <table:table-cell office:value-type="float" office:value="270365" table:style-name="ce265">
            <text:p><text:s text:c="3"/>270,365</text:p>
          </table:table-cell>
          <table:table-cell office:value-type="float" office:value="85.49252921156156" table:style-name="ce266">
            <text:p>85.4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1253" table:style-name="ce267">
            <text:p><text:s text:c="3"/>471,253</text:p>
          </table:table-cell>
          <table:table-cell office:value-type="float" office:value="243626" table:style-name="ce267">
            <text:p><text:s text:c="3"/>243,626</text:p>
          </table:table-cell>
          <table:table-cell office:value-type="float" office:value="227627" table:style-name="ce267">
            <text:p><text:s text:c="3"/>227,627</text:p>
          </table:table-cell>
          <table:table-cell office:value-type="float" office:value="100" table:style-name="ce268">
            <text:p>100.00</text:p>
          </table:table-cell>
          <table:table-cell office:value-type="float" office:value="38386" table:style-name="ce267">
            <text:p><text:s text:c="3"/>38,386</text:p>
          </table:table-cell>
          <table:table-cell office:value-type="float" office:value="19931" table:style-name="ce267">
            <text:p><text:s text:c="3"/>19,931</text:p>
          </table:table-cell>
          <table:table-cell office:value-type="float" office:value="18455" table:style-name="ce267">
            <text:p><text:s text:c="3"/>18,455</text:p>
          </table:table-cell>
          <table:table-cell office:value-type="float" office:value="8.1455184370179108" table:style-name="ce268">
            <text:p>8.15</text:p>
          </table:table-cell>
          <table:table-cell office:value-type="float" office:value="317584" table:style-name="ce267">
            <text:p><text:s text:c="3"/>317,584</text:p>
          </table:table-cell>
          <table:table-cell office:value-type="float" office:value="168713" table:style-name="ce267">
            <text:p><text:s text:c="3"/>168,713</text:p>
          </table:table-cell>
          <table:table-cell office:value-type="float" office:value="148871" table:style-name="ce267">
            <text:p><text:s text:c="3"/>148,871</text:p>
          </table:table-cell>
          <table:table-cell office:value-type="float" office:value="67.391401221848994" table:style-name="ce268">
            <text:p>67.39</text:p>
          </table:table-cell>
          <table:table-cell office:value-type="float" office:value="115283" table:style-name="ce267">
            <text:p><text:s text:c="3"/>115,283</text:p>
          </table:table-cell>
          <table:table-cell office:value-type="float" office:value="54982" table:style-name="ce267">
            <text:p><text:s text:c="3"/>54,982</text:p>
          </table:table-cell>
          <table:table-cell office:value-type="float" office:value="60301" table:style-name="ce267">
            <text:p><text:s text:c="3"/>60,301</text:p>
          </table:table-cell>
          <table:table-cell office:value-type="float" office:value="24.463080341133111" table:style-name="ce268">
            <text:p>24.46</text:p>
          </table:table-cell>
          <table:table-cell office:value-type="float" office:value="185485" table:style-name="ce267">
            <text:p><text:s text:c="3"/>185,485</text:p>
          </table:table-cell>
          <table:table-cell office:value-type="float" office:value="98456" table:style-name="ce267">
            <text:p><text:s text:c="3"/>98,456</text:p>
          </table:table-cell>
          <table:table-cell office:value-type="float" office:value="87029" table:style-name="ce267">
            <text:p><text:s text:c="3"/>87,029</text:p>
          </table:table-cell>
          <table:table-cell office:value-type="float" office:value="39.359961634196488" table:style-name="ce268">
            <text:p>39.36</text:p>
          </table:table-cell>
          <table:table-cell office:value-type="float" office:value="415870" table:style-name="ce267">
            <text:p><text:s text:c="3"/>415,870</text:p>
          </table:table-cell>
          <table:table-cell office:value-type="float" office:value="214745" table:style-name="ce267">
            <text:p><text:s text:c="3"/>214,745</text:p>
          </table:table-cell>
          <table:table-cell office:value-type="float" office:value="201125" table:style-name="ce267">
            <text:p><text:s text:c="3"/>201,125</text:p>
          </table:table-cell>
          <table:table-cell office:value-type="float" office:value="88.247714072907755" table:style-name="ce268">
            <text:p>88.2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80101" table:style-name="ce269">
            <text:p><text:s text:c="3"/>780,101</text:p>
          </table:table-cell>
          <table:table-cell office:value-type="float" office:value="393783" table:style-name="ce269">
            <text:p><text:s text:c="3"/>393,783</text:p>
          </table:table-cell>
          <table:table-cell office:value-type="float" office:value="386318" table:style-name="ce269">
            <text:p><text:s text:c="3"/>386,318</text:p>
          </table:table-cell>
          <table:table-cell office:value-type="float" office:value="100" table:style-name="ce270">
            <text:p>100.00</text:p>
          </table:table-cell>
          <table:table-cell office:value-type="float" office:value="77629" table:style-name="ce269">
            <text:p><text:s text:c="3"/>77,629</text:p>
          </table:table-cell>
          <table:table-cell office:value-type="float" office:value="40283" table:style-name="ce269">
            <text:p><text:s text:c="3"/>40,283</text:p>
          </table:table-cell>
          <table:table-cell office:value-type="float" office:value="37346" table:style-name="ce269">
            <text:p><text:s text:c="3"/>37,346</text:p>
          </table:table-cell>
          <table:table-cell office:value-type="float" office:value="9.9511473514327005" table:style-name="ce270">
            <text:p>9.95</text:p>
          </table:table-cell>
          <table:table-cell office:value-type="float" office:value="529836" table:style-name="ce269">
            <text:p><text:s text:c="3"/>529,836</text:p>
          </table:table-cell>
          <table:table-cell office:value-type="float" office:value="273982" table:style-name="ce269">
            <text:p><text:s text:c="3"/>273,982</text:p>
          </table:table-cell>
          <table:table-cell office:value-type="float" office:value="255854" table:style-name="ce269">
            <text:p><text:s text:c="3"/>255,854</text:p>
          </table:table-cell>
          <table:table-cell office:value-type="float" office:value="67.918897681197691" table:style-name="ce270">
            <text:p>67.92</text:p>
          </table:table-cell>
          <table:table-cell office:value-type="float" office:value="172636" table:style-name="ce269">
            <text:p><text:s text:c="3"/>172,636</text:p>
          </table:table-cell>
          <table:table-cell office:value-type="float" office:value="79518" table:style-name="ce269">
            <text:p><text:s text:c="3"/>79,518</text:p>
          </table:table-cell>
          <table:table-cell office:value-type="float" office:value="93118" table:style-name="ce269">
            <text:p><text:s text:c="3"/>93,118</text:p>
          </table:table-cell>
          <table:table-cell office:value-type="float" office:value="22.12995496736961" table:style-name="ce270">
            <text:p>22.13</text:p>
          </table:table-cell>
          <table:table-cell office:value-type="float" office:value="314866" table:style-name="ce269">
            <text:p><text:s text:c="3"/>314,866</text:p>
          </table:table-cell>
          <table:table-cell office:value-type="float" office:value="164683" table:style-name="ce269">
            <text:p><text:s text:c="3"/>164,683</text:p>
          </table:table-cell>
          <table:table-cell office:value-type="float" office:value="150183" table:style-name="ce269">
            <text:p><text:s text:c="3"/>150,183</text:p>
          </table:table-cell>
          <table:table-cell office:value-type="float" office:value="40.362209508768743" table:style-name="ce270">
            <text:p>40.36</text:p>
          </table:table-cell>
          <table:table-cell office:value-type="float" office:value="673633" table:style-name="ce269">
            <text:p><text:s text:c="3"/>673,633</text:p>
          </table:table-cell>
          <table:table-cell office:value-type="float" office:value="338419" table:style-name="ce269">
            <text:p><text:s text:c="3"/>338,419</text:p>
          </table:table-cell>
          <table:table-cell office:value-type="float" office:value="335214" table:style-name="ce269">
            <text:p><text:s text:c="3"/>335,214</text:p>
          </table:table-cell>
          <table:table-cell office:value-type="float" office:value="86.352023648219912" table:style-name="ce270">
            <text:p>86.35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8068" table:style-name="ce271">
            <text:p><text:s text:c="3"/>208,068</text:p>
          </table:table-cell>
          <table:table-cell office:value-type="float" office:value="105665" table:style-name="ce271">
            <text:p><text:s text:c="3"/>105,665</text:p>
          </table:table-cell>
          <table:table-cell office:value-type="float" office:value="102403" table:style-name="ce271">
            <text:p><text:s text:c="3"/>102,403</text:p>
          </table:table-cell>
          <table:table-cell office:value-type="float" office:value="100" table:style-name="ce272">
            <text:p>100.00</text:p>
          </table:table-cell>
          <table:table-cell office:value-type="float" office:value="22141" table:style-name="ce271">
            <text:p><text:s text:c="3"/>22,141</text:p>
          </table:table-cell>
          <table:table-cell office:value-type="float" office:value="11562" table:style-name="ce271">
            <text:p><text:s text:c="3"/>11,562</text:p>
          </table:table-cell>
          <table:table-cell office:value-type="float" office:value="10579" table:style-name="ce271">
            <text:p><text:s text:c="3"/>10,579</text:p>
          </table:table-cell>
          <table:table-cell office:value-type="float" office:value="10.641232673933519" table:style-name="ce272">
            <text:p>10.64</text:p>
          </table:table-cell>
          <table:table-cell office:value-type="float" office:value="141797" table:style-name="ce271">
            <text:p><text:s text:c="3"/>141,797</text:p>
          </table:table-cell>
          <table:table-cell office:value-type="float" office:value="74042" table:style-name="ce271">
            <text:p><text:s text:c="3"/>74,042</text:p>
          </table:table-cell>
          <table:table-cell office:value-type="float" office:value="67755" table:style-name="ce271">
            <text:p><text:s text:c="3"/>67,755</text:p>
          </table:table-cell>
          <table:table-cell office:value-type="float" office:value="68.149355018551631" table:style-name="ce272">
            <text:p>68.15</text:p>
          </table:table-cell>
          <table:table-cell office:value-type="float" office:value="44130" table:style-name="ce271">
            <text:p><text:s text:c="3"/>44,130</text:p>
          </table:table-cell>
          <table:table-cell office:value-type="float" office:value="20061" table:style-name="ce271">
            <text:p><text:s text:c="3"/>20,061</text:p>
          </table:table-cell>
          <table:table-cell office:value-type="float" office:value="24069" table:style-name="ce271">
            <text:p><text:s text:c="3"/>24,069</text:p>
          </table:table-cell>
          <table:table-cell office:value-type="float" office:value="21.20941230751485" table:style-name="ce272">
            <text:p>21.21</text:p>
          </table:table-cell>
          <table:table-cell office:value-type="float" office:value="82791" table:style-name="ce271">
            <text:p><text:s text:c="3"/>82,791</text:p>
          </table:table-cell>
          <table:table-cell office:value-type="float" office:value="43350" table:style-name="ce271">
            <text:p><text:s text:c="3"/>43,350</text:p>
          </table:table-cell>
          <table:table-cell office:value-type="float" office:value="39441" table:style-name="ce271">
            <text:p><text:s text:c="3"/>39,441</text:p>
          </table:table-cell>
          <table:table-cell office:value-type="float" office:value="39.790356998673509" table:style-name="ce272">
            <text:p>39.79</text:p>
          </table:table-cell>
          <table:table-cell office:value-type="float" office:value="177396" table:style-name="ce271">
            <text:p><text:s text:c="3"/>177,396</text:p>
          </table:table-cell>
          <table:table-cell office:value-type="float" office:value="89682" table:style-name="ce271">
            <text:p><text:s text:c="3"/>89,682</text:p>
          </table:table-cell>
          <table:table-cell office:value-type="float" office:value="87714" table:style-name="ce271">
            <text:p><text:s text:c="3"/>87,714</text:p>
          </table:table-cell>
          <table:table-cell office:value-type="float" office:value="85.25866543629968" table:style-name="ce272">
            <text:p>85.2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1615" table:style-name="ce273">
            <text:p><text:s text:c="3"/>311,615</text:p>
          </table:table-cell>
          <table:table-cell office:value-type="float" office:value="155968" table:style-name="ce273">
            <text:p><text:s text:c="3"/>155,968</text:p>
          </table:table-cell>
          <table:table-cell office:value-type="float" office:value="155647" table:style-name="ce273">
            <text:p><text:s text:c="3"/>155,647</text:p>
          </table:table-cell>
          <table:table-cell office:value-type="float" office:value="100" table:style-name="ce274">
            <text:p>100.00</text:p>
          </table:table-cell>
          <table:table-cell office:value-type="float" office:value="33112" table:style-name="ce273">
            <text:p><text:s text:c="3"/>33,112</text:p>
          </table:table-cell>
          <table:table-cell office:value-type="float" office:value="17304" table:style-name="ce273">
            <text:p><text:s text:c="3"/>17,304</text:p>
          </table:table-cell>
          <table:table-cell office:value-type="float" office:value="15808" table:style-name="ce273">
            <text:p><text:s text:c="3"/>15,808</text:p>
          </table:table-cell>
          <table:table-cell office:value-type="float" office:value="10.62593264123999" table:style-name="ce274">
            <text:p>10.63</text:p>
          </table:table-cell>
          <table:table-cell office:value-type="float" office:value="210444" table:style-name="ce273">
            <text:p><text:s text:c="3"/>210,444</text:p>
          </table:table-cell>
          <table:table-cell office:value-type="float" office:value="107862" table:style-name="ce273">
            <text:p><text:s text:c="3"/>107,862</text:p>
          </table:table-cell>
          <table:table-cell office:value-type="float" office:value="102582" table:style-name="ce273">
            <text:p><text:s text:c="3"/>102,582</text:p>
          </table:table-cell>
          <table:table-cell office:value-type="float" office:value="67.533334403029372" table:style-name="ce274">
            <text:p>67.53</text:p>
          </table:table-cell>
          <table:table-cell office:value-type="float" office:value="68059" table:style-name="ce273">
            <text:p><text:s text:c="3"/>68,059</text:p>
          </table:table-cell>
          <table:table-cell office:value-type="float" office:value="30802" table:style-name="ce273">
            <text:p><text:s text:c="3"/>30,802</text:p>
          </table:table-cell>
          <table:table-cell office:value-type="float" office:value="37257" table:style-name="ce273">
            <text:p><text:s text:c="3"/>37,257</text:p>
          </table:table-cell>
          <table:table-cell office:value-type="float" office:value="21.84073295573063" table:style-name="ce274">
            <text:p>21.84</text:p>
          </table:table-cell>
          <table:table-cell office:value-type="float" office:value="124186" table:style-name="ce273">
            <text:p><text:s text:c="3"/>124,186</text:p>
          </table:table-cell>
          <table:table-cell office:value-type="float" office:value="64375" table:style-name="ce273">
            <text:p><text:s text:c="3"/>64,375</text:p>
          </table:table-cell>
          <table:table-cell office:value-type="float" office:value="59811" table:style-name="ce273">
            <text:p><text:s text:c="3"/>59,811</text:p>
          </table:table-cell>
          <table:table-cell office:value-type="float" office:value="39.852381945670139" table:style-name="ce274">
            <text:p>39.85</text:p>
          </table:table-cell>
          <table:table-cell office:value-type="float" office:value="265778" table:style-name="ce273">
            <text:p><text:s text:c="3"/>265,778</text:p>
          </table:table-cell>
          <table:table-cell office:value-type="float" office:value="131925" table:style-name="ce273">
            <text:p><text:s text:c="3"/>131,925</text:p>
          </table:table-cell>
          <table:table-cell office:value-type="float" office:value="133853" table:style-name="ce273">
            <text:p><text:s text:c="3"/>133,853</text:p>
          </table:table-cell>
          <table:table-cell office:value-type="float" office:value="85.290502703656756" table:style-name="ce274">
            <text:p>85.2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6662" table:style-name="ce275">
            <text:p><text:s text:c="3"/>106,662</text:p>
          </table:table-cell>
          <table:table-cell office:value-type="float" office:value="54535" table:style-name="ce275">
            <text:p><text:s text:c="3"/>54,535</text:p>
          </table:table-cell>
          <table:table-cell office:value-type="float" office:value="52127" table:style-name="ce275">
            <text:p><text:s text:c="3"/>52,127</text:p>
          </table:table-cell>
          <table:table-cell office:value-type="float" office:value="100" table:style-name="ce276">
            <text:p>100.00</text:p>
          </table:table-cell>
          <table:table-cell office:value-type="float" office:value="9872" table:style-name="ce275">
            <text:p><text:s text:c="3"/>9,872</text:p>
          </table:table-cell>
          <table:table-cell office:value-type="float" office:value="5153" table:style-name="ce275">
            <text:p><text:s text:c="3"/>5,153</text:p>
          </table:table-cell>
          <table:table-cell office:value-type="float" office:value="4719" table:style-name="ce275">
            <text:p><text:s text:c="3"/>4,719</text:p>
          </table:table-cell>
          <table:table-cell office:value-type="float" office:value="9.2554049239654201" table:style-name="ce276">
            <text:p>9.26</text:p>
          </table:table-cell>
          <table:table-cell office:value-type="float" office:value="73978" table:style-name="ce275">
            <text:p><text:s text:c="3"/>73,978</text:p>
          </table:table-cell>
          <table:table-cell office:value-type="float" office:value="38582" table:style-name="ce275">
            <text:p><text:s text:c="3"/>38,582</text:p>
          </table:table-cell>
          <table:table-cell office:value-type="float" office:value="35396" table:style-name="ce275">
            <text:p><text:s text:c="3"/>35,396</text:p>
          </table:table-cell>
          <table:table-cell office:value-type="float" office:value="69.357409386660663" table:style-name="ce276">
            <text:p>69.36</text:p>
          </table:table-cell>
          <table:table-cell office:value-type="float" office:value="22812" table:style-name="ce275">
            <text:p><text:s text:c="3"/>22,812</text:p>
          </table:table-cell>
          <table:table-cell office:value-type="float" office:value="10800" table:style-name="ce275">
            <text:p><text:s text:c="3"/>10,800</text:p>
          </table:table-cell>
          <table:table-cell office:value-type="float" office:value="12012" table:style-name="ce275">
            <text:p><text:s text:c="3"/>12,012</text:p>
          </table:table-cell>
          <table:table-cell office:value-type="float" office:value="21.387185689373911" table:style-name="ce276">
            <text:p>21.39</text:p>
          </table:table-cell>
          <table:table-cell office:value-type="float" office:value="45146" table:style-name="ce275">
            <text:p><text:s text:c="3"/>45,146</text:p>
          </table:table-cell>
          <table:table-cell office:value-type="float" office:value="23682" table:style-name="ce275">
            <text:p><text:s text:c="3"/>23,682</text:p>
          </table:table-cell>
          <table:table-cell office:value-type="float" office:value="21464" table:style-name="ce275">
            <text:p><text:s text:c="3"/>21,464</text:p>
          </table:table-cell>
          <table:table-cell office:value-type="float" office:value="42.326226772421293" table:style-name="ce276">
            <text:p>42.33</text:p>
          </table:table-cell>
          <table:table-cell office:value-type="float" office:value="92849" table:style-name="ce275">
            <text:p><text:s text:c="3"/>92,849</text:p>
          </table:table-cell>
          <table:table-cell office:value-type="float" office:value="47305" table:style-name="ce275">
            <text:p><text:s text:c="3"/>47,305</text:p>
          </table:table-cell>
          <table:table-cell office:value-type="float" office:value="45544" table:style-name="ce275">
            <text:p><text:s text:c="3"/>45,544</text:p>
          </table:table-cell>
          <table:table-cell office:value-type="float" office:value="87.049745926384276" table:style-name="ce276">
            <text:p>87.05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59102" table:style-name="ce277">
            <text:p><text:s text:c="3"/>359,102</text:p>
          </table:table-cell>
          <table:table-cell office:value-type="float" office:value="177825" table:style-name="ce277">
            <text:p><text:s text:c="3"/>177,825</text:p>
          </table:table-cell>
          <table:table-cell office:value-type="float" office:value="181277" table:style-name="ce277">
            <text:p><text:s text:c="3"/>181,277</text:p>
          </table:table-cell>
          <table:table-cell office:value-type="float" office:value="100" table:style-name="ce278">
            <text:p>100.00</text:p>
          </table:table-cell>
          <table:table-cell office:value-type="float" office:value="33114" table:style-name="ce277">
            <text:p><text:s text:c="3"/>33,114</text:p>
          </table:table-cell>
          <table:table-cell office:value-type="float" office:value="17165" table:style-name="ce277">
            <text:p><text:s text:c="3"/>17,165</text:p>
          </table:table-cell>
          <table:table-cell office:value-type="float" office:value="15949" table:style-name="ce277">
            <text:p><text:s text:c="3"/>15,949</text:p>
          </table:table-cell>
          <table:table-cell office:value-type="float" office:value="9.2213354422977307" table:style-name="ce278">
            <text:p>9.22</text:p>
          </table:table-cell>
          <table:table-cell office:value-type="float" office:value="244643" table:style-name="ce277">
            <text:p><text:s text:c="3"/>244,643</text:p>
          </table:table-cell>
          <table:table-cell office:value-type="float" office:value="124116" table:style-name="ce277">
            <text:p><text:s text:c="3"/>124,116</text:p>
          </table:table-cell>
          <table:table-cell office:value-type="float" office:value="120527" table:style-name="ce277">
            <text:p><text:s text:c="3"/>120,527</text:p>
          </table:table-cell>
          <table:table-cell office:value-type="float" office:value="68.126326224860904" table:style-name="ce278">
            <text:p>68.13</text:p>
          </table:table-cell>
          <table:table-cell office:value-type="float" office:value="81345" table:style-name="ce277">
            <text:p><text:s text:c="3"/>81,345</text:p>
          </table:table-cell>
          <table:table-cell office:value-type="float" office:value="36544" table:style-name="ce277">
            <text:p><text:s text:c="3"/>36,544</text:p>
          </table:table-cell>
          <table:table-cell office:value-type="float" office:value="44801" table:style-name="ce277">
            <text:p><text:s text:c="3"/>44,801</text:p>
          </table:table-cell>
          <table:table-cell office:value-type="float" office:value="22.65233833284136" table:style-name="ce278">
            <text:p>22.65</text:p>
          </table:table-cell>
          <table:table-cell office:value-type="float" office:value="143047" table:style-name="ce277">
            <text:p><text:s text:c="3"/>143,047</text:p>
          </table:table-cell>
          <table:table-cell office:value-type="float" office:value="73911" table:style-name="ce277">
            <text:p><text:s text:c="3"/>73,911</text:p>
          </table:table-cell>
          <table:table-cell office:value-type="float" office:value="69136" table:style-name="ce277">
            <text:p><text:s text:c="3"/>69,136</text:p>
          </table:table-cell>
          <table:table-cell office:value-type="float" office:value="39.834643081909867" table:style-name="ce278">
            <text:p>39.83</text:p>
          </table:table-cell>
          <table:table-cell office:value-type="float" office:value="312682" table:style-name="ce277">
            <text:p><text:s text:c="3"/>312,682</text:p>
          </table:table-cell>
          <table:table-cell office:value-type="float" office:value="153719" table:style-name="ce277">
            <text:p><text:s text:c="3"/>153,719</text:p>
          </table:table-cell>
          <table:table-cell office:value-type="float" office:value="158963" table:style-name="ce277">
            <text:p><text:s text:c="3"/>158,963</text:p>
          </table:table-cell>
          <table:table-cell office:value-type="float" office:value="87.073310647114184" table:style-name="ce278">
            <text:p>87.0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5871" table:style-name="ce279">
            <text:p><text:s text:c="3"/>455,871</text:p>
          </table:table-cell>
          <table:table-cell office:value-type="float" office:value="224836" table:style-name="ce279">
            <text:p><text:s text:c="3"/>224,836</text:p>
          </table:table-cell>
          <table:table-cell office:value-type="float" office:value="231035" table:style-name="ce279">
            <text:p><text:s text:c="3"/>231,035</text:p>
          </table:table-cell>
          <table:table-cell office:value-type="float" office:value="100" table:style-name="ce280">
            <text:p>100.00</text:p>
          </table:table-cell>
          <table:table-cell office:value-type="float" office:value="68444" table:style-name="ce279">
            <text:p><text:s text:c="3"/>68,444</text:p>
          </table:table-cell>
          <table:table-cell office:value-type="float" office:value="35546" table:style-name="ce279">
            <text:p><text:s text:c="3"/>35,546</text:p>
          </table:table-cell>
          <table:table-cell office:value-type="float" office:value="32898" table:style-name="ce279">
            <text:p><text:s text:c="3"/>32,898</text:p>
          </table:table-cell>
          <table:table-cell office:value-type="float" office:value="15.01389647509931" table:style-name="ce280">
            <text:p>15.01</text:p>
          </table:table-cell>
          <table:table-cell office:value-type="float" office:value="312688" table:style-name="ce279">
            <text:p><text:s text:c="3"/>312,688</text:p>
          </table:table-cell>
          <table:table-cell office:value-type="float" office:value="156381" table:style-name="ce279">
            <text:p><text:s text:c="3"/>156,381</text:p>
          </table:table-cell>
          <table:table-cell office:value-type="float" office:value="156307" table:style-name="ce279">
            <text:p><text:s text:c="3"/>156,307</text:p>
          </table:table-cell>
          <table:table-cell office:value-type="float" office:value="68.591333951929386" table:style-name="ce280">
            <text:p>68.59</text:p>
          </table:table-cell>
          <table:table-cell office:value-type="float" office:value="74739" table:style-name="ce279">
            <text:p><text:s text:c="3"/>74,739</text:p>
          </table:table-cell>
          <table:table-cell office:value-type="float" office:value="32909" table:style-name="ce279">
            <text:p><text:s text:c="3"/>32,909</text:p>
          </table:table-cell>
          <table:table-cell office:value-type="float" office:value="41830" table:style-name="ce279">
            <text:p><text:s text:c="3"/>41,830</text:p>
          </table:table-cell>
          <table:table-cell office:value-type="float" office:value="16.394769572971299" table:style-name="ce280">
            <text:p>16.39</text:p>
          </table:table-cell>
          <table:table-cell office:value-type="float" office:value="194586" table:style-name="ce279">
            <text:p><text:s text:c="3"/>194,586</text:p>
          </table:table-cell>
          <table:table-cell office:value-type="float" office:value="97891" table:style-name="ce279">
            <text:p><text:s text:c="3"/>97,891</text:p>
          </table:table-cell>
          <table:table-cell office:value-type="float" office:value="96695" table:style-name="ce279">
            <text:p><text:s text:c="3"/>96,695</text:p>
          </table:table-cell>
          <table:table-cell office:value-type="float" office:value="42.68444362549932" table:style-name="ce280">
            <text:p>42.68</text:p>
          </table:table-cell>
          <table:table-cell office:value-type="float" office:value="364109" table:style-name="ce279">
            <text:p><text:s text:c="3"/>364,109</text:p>
          </table:table-cell>
          <table:table-cell office:value-type="float" office:value="177071" table:style-name="ce279">
            <text:p><text:s text:c="3"/>177,071</text:p>
          </table:table-cell>
          <table:table-cell office:value-type="float" office:value="187038" table:style-name="ce279">
            <text:p><text:s text:c="3"/>187,038</text:p>
          </table:table-cell>
          <table:table-cell office:value-type="float" office:value="79.871060014784888" table:style-name="ce280">
            <text:p>79.8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1626" table:style-name="ce281">
            <text:p><text:s text:c="3"/>261,626</text:p>
          </table:table-cell>
          <table:table-cell office:value-type="float" office:value="124955" table:style-name="ce281">
            <text:p><text:s text:c="3"/>124,955</text:p>
          </table:table-cell>
          <table:table-cell office:value-type="float" office:value="136671" table:style-name="ce281">
            <text:p><text:s text:c="3"/>136,671</text:p>
          </table:table-cell>
          <table:table-cell office:value-type="float" office:value="100" table:style-name="ce282">
            <text:p>100.00</text:p>
          </table:table-cell>
          <table:table-cell office:value-type="float" office:value="31520" table:style-name="ce281">
            <text:p><text:s text:c="3"/>31,520</text:p>
          </table:table-cell>
          <table:table-cell office:value-type="float" office:value="16273" table:style-name="ce281">
            <text:p><text:s text:c="3"/>16,273</text:p>
          </table:table-cell>
          <table:table-cell office:value-type="float" office:value="15247" table:style-name="ce281">
            <text:p><text:s text:c="3"/>15,247</text:p>
          </table:table-cell>
          <table:table-cell office:value-type="float" office:value="12.04773225902624" table:style-name="ce282">
            <text:p>12.05</text:p>
          </table:table-cell>
          <table:table-cell office:value-type="float" office:value="177337" table:style-name="ce281">
            <text:p><text:s text:c="3"/>177,337</text:p>
          </table:table-cell>
          <table:table-cell office:value-type="float" office:value="85730" table:style-name="ce281">
            <text:p><text:s text:c="3"/>85,730</text:p>
          </table:table-cell>
          <table:table-cell office:value-type="float" office:value="91607" table:style-name="ce281">
            <text:p><text:s text:c="3"/>91,607</text:p>
          </table:table-cell>
          <table:table-cell office:value-type="float" office:value="67.782636282326678" table:style-name="ce282">
            <text:p>67.78</text:p>
          </table:table-cell>
          <table:table-cell office:value-type="float" office:value="52769" table:style-name="ce281">
            <text:p><text:s text:c="3"/>52,769</text:p>
          </table:table-cell>
          <table:table-cell office:value-type="float" office:value="22952" table:style-name="ce281">
            <text:p><text:s text:c="3"/>22,952</text:p>
          </table:table-cell>
          <table:table-cell office:value-type="float" office:value="29817" table:style-name="ce281">
            <text:p><text:s text:c="3"/>29,817</text:p>
          </table:table-cell>
          <table:table-cell office:value-type="float" office:value="20.169631458647078" table:style-name="ce282">
            <text:p>20.17</text:p>
          </table:table-cell>
          <table:table-cell office:value-type="float" office:value="106622" table:style-name="ce281">
            <text:p><text:s text:c="3"/>106,622</text:p>
          </table:table-cell>
          <table:table-cell office:value-type="float" office:value="52435" table:style-name="ce281">
            <text:p><text:s text:c="3"/>52,435</text:p>
          </table:table-cell>
          <table:table-cell office:value-type="float" office:value="54187" table:style-name="ce281">
            <text:p><text:s text:c="3"/>54,187</text:p>
          </table:table-cell>
          <table:table-cell office:value-type="float" office:value="40.753594826202288" table:style-name="ce282">
            <text:p>40.75</text:p>
          </table:table-cell>
          <table:table-cell office:value-type="float" office:value="218117" table:style-name="ce281">
            <text:p><text:s text:c="3"/>218,117</text:p>
          </table:table-cell>
          <table:table-cell office:value-type="float" office:value="102466" table:style-name="ce281">
            <text:p><text:s text:c="3"/>102,466</text:p>
          </table:table-cell>
          <table:table-cell office:value-type="float" office:value="115651" table:style-name="ce281">
            <text:p><text:s text:c="3"/>115,651</text:p>
          </table:table-cell>
          <table:table-cell office:value-type="float" office:value="83.369772117450097" table:style-name="ce282">
            <text:p>83.37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1899" table:style-name="ce283">
            <text:p><text:s text:c="3"/>151,899</text:p>
          </table:table-cell>
          <table:table-cell office:value-type="float" office:value="76618" table:style-name="ce283">
            <text:p><text:s text:c="3"/>76,618</text:p>
          </table:table-cell>
          <table:table-cell office:value-type="float" office:value="75281" table:style-name="ce283">
            <text:p><text:s text:c="3"/>75,281</text:p>
          </table:table-cell>
          <table:table-cell office:value-type="float" office:value="100" table:style-name="ce284">
            <text:p>100.00</text:p>
          </table:table-cell>
          <table:table-cell office:value-type="float" office:value="11755" table:style-name="ce283">
            <text:p><text:s text:c="3"/>11,755</text:p>
          </table:table-cell>
          <table:table-cell office:value-type="float" office:value="6168" table:style-name="ce283">
            <text:p><text:s text:c="3"/>6,168</text:p>
          </table:table-cell>
          <table:table-cell office:value-type="float" office:value="5587" table:style-name="ce283">
            <text:p><text:s text:c="3"/>5,587</text:p>
          </table:table-cell>
          <table:table-cell office:value-type="float" office:value="7.7386947906174504" table:style-name="ce284">
            <text:p>7.74</text:p>
          </table:table-cell>
          <table:table-cell office:value-type="float" office:value="110052" table:style-name="ce283">
            <text:p><text:s text:c="3"/>110,052</text:p>
          </table:table-cell>
          <table:table-cell office:value-type="float" office:value="55719" table:style-name="ce283">
            <text:p><text:s text:c="3"/>55,719</text:p>
          </table:table-cell>
          <table:table-cell office:value-type="float" office:value="54333" table:style-name="ce283">
            <text:p><text:s text:c="3"/>54,333</text:p>
          </table:table-cell>
          <table:table-cell office:value-type="float" office:value="72.450773211146881" table:style-name="ce284">
            <text:p>72.45</text:p>
          </table:table-cell>
          <table:table-cell office:value-type="float" office:value="30092" table:style-name="ce283">
            <text:p><text:s text:c="3"/>30,092</text:p>
          </table:table-cell>
          <table:table-cell office:value-type="float" office:value="14731" table:style-name="ce283">
            <text:p><text:s text:c="3"/>14,731</text:p>
          </table:table-cell>
          <table:table-cell office:value-type="float" office:value="15361" table:style-name="ce283">
            <text:p><text:s text:c="3"/>15,361</text:p>
          </table:table-cell>
          <table:table-cell office:value-type="float" office:value="19.810531998235671" table:style-name="ce284">
            <text:p>19.81</text:p>
          </table:table-cell>
          <table:table-cell office:value-type="float" office:value="64785" table:style-name="ce283">
            <text:p><text:s text:c="3"/>64,785</text:p>
          </table:table-cell>
          <table:table-cell office:value-type="float" office:value="32964" table:style-name="ce283">
            <text:p><text:s text:c="3"/>32,964</text:p>
          </table:table-cell>
          <table:table-cell office:value-type="float" office:value="31821" table:style-name="ce283">
            <text:p><text:s text:c="3"/>31,821</text:p>
          </table:table-cell>
          <table:table-cell office:value-type="float" office:value="42.650050362411868" table:style-name="ce284">
            <text:p>42.65</text:p>
          </table:table-cell>
          <table:table-cell office:value-type="float" office:value="134511" table:style-name="ce283">
            <text:p><text:s text:c="3"/>134,511</text:p>
          </table:table-cell>
          <table:table-cell office:value-type="float" office:value="67469" table:style-name="ce283">
            <text:p><text:s text:c="3"/>67,469</text:p>
          </table:table-cell>
          <table:table-cell office:value-type="float" office:value="67042" table:style-name="ce283">
            <text:p><text:s text:c="3"/>67,042</text:p>
          </table:table-cell>
          <table:table-cell office:value-type="float" office:value="88.552920032389949" table:style-name="ce284">
            <text:p>88.55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38253" table:style-name="ce285">
            <text:p><text:s text:c="3"/>138,253</text:p>
          </table:table-cell>
          <table:table-cell office:value-type="float" office:value="68662" table:style-name="ce285">
            <text:p><text:s text:c="3"/>68,662</text:p>
          </table:table-cell>
          <table:table-cell office:value-type="float" office:value="69591" table:style-name="ce285">
            <text:p><text:s text:c="3"/>69,591</text:p>
          </table:table-cell>
          <table:table-cell office:value-type="float" office:value="100" table:style-name="ce286">
            <text:p>100.00</text:p>
          </table:table-cell>
          <table:table-cell office:value-type="float" office:value="10492" table:style-name="ce285">
            <text:p><text:s text:c="3"/>10,492</text:p>
          </table:table-cell>
          <table:table-cell office:value-type="float" office:value="5484" table:style-name="ce285">
            <text:p><text:s text:c="3"/>5,484</text:p>
          </table:table-cell>
          <table:table-cell office:value-type="float" office:value="5008" table:style-name="ce285">
            <text:p><text:s text:c="3"/>5,008</text:p>
          </table:table-cell>
          <table:table-cell office:value-type="float" office:value="7.5889854108048302" table:style-name="ce286">
            <text:p>7.59</text:p>
          </table:table-cell>
          <table:table-cell office:value-type="float" office:value="100042" table:style-name="ce285">
            <text:p><text:s text:c="3"/>100,042</text:p>
          </table:table-cell>
          <table:table-cell office:value-type="float" office:value="49767" table:style-name="ce285">
            <text:p><text:s text:c="3"/>49,767</text:p>
          </table:table-cell>
          <table:table-cell office:value-type="float" office:value="50275" table:style-name="ce285">
            <text:p><text:s text:c="3"/>50,275</text:p>
          </table:table-cell>
          <table:table-cell office:value-type="float" office:value="72.361540075079745" table:style-name="ce286">
            <text:p>72.36</text:p>
          </table:table-cell>
          <table:table-cell office:value-type="float" office:value="27719" table:style-name="ce285">
            <text:p><text:s text:c="3"/>27,719</text:p>
          </table:table-cell>
          <table:table-cell office:value-type="float" office:value="13411" table:style-name="ce285">
            <text:p><text:s text:c="3"/>13,411</text:p>
          </table:table-cell>
          <table:table-cell office:value-type="float" office:value="14308" table:style-name="ce285">
            <text:p><text:s text:c="3"/>14,308</text:p>
          </table:table-cell>
          <table:table-cell office:value-type="float" office:value="20.04947451411542" table:style-name="ce286">
            <text:p>20.05</text:p>
          </table:table-cell>
          <table:table-cell office:value-type="float" office:value="58607" table:style-name="ce285">
            <text:p><text:s text:c="3"/>58,607</text:p>
          </table:table-cell>
          <table:table-cell office:value-type="float" office:value="29271" table:style-name="ce285">
            <text:p><text:s text:c="3"/>29,271</text:p>
          </table:table-cell>
          <table:table-cell office:value-type="float" office:value="29336" table:style-name="ce285">
            <text:p><text:s text:c="3"/>29,336</text:p>
          </table:table-cell>
          <table:table-cell office:value-type="float" office:value="42.391123519923617" table:style-name="ce286">
            <text:p>42.39</text:p>
          </table:table-cell>
          <table:table-cell office:value-type="float" office:value="122680" table:style-name="ce285">
            <text:p><text:s text:c="3"/>122,680</text:p>
          </table:table-cell>
          <table:table-cell office:value-type="float" office:value="60508" table:style-name="ce285">
            <text:p><text:s text:c="3"/>60,508</text:p>
          </table:table-cell>
          <table:table-cell office:value-type="float" office:value="62172" table:style-name="ce285">
            <text:p><text:s text:c="3"/>62,172</text:p>
          </table:table-cell>
          <table:table-cell office:value-type="float" office:value="88.735868299422066" table:style-name="ce286">
            <text:p>88.7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646" table:style-name="ce287">
            <text:p><text:s text:c="3"/>13,646</text:p>
          </table:table-cell>
          <table:table-cell office:value-type="float" office:value="7956" table:style-name="ce287">
            <text:p><text:s text:c="3"/>7,956</text:p>
          </table:table-cell>
          <table:table-cell office:value-type="float" office:value="5690" table:style-name="ce287">
            <text:p><text:s text:c="3"/>5,690</text:p>
          </table:table-cell>
          <table:table-cell office:value-type="float" office:value="100" table:style-name="ce288">
            <text:p>100.00</text:p>
          </table:table-cell>
          <table:table-cell office:value-type="float" office:value="1263" table:style-name="ce287">
            <text:p><text:s text:c="3"/>1,263</text:p>
          </table:table-cell>
          <table:table-cell office:value-type="float" office:value="684" table:style-name="ce287">
            <text:p><text:s text:c="3"/>684</text:p>
          </table:table-cell>
          <table:table-cell office:value-type="float" office:value="579" table:style-name="ce287">
            <text:p><text:s text:c="3"/>579</text:p>
          </table:table-cell>
          <table:table-cell office:value-type="float" office:value="9.2554594753041197" table:style-name="ce288">
            <text:p>9.26</text:p>
          </table:table-cell>
          <table:table-cell office:value-type="float" office:value="10010" table:style-name="ce287">
            <text:p><text:s text:c="3"/>10,010</text:p>
          </table:table-cell>
          <table:table-cell office:value-type="float" office:value="5952" table:style-name="ce287">
            <text:p><text:s text:c="3"/>5,952</text:p>
          </table:table-cell>
          <table:table-cell office:value-type="float" office:value="4058" table:style-name="ce287">
            <text:p><text:s text:c="3"/>4,058</text:p>
          </table:table-cell>
          <table:table-cell office:value-type="float" office:value="73.354829253993842" table:style-name="ce288">
            <text:p>73.35</text:p>
          </table:table-cell>
          <table:table-cell office:value-type="float" office:value="2373" table:style-name="ce287">
            <text:p><text:s text:c="3"/>2,373</text:p>
          </table:table-cell>
          <table:table-cell office:value-type="float" office:value="1320" table:style-name="ce287">
            <text:p><text:s text:c="3"/>1,320</text:p>
          </table:table-cell>
          <table:table-cell office:value-type="float" office:value="1053" table:style-name="ce287">
            <text:p><text:s text:c="3"/>1,053</text:p>
          </table:table-cell>
          <table:table-cell office:value-type="float" office:value="17.38971127070204" table:style-name="ce288">
            <text:p>17.39</text:p>
          </table:table-cell>
          <table:table-cell office:value-type="float" office:value="6178" table:style-name="ce287">
            <text:p><text:s text:c="3"/>6,178</text:p>
          </table:table-cell>
          <table:table-cell office:value-type="float" office:value="3693" table:style-name="ce287">
            <text:p><text:s text:c="3"/>3,693</text:p>
          </table:table-cell>
          <table:table-cell office:value-type="float" office:value="2485" table:style-name="ce287">
            <text:p><text:s text:c="3"/>2,485</text:p>
          </table:table-cell>
          <table:table-cell office:value-type="float" office:value="45.273340172944451" table:style-name="ce288">
            <text:p>45.27</text:p>
          </table:table-cell>
          <table:table-cell office:value-type="float" office:value="11831" table:style-name="ce287">
            <text:p><text:s text:c="3"/>11,831</text:p>
          </table:table-cell>
          <table:table-cell office:value-type="float" office:value="6961" table:style-name="ce287">
            <text:p><text:s text:c="3"/>6,961</text:p>
          </table:table-cell>
          <table:table-cell office:value-type="float" office:value="4870" table:style-name="ce287">
            <text:p><text:s text:c="3"/>4,870</text:p>
          </table:table-cell>
          <table:table-cell office:value-type="float" office:value="86.699399091308806" table:style-name="ce288">
            <text:p>86.70</text:p>
          </table:table-cell>
          <table:table-cell table:number-columns-repeated="16359" table:style-name="ce112"/>
        </table:table-row>
        <table:table-row table:style-name="ro27">
          <table:table-cell table:style-name="ce113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16359" table:style-name="ce105"/>
        </table:table-row>
        <table:table-row table:style-name="ro19">
          <table:table-cell table:style-name="ce116"/>
          <table:table-cell table:number-columns-repeated="23" table:style-name="ce117"/>
          <table:table-cell office:value-type="string" table:style-name="ce118">
            <text:p>內政部戶政司編製</text:p>
          </table:table-cell>
          <table:table-cell table:number-columns-repeated="16359" table:style-name="ce112"/>
        </table:table-row>
        <table:table-row table:style-name="ro28">
          <table:table-cell table:number-columns-repeated="25" table:style-name="ce99"/>
          <table:table-cell table:number-columns-repeated="16359" table:style-name="ce117"/>
        </table:table-row>
        <table:table-row table:number-rows-repeated="1048543" table:style-name="ro28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394"/>
        <table:table-row table:style-name="ro22">
          <table:table-cell table:style-name="ce394">
            <draw:frame draw:z-index="2" draw:id="id1" draw:style-name="a1" draw:name="Object 1" svg:x="0.03125in" svg:y="0in" svg:width="6.59375in" svg:height="10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8" table:style-name="ro22">
          <table:table-cell table:number-columns-repeated="16384"/>
        </table:table-row>
        <table:table-row table:style-name="ro22">
          <table:table-cell table:number-columns-repeated="2"/>
          <table:table-cell table:style-name="ce394">
            <draw:frame draw:z-index="1" draw:id="id0" draw:style-name="a0" draw:name="圖片 5" svg:x="0.44792in" svg:y="0.20833in" svg:width="4.55208in" svg:height="0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42" table:style-name="ro22">
          <table:table-cell table:number-columns-repeated="16384"/>
        </table:table-row>
        <table:table-row table:style-name="ro22">
          <table:table-cell table:style-name="ce394">
            <draw:frame draw:z-index="3" draw:id="id2" draw:style-name="a2" draw:name="Object 2" svg:x="0.0625in" svg:y="0.125in" svg:width="6.51042in" svg:height="8.781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3" table:style-name="ro2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_Hlk129002985" table:expression="of:=['01資料分析'.#REF!]" table:base-cell-address="01-年月別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expression table:name="_Hlk160521250" table:expression="of:=['01資料分析'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說明" table:style-name="ta5">
        <table:table-source xlink:href="file:///D:/桌面/【月報】/01各月/11504/上網各月速報公式(11504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160" table:style-name="ta5">
        <table:table-source xlink:href="file:///D:/桌面/【月報】/01各月/11504/上網各月速報公式(11504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170" table:style-name="ta5">
        <table:table-source xlink:href="file:///D:/桌面/【月報】/01各月/11504/上網各月速報公式(11504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1B0" table:style-name="ta5">
        <table:table-source xlink:href="file:///D:/桌面/【月報】/01各月/11504/上網各月速報公式(11504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1-年月別(貼01-縣市別)" table:style-name="ta5">
        <table:table-source xlink:href="file:///D:/桌面/【月報】/01各月/11504/上網各月速報公式(11504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1-縣市別" table:style-name="ta5">
        <table:table-source xlink:href="file:///D:/桌面/【月報】/01各月/11504/上網各月速報公式(11504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1-年齡結構" table:style-name="ta5">
        <table:table-source xlink:href="file:///D:/桌面/【月報】/01各月/11504/上網各月速報公式(11504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1資料分析" table:style-name="ta5">
        <table:table-source xlink:href="file:///D:/桌面/【月報】/01各月/11504/上網各月速報公式(11504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1分析(草稿)" table:style-name="ta5">
        <table:table-source xlink:href="file:///D:/桌面/【月報】/01各月/11504/上網各月速報公式(11504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2-年月別" table:style-name="ta5">
        <table:table-source xlink:href="file:///D:/桌面/【月報】/01各月/11504/上網各月速報公式(11504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2-縣市別" table:style-name="ta5">
        <table:table-source xlink:href="file:///D:/桌面/【月報】/01各月/11504/上網各月速報公式(11504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4-單一年齡" table:style-name="ta5">
        <table:table-source xlink:href="file:///D:/桌面/【月報】/01各月/11504/上網各月速報公式(11504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5-年齡結構" table:style-name="ta5">
        <table:table-source xlink:href="file:///D:/桌面/【月報】/01各月/11504/上網各月速報公式(11504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6-人口增加&amp;生死結離" table:style-name="ta5">
        <table:table-source xlink:href="file:///D:/桌面/【月報】/01各月/11504/上網各月速報公式(11504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7-年月別" table:style-name="ta5">
        <table:table-source xlink:href="file:///D:/桌面/【月報】/01各月/11504/上網各月速報公式(11504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07-縣市別" table:style-name="ta5">
        <table:table-source xlink:href="file:///D:/桌面/【月報】/01各月/11504/上網各月速報公式(11504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10-年月別" table:style-name="ta5">
        <table:table-source xlink:href="file:///D:/桌面/【月報】/01各月/11504/上網各月速報公式(11504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10-縣市別" table:style-name="ta5">
        <table:table-source xlink:href="file:///D:/桌面/【月報】/01各月/11504/上網各月速報公式(11504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4/上網各月速報公式(11504).xls'#11-遷徙" table:style-name="ta5">
        <table:table-source xlink:href="file:///D:/桌面/【月報】/01各月/11504/上網各月速報公式(11504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49P2">
      <number:text> </number:text>
      <number:fill-character> </number:fill-character>
      <number:text>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64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64P2">
      <number:text> </number:text>
      <number:fill-character> </number:fill-character>
      <number:text>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decimal-places="0" number:min-integer-digits="1" number:grouping="true"/>
    </number:number-style>
    <number:number-style style:name="N65P1">
      <number:text>–</number:text>
      <number:number number:decimal-places="0" number:min-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decimal-places="2" number:min-integer-digits="1" number:grouping="true"/>
    </number:number-style>
    <number:number-style style:name="N66P1">
      <number:text>–</number:text>
      <number:number number:decimal-places="2" number:min-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decimal-places="0" number:min-integer-digits="1" number:grouping="true"/>
    </number:number-style>
    <number:number-style style:name="N67P1">
      <number:text>-</number:text>
      <number:number number:decimal-places="0" number:min-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68P1">
      <number:text>－   </number:text>
      <number:number number:decimal-places="0" number:min-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9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text-style style:name="N69P2">
      <number:text> </number:text>
      <number:fill-character> </number:fill-character>
      <number:text>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71P1">
      <number:text>－  </number:text>
      <number:number number:decimal-places="0" number:min-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decimal-places="2" number:min-integer-digits="1" number:grouping="true"/>
    </number:number-style>
    <number:number-style style:name="N72P1">
      <number:text>－  </number:text>
      <number:number number:decimal-places="2" number:min-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196850393700787in" fo:margin-right="0.196850393700787in" style:print-orientation="portrait" style:print-page-order="ttb" style:first-page-number="continue" style:scale-to="100%" style:table-centering="both" style:print="objects charts drawings"/>
      <style:header-style>
        <style:header-footer-properties fo:min-height="0.0393700787401575in" fo:margin-left="0.196850393700787in" fo:margin-right="0.196850393700787in" fo:margin-bottom="0in"/>
      </style:header-style>
      <style:footer-style>
        <style:header-footer-properties fo:min-height="0.0393700787401575in" fo:margin-left="0.196850393700787in" fo:margin-right="0.196850393700787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－<text:page-number>1</text:page-number>－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張伊榕</meta:initial-creator>
    <dc:creator>張伊榕</dc:creator>
    <meta:creation-date>2026-05-06T01:25:46Z</meta:creation-date>
    <dc:date>2026-05-06T01:26:03Z</dc:date>
    <meta:print-date>2022-07-14T08:53:18Z</meta:print-date>
  </office:meta>
</office:document-meta>
</file>